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50000033A1AEA7DA9.png" manifest:media-type="image/png"/>
  <manifest:file-entry manifest:full-path="Pictures/10000001000003D0000002BC46FD0A63.png" manifest:media-type="image/png"/>
  <manifest:file-entry manifest:full-path="Pictures/10000001000007A700000405B4FA8008.png" manifest:media-type="image/png"/>
  <manifest:file-entry manifest:full-path="Pictures/1000000100000064000000646E675E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CyrillicOld" svg:font-family="CyrillicOld" style:font-adornments="Жирный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96cm" style:rel-column-width="13476*"/>
    </style:style>
    <style:style style:name="Таблица1.B" style:family="table-column">
      <style:table-column-properties style:column-width="13.504cm" style:rel-column-width="52059*"/>
    </style:style>
    <style:style style:name="Таблица1.A1" style:family="table-cell">
      <style:table-cell-properties fo:background-color="#dddddd" fo:padding="0.097cm" fo:border-left="1.5pt solid #000000" fo:border-right="none" fo:border-top="1.5pt solid #000000" fo:border-bottom="1.5pt solid #000000">
        <style:background-image/>
      </style:table-cell-properties>
    </style:style>
    <style:style style:name="Таблица1.B1" style:family="table-cell">
      <style:table-cell-properties fo:background-color="#dddddd" fo:padding="0.097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1.A2" style:family="table-cell">
      <style:table-cell-properties fo:padding="0.097cm" fo:border-left="1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1.5pt solid #000000" fo:border-top="none" fo:border-bottom="none"/>
    </style:style>
    <style:style style:name="Таблица1.A3" style:family="table-cell">
      <style:table-cell-properties fo:background-color="#eeeeee" fo:padding="0.097cm" fo:border-left="1.5pt solid #000000" fo:border-right="none" fo:border-top="none" fo:border-bottom="none">
        <style:background-image/>
      </style:table-cell-properties>
    </style:style>
    <style:style style:name="Таблица1.B3" style:family="table-cell">
      <style:table-cell-properties fo:background-color="#eeeeee" fo:padding="0.097cm" fo:border-left="0.5pt solid #000000" fo:border-right="1.5pt solid #000000" fo:border-top="none" fo:border-bottom="none">
        <style:background-image/>
      </style:table-cell-properties>
    </style:style>
    <style:style style:name="Таблица1.A4" style:family="table-cell">
      <style:table-cell-properties fo:padding="0.097cm" fo:border-left="1.5pt solid #000000" fo:border-right="none" fo:border-top="none" fo:border-bottom="none"/>
    </style:style>
    <style:style style:name="Таблица1.B4" style:family="table-cell">
      <style:table-cell-properties fo:padding="0.097cm" fo:border-left="0.5pt solid #000000" fo:border-right="1.5pt solid #000000" fo:border-top="none" fo:border-bottom="none"/>
    </style:style>
    <style:style style:name="Таблица1.A6" style:family="table-cell">
      <style:table-cell-properties fo:padding="0.097cm" fo:border-left="1.5pt solid #000000" fo:border-right="none" fo:border-top="none" fo:border-bottom="none"/>
    </style:style>
    <style:style style:name="Таблица1.B6" style:family="table-cell">
      <style:table-cell-properties fo:padding="0.097cm" fo:border-left="0.5pt solid #000000" fo:border-right="1.5pt solid #000000" fo:border-top="none" fo:border-bottom="none"/>
    </style:style>
    <style:style style:name="Таблица1.A7" style:family="table-cell">
      <style:table-cell-properties fo:background-color="#eeeeee" fo:padding="0.097cm" fo:border-left="1.5pt solid #000000" fo:border-right="none" fo:border-top="none" fo:border-bottom="1.5pt solid #000000">
        <style:background-image/>
      </style:table-cell-properties>
    </style:style>
    <style:style style:name="Таблица1.B7" style:family="table-cell">
      <style:table-cell-properties fo:background-color="#eeeeee" fo:padding="0.097cm" fo:border-left="0.5pt solid #000000" fo:border-right="1.5pt solid #000000" fo:border-top="none" fo:border-bottom="1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214725" officeooo:paragraph-rsid="00214725"/>
    </style:style>
    <style:style style:name="P7" style:family="paragraph" style:parent-style-name="Text_20_body">
      <style:text-properties officeooo:paragraph-rsid="0017002a"/>
    </style:style>
    <style:style style:name="P8" style:family="paragraph" style:parent-style-name="Title">
      <style:text-properties officeooo:paragraph-rsid="0017002a"/>
    </style:style>
    <style:style style:name="P9" style:family="paragraph" style:parent-style-name="Text_20_body">
      <style:paragraph-properties fo:text-align="center" style:justify-single-word="false"/>
      <style:text-properties officeooo:paragraph-rsid="0018c9af"/>
    </style:style>
    <style:style style:name="P10" style:family="paragraph" style:parent-style-name="Text_20_body">
      <style:text-properties officeooo:rsid="002aa5f0" officeooo:paragraph-rsid="002c7d4f"/>
    </style:style>
    <style:style style:name="P11" style:family="paragraph" style:parent-style-name="Text_20_body">
      <style:text-properties officeooo:paragraph-rsid="002aa5f0"/>
    </style:style>
    <style:style style:name="P12" style:family="paragraph" style:parent-style-name="Text_20_body">
      <style:text-properties officeooo:rsid="002d123c" officeooo:paragraph-rsid="002d123c"/>
    </style:style>
    <style:style style:name="P13" style:family="paragraph" style:parent-style-name="Text_20_body">
      <style:text-properties officeooo:rsid="002d123c" officeooo:paragraph-rsid="002e65b1"/>
    </style:style>
    <style:style style:name="P14" style:family="paragraph" style:parent-style-name="Title" style:master-page-name="First_20_Page">
      <style:paragraph-properties style:page-number="auto"/>
      <style:text-properties style:font-name="CyrillicOld" fo:font-weight="bold" officeooo:paragraph-rsid="0017002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List" style:list-style-name="Numbering_20_123"/>
    <style:style style:name="P20" style:family="paragraph" style:parent-style-name="List" style:list-style-name="L1"/>
    <style:style style:name="P21" style:family="paragraph" style:parent-style-name="List" style:list-style-name="L2"/>
    <style:style style:name="P22" style:family="paragraph" style:parent-style-name="List" style:list-style-name="L3"/>
    <style:style style:name="P23" style:family="paragraph" style:parent-style-name="List" style:list-style-name="L4"/>
    <style:style style:name="P24" style:family="paragraph" style:parent-style-name="List" style:list-style-name="L5"/>
    <style:style style:name="T1" style:family="text">
      <style:text-properties style:font-name="CyrillicOld" fo:font-weight="bold"/>
    </style:style>
    <style:style style:name="T2" style:family="text">
      <style:text-properties officeooo:rsid="0018c9af"/>
    </style:style>
    <style:style style:name="T3" style:family="text">
      <style:text-properties officeooo:rsid="001d2c31"/>
    </style:style>
    <style:style style:name="T4" style:family="text">
      <style:text-properties officeooo:rsid="00200fdc"/>
    </style:style>
    <style:style style:name="T5" style:family="text">
      <style:text-properties officeooo:rsid="0023e522"/>
    </style:style>
    <style:style style:name="T6" style:family="text">
      <style:text-properties officeooo:rsid="0025dbd1"/>
    </style:style>
    <style:style style:name="T7" style:family="text">
      <style:text-properties officeooo:rsid="00278102"/>
    </style:style>
    <style:style style:name="T8" style:family="text">
      <style:text-properties officeooo:rsid="002902fb"/>
    </style:style>
    <style:style style:name="T9" style:family="text">
      <style:text-properties officeooo:rsid="002aa5f0"/>
    </style:style>
    <style:style style:name="T10" style:family="text">
      <style:text-properties officeooo:rsid="002c7d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Изображение1" text:anchor-type="as-char" svg:width="8.264cm" svg:height="5.927cm" draw:z-index="7"><draw:image xlink:href="Pictures/10000001000003D0000002BC46FD0A63.png" xlink:type="simple" xlink:show="embed" xlink:actuate="onLoad" draw:mime-type="image/png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Программа для ЭВМ «МПК-Пересвет»</text:p>
      <text:p text:style-name="P7"/>
      <text:p text:style-name="Title">Руководство по установке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>Москва <text:span text:style-name="T2">2025</text:span></text:p>
      <text:p text:style-name="Глоссарий._20_Заголовок"><text:soft-page-break/>ГЛОССАРИЙ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Термин</text:p>
          </table:table-cell>
          <table:table-cell table:style-name="Таблица1.B1" office:value-type="string">
            <text:p text:style-name="P5">Определение</text:p>
          </table:table-cell>
        </table:table-row>
        <table:table-row>
          <table:table-cell table:style-name="Таблица1.A2" office:value-type="string">
            <text:p text:style-name="P6">АСУТП</text:p>
          </table:table-cell>
          <table:table-cell table:style-name="Таблица1.B2" office:value-type="string">
            <text:p text:style-name="P6">Автоматизированные системы управления технологическими процессами. Комплекс программно-аппаратных средств для мониторинга и управления промышленными или инженерными объектами в реальном времени.</text:p>
          </table:table-cell>
        </table:table-row>
        <table:table-row>
          <table:table-cell table:style-name="Таблица1.A3" office:value-type="string">
            <text:p text:style-name="P6">SCADA</text:p>
          </table:table-cell>
          <table:table-cell table:style-name="Таблица1.B3" office:value-type="string">
            <text:p text:style-name="P6">Supervisory Control and Data Acquisition. Аналог АСУ ТП.</text:p>
          </table:table-cell>
        </table:table-row>
        <table:table-row>
          <table:table-cell table:style-name="Таблица1.A2" office:value-type="string">
            <text:p text:style-name="P6">MES</text:p>
          </table:table-cell>
          <table:table-cell table:style-name="Таблица1.B4" office:value-type="string">
            <text:p text:style-name="P6">Manufacturing execution system. Система управления производственными процессами — специализированное прикладное программное обеспечение, предназначенное для решения задач синхронизации, координации, анализа и оптимизации выпуска продукции в рамках какого-либо производства. MES-системы относятся к классу систем управления уровня цеха, но могут использоваться и для интегрированного управления производством на предприятии в целом.</text:p>
          </table:table-cell>
        </table:table-row>
        <table:table-row>
          <table:table-cell table:style-name="Таблица1.A3" office:value-type="string">
            <text:p text:style-name="Table_20_Contents">ПО</text:p>
          </table:table-cell>
          <table:table-cell table:style-name="Таблица1.B3" office:value-type="string">
            <text:p text:style-name="Table_20_Contents">Программное обеспечение.</text:p>
          </table:table-cell>
        </table:table-row>
        <table:table-row>
          <table:table-cell table:style-name="Таблица1.A2" office:value-type="string">
            <text:p text:style-name="Table_20_Contents">ОС</text:p>
          </table:table-cell>
          <table:table-cell table:style-name="Таблица1.B6" office:value-type="string">
            <text:p text:style-name="Table_20_Contents">Операционная система.</text:p>
          </table:table-cell>
        </table:table-row>
        <table:table-row>
          <table:table-cell table:style-name="Таблица1.A7" office:value-type="string">
            <text:p text:style-name="P6">API</text:p>
          </table:table-cell>
          <table:table-cell table:style-name="Таблица1.B7" office:value-type="string">
            <text:p text:style-name="Table_20_Contents">Application Programming Interface. Набор правил и инструкций, с помощью которых различные приложения и сервисы могут взаимодействовать друг с другом.</text:p>
          </table:table-cell>
        </table:table-row>
      </table:table>
      <text:p text:style-name="Standard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Содержание</text:p>
          </text:index-title>
          <text:p text:style-name="P2"><text:a xlink:type="simple" xlink:href="#__RefHeading___Toc231_183289677" text:style-name="Index_20_Link" text:visited-style-name="Index_20_Link">Описание<text:tab/>4</text:a></text:p>
          <text:p text:style-name="P3"><text:a xlink:type="simple" xlink:href="#__RefHeading___Toc233_183289677" text:style-name="Index_20_Link" text:visited-style-name="Index_20_Link">Область применения<text:tab/>4</text:a></text:p>
          <text:p text:style-name="P3"><text:a xlink:type="simple" xlink:href="#__RefHeading___Toc235_183289677" text:style-name="Index_20_Link" text:visited-style-name="Index_20_Link">Возможности<text:tab/>4</text:a></text:p>
          <text:p text:style-name="P3"><text:a xlink:type="simple" xlink:href="#__RefHeading___Toc237_183289677" text:style-name="Index_20_Link" text:visited-style-name="Index_20_Link">Уровень подготовки пользователя<text:tab/>4</text:a></text:p>
          <text:p text:style-name="P2"><text:a xlink:type="simple" xlink:href="#__RefHeading___Toc239_183289677" text:style-name="Index_20_Link" text:visited-style-name="Index_20_Link">Системные требования<text:tab/>5</text:a></text:p>
          <text:p text:style-name="P2"><text:a xlink:type="simple" xlink:href="#__RefHeading___Toc241_183289677" text:style-name="Index_20_Link" text:visited-style-name="Index_20_Link">Установка<text:tab/>5</text:a></text:p>
          <text:p text:style-name="P3"><text:a xlink:type="simple" xlink:href="#__RefHeading___Toc243_183289677" text:style-name="Index_20_Link" text:visited-style-name="Index_20_Link">Проверка корректности установки<text:tab/>5</text:a></text:p>
        </text:index-body>
      </text:table-of-content>
      <text:p text:style-name="Standard"/>
      <text:p text:style-name="Standard"/>
      <text:h text:style-name="P18" text:outline-level="1"><text:bookmark-start text:name="__RefHeading___Toc231_183289677"/>Описание<text:bookmark-end text:name="__RefHeading___Toc231_183289677"/></text:h>
      <text:p text:style-name="Text_20_body">МПК-Пересвет <text:span text:style-name="T3">(далее по тексту — платформа, система)</text:span>— платформа-конструктор для создания моделей технических объектов и информационных систем.</text:p>
      <text:h text:style-name="Heading_20_2" text:outline-level="2"><text:bookmark-start text:name="__RefHeading___Toc233_183289677"/>Область применения<text:bookmark-end text:name="__RefHeading___Toc233_183289677"/></text:h>
      <text:p text:style-name="Text_20_body">Платформа может использоваться для сбора, хранения, обработки данных, а также автоматизации процессов, протекающих в рамках моделируемого технического объекта.</text:p>
      <text:list text:style-name="Numbering_20_123">
        <text:list-item>
          <text:p text:style-name="P19">Промышленная автоматизация уровней SCADA, диспетчеризация/мониторинг, MES.</text:p>
        </text:list-item>
        <text:list-item>
          <text:p text:style-name="P19">Умный дом, умное здание.</text:p>
        </text:list-item>
        <text:list-item>
          <text:p text:style-name="P19">Создание произвольных программно-аппаратных комплексов, предполагающих работу по следующей схеме: автоматический сбор данных с большого количества источников → хранение исторических данных → обработка данных, запуск процессов → отображение данных на динамических экранах/мнемосхемах.</text:p>
        </text:list-item>
      </text:list>
      <text:h text:style-name="Heading_20_2" text:outline-level="2"><text:bookmark-start text:name="__RefHeading___Toc235_183289677"/>Возможности<text:bookmark-end text:name="__RefHeading___Toc235_183289677"/></text:h>
      <text:list text:style-name="L1">
        <text:list-item>
          <text:p text:style-name="P20">Создание моделей объектов и информационных систем.</text:p>
        </text:list-item>
        <text:list-item>
          <text:p text:style-name="P20">Автоматический сбор данных с большого количества источников с дальнейшим сколь угодно долгим хранением всех собранных данных.</text:p>
        </text:list-item>
        <text:list-item>
          <text:p text:style-name="P20">Создание и управление систем распределённых вычислений, моделирующих поведение объектов.</text:p>
        </text:list-item>
        <text:list-item>
          <text:p text:style-name="P20">Наличие <text:span text:style-name="T4">API, позволяющего полностью управлять системой.</text:span></text:p>
        </text:list-item>
      </text:list>
      <text:h text:style-name="Heading_20_2" text:outline-level="2"><text:bookmark-start text:name="__RefHeading___Toc237_183289677"/>Уровень подготовки пользователя<text:bookmark-end text:name="__RefHeading___Toc237_183289677"/></text:h>
      <text:p text:style-name="P11">Начальные требования к квалификации специалиста, отвечающего за установку системы:</text:p>
      <text:list text:style-name="L2">
        <text:list-item>
          <text:p text:style-name="P21">Клонирование репозиториев из <text:span text:style-name="T9">github (</text:span><text:a xlink:type="simple" xlink:href="https://git-scm.com/" text:style-name="Internet_20_link" text:visited-style-name="Visited_20_Internet_20_Link"><text:span text:style-name="T9">https://github.com/</text:span></text:a><text:span text:style-name="T9">) или умение разархивировать архивы .zip или .tar.gz.</text:span></text:p>
        </text:list-item>
        <text:list-item>
          <text:p text:style-name="P21">Умение запускать на исполнение <text:span text:style-name="T7">sh-скрипты в ОС Ubuntu.</text:span></text:p>
        </text:list-item>
      </text:list>
      <text:p text:style-name="Text_20_body">В случае необходимости конфигурирования отдельных параметров системы <text:span text:style-name="T7">(порты, сертификаты для </text:span><text:span text:style-name="T8">TLS-соединений</text:span><text:span text:style-name="T7">, масштабирование системы в рамках контейнеров и т. д.</text:span><text:span text:style-name="T8">) базовые навыки специалиста таковы:</text:span></text:p>
      <text:list text:style-name="L3">
        <text:list-item>
          <text:p text:style-name="P22">Основы администрирования ОС семейства Linux.</text:p>
        </text:list-item>
        <text:list-item>
          <text:p text:style-name="P22">Умение работать с системой контейнеризации «Docker», включая «<text:span text:style-name="T5">Docker compose».</text:span></text:p>
        </text:list-item>
        <text:list-item>
          <text:p text:style-name="P22">Понимание принципов шифрования передачи данных и функционирования протокола TLS, умение генерировать сертификаты и пользоваться ими.</text:p>
        </text:list-item>
        <text:list-item>
          <text:p text:style-name="P22">Умение конфигурировать <text:span text:style-name="T5">Nginx как обратный прокси.</text:span></text:p>
        </text:list-item>
        <text:list-item>
          <text:p text:style-name="P22">Знание настоящего Руководства по установке.</text:p>
        </text:list-item>
      </text:list>
      <text:p text:style-name="Text_20_body"><text:soft-page-break/>В случае более сложных развёртываний платформы для создания масштабных распределённых систем требуется понимание администрирования её отдельных компонентов:</text:p>
      <text:list text:style-name="L4">
        <text:list-item>
          <text:p text:style-name="P23">OpenLDAP.</text:p>
        </text:list-item>
        <text:list-item>
          <text:p text:style-name="P23">PostgreSQL (или другая база данных, используемая для хранения исторических данных).</text:p>
        </text:list-item>
        <text:list-item>
          <text:p text:style-name="P23">Redis.</text:p>
        </text:list-item>
        <text:list-item>
          <text:p text:style-name="P23">RabbitMQ.</text:p>
        </text:list-item>
        <text:list-item>
          <text:p text:style-name="P23">Nginx.</text:p>
        </text:list-item>
        <text:list-item>
          <text:p text:style-name="P23">Сервер приложений. По умолчанию используется uvicorn, но может использоваться и nginx.unit.</text:p>
        </text:list-item>
        <text:list-item>
          <text:p text:style-name="P23">Docker compose. Управление экземплярами микросервисов платформы.</text:p>
        </text:list-item>
      </text:list>
      <text:h text:style-name="Heading_20_1" text:outline-level="1"><text:bookmark-start text:name="__RefHeading___Toc239_183289677"/>Системные требования<text:bookmark-end text:name="__RefHeading___Toc239_183289677"/></text:h>
      <text:p text:style-name="Text_20_body">Установка рассматривается для случая работы на сервере <text:span text:style-name="T6">Ubuntu. <text:line-break/>Для установки на других ОС обратитесь к разработчикам.</text:span></text:p>
      <text:list text:style-name="L5">
        <text:list-item>
          <text:p text:style-name="P24">Ubuntu 24.04</text:p>
        </text:list-item>
        <text:list-item>
          <text:p text:style-name="P24">Docker. Установка: <text:a xlink:type="simple" xlink:href="https://docs.docker.com/engine/install/ubuntu/" text:style-name="Internet_20_link" text:visited-style-name="Visited_20_Internet_20_Link">https://docs.docker.com/engine/install/ubuntu/</text:a>. После установке выполните шаги «Post-installation steps»: <text:a xlink:type="simple" xlink:href="https://docs.docker.com/engine/install/linux-postinstall/" text:style-name="Internet_20_link" text:visited-style-name="Visited_20_Internet_20_Link">https://docs.docker.com/engine/install/linux-postinstall/</text:a>.</text:p>
        </text:list-item>
        <text:list-item>
          <text:p text:style-name="P24">В случае, если проект системы будет клонироваться с репозитория <text:a xlink:type="simple" xlink:href="https://github.com/mp-co-ru/peresvet" text:style-name="Internet_20_link" text:visited-style-name="Visited_20_Internet_20_Link">https://github.com/mp-co-ru/peresvet</text:a>, необходим <text:span text:style-name="T9">git: </text:span><text:a xlink:type="simple" xlink:href="https://git-scm.com/" text:style-name="Internet_20_link" text:visited-style-name="Visited_20_Internet_20_Link"><text:span text:style-name="T9">https://git-scm.com/</text:span></text:a><text:span text:style-name="T9">.</text:span></text:p>
        </text:list-item>
        <text:list-item>
          <text:p text:style-name="P24">При первом запуске необходим доступ к сети интернет для скачивания базовых <text:span text:style-name="T10">docker-образов.</text:span></text:p>
        </text:list-item>
      </text:list>
      <text:h text:style-name="Heading_20_1" text:outline-level="1"><text:bookmark-start text:name="__RefHeading___Toc241_183289677"/>Установка<text:bookmark-end text:name="__RefHeading___Toc241_183289677"/></text:h>
      <text:p text:style-name="P10">После выполнения шага <text:span text:style-name="T10">2 предыдущ.его раздела: </text:span></text:p>
      <text:p text:style-name="P10">К<text:span text:style-name="T10">лонируем проект <text:s/></text:span><text:a xlink:type="simple" xlink:href="https://github.com/mp-co-ru/peresvet" text:style-name="Internet_20_link" text:visited-style-name="Visited_20_Internet_20_Link"><text:span text:style-name="T10">https://github.com/mp-co-ru/peresvet</text:span></text:a><text:span text:style-name="T10"> или скачиваем его последний релиз в виде архива и разархивируем его в отдельную папку.</text:span></text:p>
      <text:p text:style-name="P10">Выполняем вход в папку проекта и выполняем скрипт:</text:p>
      <text:p text:style-name="Код">$ ./run_one_app.sh</text:p>
      <text:p text:style-name="P12">Данный скрипт создаст все необходимые docker-контейнеры и запустит платформу.</text:p>
      <text:h text:style-name="Heading_20_2" text:outline-level="2"><text:bookmark-start text:name="__RefHeading___Toc243_183289677"/>Проверка корректности установки<text:bookmark-end text:name="__RefHeading___Toc243_183289677"/></text:h>
      <text:p text:style-name="Text_20_body">Экран консоли, в который был выполнен указанный выше скрипт, будет иметь примерно такой вид:</text:p>
      <text:p text:style-name="Text_20_body"><text:soft-page-break/><draw:frame draw:style-name="fr2" draw:name="Изображение3" text:anchor-type="as-char" svg:width="17cm" svg:height="8.929cm" draw:z-index="4"><draw:image xlink:href="Pictures/10000001000007A700000405B4FA8008.png" xlink:type="simple" xlink:show="embed" xlink:actuate="onLoad" draw:mime-type="image/png"/></draw:frame></text:p>
      <text:p text:style-name="Text_20_body">Для полной проверки работоспособности системы запускаем браузер и вводим в строке адреса:</text:p>
      <text:p text:style-name="P12"><text:a xlink:type="simple" xlink:href="http://localhost/grafana/" text:style-name="Internet_20_link" text:visited-style-name="Visited_20_Internet_20_Link">http://localhost/grafana/</text:a></text:p>
      <text:p text:style-name="P13">Отображаемый экран свидетельствует, что система запустилась нормально:</text:p>
      <text:p text:style-name="P12"><draw:frame draw:style-name="fr2" draw:name="Изображение4" text:anchor-type="as-char" svg:width="11.942cm" svg:height="8.296cm" draw:z-index="1"><draw:image xlink:href="Pictures/10000001000004A50000033A1AEA7DA9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CyrillicOld" svg:font-family="CyrillicOld" style:font-adornments="Жирный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Обычный" style:font-family-generic="roman" style:font-pitch="variable" style:text-scale="97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5cm" style:contextual-spacing="true">
        <style:tab-stops/>
      </style:paragraph-properties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 style:font-size-asian="28pt" style:font-weight-asian="bold" style:font-size-complex="28pt" style:font-weight-complex="bold" style:text-scale="9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3cm" fo:margin-bottom="0.21cm" style:contextual-spacing="true"/>
      <style:text-properties fo:font-size="20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17cm" style:type="right"/>
        </style:tab-stops>
      </style:paragraph-properties>
      <style:text-properties style:font-name="Arial" fo:font-family="Arial" style:font-style-name="Обычный" style:font-family-generic="swiss" style:font-pitch="variable" fo:font-size="9pt"/>
    </style:style>
    <style:style style:name="Footer" style:family="paragraph" style:parent-style-name="Header_20_and_20_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Обычный" style:font-family-generic="swiss" style:font-pitch="variable" fo:font-size="9pt"/>
    </style:style>
    <style:style style:name="Глоссарий._20_Заголовок" style:display-name="Глоссарий. Заголовок" style:family="paragraph" style:parent-style-name="Text_20_body" style:master-page-name="">
      <style:paragraph-properties fo:text-align="center" style:justify-single-word="false" style:page-number="auto">
        <style:tab-stops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Код" style:family="paragraph" style:parent-style-name="Text_20_body">
      <loext:graphic-properties draw:fill="solid" draw:fill-color="#eeeeee"/>
      <style:paragraph-properties fo:background-color="#eeeeee"/>
      <style:text-properties style:font-name="Courier New" fo:font-family="'Courier New'" style:font-style-name="Обычный" style:font-family-generic="modern" style:font-pitch="fixed" fo:font-size="10pt" officeooo:rsid="002c7d4f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Изображение2 Копия 1" text:anchor-type="as-char" svg:y="-0.418cm" svg:width="0.542cm" svg:height="0.542cm" draw:z-index="6"><draw:image xlink:href="Pictures/1000000100000064000000646E675ECB.png" xlink:type="simple" xlink:show="embed" xlink:actuate="onLoad" draw:mime-type="image/png"/></draw:frame><text:s/>МПК-Пересвет<text:tab/>Руководство по установке</text:p>
      </style:header>
      <style:footer>
        <text:p text:style-name="MP1">Стр. <text:bookmark-start text:name="PageNumWizard_FOOTER_Базовый2"/><text:page-number text:select-page="current">6</text:page-number><text:s/>из <text:page-count>6</text:page-count><text:bookmark-end text:name="PageNumWizard_FOOTER_Базовый2"/></text:p>
        <text:p text:style-name="Footer"><text:tab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6:19:15.504979986</meta:creation-date>
    <meta:generator>LibreOffice/24.2.7.2$Linux_X86_64 LibreOffice_project/420$Build-2</meta:generator>
    <dc:date>2025-12-01T15:40:26.854693505</dc:date>
    <meta:editing-duration>PT1H38M16S</meta:editing-duration>
    <meta:editing-cycles>20</meta:editing-cycles>
    <meta:print-date>2025-11-21T21:36:42.904763757</meta:print-date>
    <meta:printed-by>Файлы PDF</meta:printed-by>
    <meta:document-statistic meta:table-count="1" meta:image-count="4" meta:object-count="0" meta:page-count="6" meta:paragraph-count="79" meta:word-count="561" meta:character-count="4728" meta:non-whitespace-character-count="4260"/>
  </office:meta>
</office:document-meta>
</file>