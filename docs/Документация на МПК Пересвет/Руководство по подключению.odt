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E0000032FCBB7F498.png" manifest:media-type="image/png"/>
  <manifest:file-entry manifest:full-path="Pictures/10000001000004F8000003F5327DBD28.png" manifest:media-type="image/png"/>
  <manifest:file-entry manifest:full-path="Pictures/10000001000003D0000002BC46FD0A63.png" manifest:media-type="image/png"/>
  <manifest:file-entry manifest:full-path="Pictures/1000000100000064000000646E675E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002a"/>
    </style:style>
    <style:style style:name="P3" style:family="paragraph" style:parent-style-name="Title">
      <style:text-properties officeooo:paragraph-rsid="0017002a"/>
    </style:style>
    <style:style style:name="P4" style:family="paragraph" style:parent-style-name="Text_20_body">
      <style:paragraph-properties fo:text-align="center" style:justify-single-word="false"/>
      <style:text-properties officeooo:paragraph-rsid="0018c9af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le" style:master-page-name="First_20_Page">
      <style:paragraph-properties style:page-number="auto"/>
      <style:text-properties style:font-name="CyrillicOld" fo:font-weight="bold" officeooo:paragraph-rsid="0017002a"/>
    </style:style>
    <style:style style:name="P8" style:family="paragraph" style:parent-style-name="Attention" style:list-style-name="L5">
      <style:text-properties officeooo:paragraph-rsid="00b9f73b"/>
    </style:style>
    <style:style style:name="P9" style:family="paragraph" style:parent-style-name="Attention" style:list-style-name="L7">
      <style:text-properties officeooo:paragraph-rsid="00b9f73b"/>
    </style:style>
    <style:style style:name="P10" style:family="paragraph" style:parent-style-name="Attention">
      <style:text-properties officeooo:paragraph-rsid="00b9f73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text-properties officeooo:paragraph-rsid="00b9f73b"/>
    </style:style>
    <style:style style:name="P13" style:family="paragraph" style:parent-style-name="Heading_20_2">
      <style:text-properties officeooo:paragraph-rsid="00b9f73b"/>
    </style:style>
    <style:style style:name="P14" style:family="paragraph" style:parent-style-name="Heading_20_3">
      <style:text-properties officeooo:paragraph-rsid="00b9f73b"/>
    </style:style>
    <style:style style:name="P15" style:family="paragraph" style:parent-style-name="List" style:list-style-name="L6">
      <style:text-properties officeooo:paragraph-rsid="00b9f73b"/>
    </style:style>
    <style:style style:name="P16" style:family="paragraph" style:parent-style-name="List" style:list-style-name="L7">
      <style:text-properties officeooo:paragraph-rsid="00b9f73b"/>
    </style:style>
    <style:style style:name="P17" style:family="paragraph" style:parent-style-name="Text_20_body" style:list-style-name="L2">
      <style:text-properties officeooo:paragraph-rsid="00b9f73b"/>
    </style:style>
    <style:style style:name="P18" style:family="paragraph" style:parent-style-name="Text_20_body" style:list-style-name="L5">
      <style:text-properties officeooo:paragraph-rsid="00b9f73b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officeooo:paragraph-rsid="00b9f73b"/>
    </style:style>
    <style:style style:name="P20" style:family="paragraph" style:parent-style-name="Text_20_body" style:list-style-name="L7">
      <style:text-properties officeooo:paragraph-rsid="00b9f73b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officeooo:paragraph-rsid="00b9f73b"/>
    </style:style>
    <style:style style:name="P22" style:family="paragraph" style:parent-style-name="Text_20_body">
      <style:text-properties officeooo:paragraph-rsid="00b9f73b"/>
    </style:style>
    <style:style style:name="P23" style:family="paragraph" style:parent-style-name="Код">
      <style:text-properties officeooo:paragraph-rsid="00b9f73b"/>
    </style:style>
    <style:style style:name="T1" style:family="text">
      <style:text-properties style:font-name="CyrillicOld" fo:font-weight="bold"/>
    </style:style>
    <style:style style:name="T2" style:family="text">
      <style:text-properties officeooo:rsid="0018c9af"/>
    </style:style>
    <style:style style:name="T3" style:family="text">
      <style:text-properties officeooo:rsid="00b71b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Изображение1" text:anchor-type="char" svg:width="8.264cm" svg:height="5.927cm" draw:z-index="60"><draw:image xlink:href="Pictures/10000001000003D0000002BC46FD0A63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Программа для ЭВМ «МПК-Пересвет»</text:p>
      <text:p text:style-name="P2"/>
      <text:p text:style-name="Title">Руководство по подключению <text:line-break/>к облачной верси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>Москва <text:span text:style-name="T2">2025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Содержание</text:p>
          </text:index-title>
          <text:p text:style-name="P5"><text:a xlink:type="simple" xlink:href="#__RefHeading___Toc8255_1607204571" text:style-name="Index_20_Link" text:visited-style-name="Index_20_Link">Подключение к облачной версии МПК-Пересвет<text:tab/>3</text:a></text:p>
        </text:index-body>
      </text:table-of-content>
      <text:p text:style-name="Standard"/>
      <text:p text:style-name="Standard"/>
      <text:h text:style-name="P11" text:outline-level="1"><text:bookmark-start text:name="__RefHeading___Toc8255_1607204571"/>Подключение к облачной версии МПК-Пересвет<text:bookmark-end text:name="__RefHeading___Toc8255_1607204571"/></text:h>
      <text:p text:style-name="Text_20_body">Облачная версия МПК-Пересвет располагается в сети интернет по адресу <text:a xlink:type="simple" xlink:href="https://mpcperesvet.matchpoint-consulting.ru/grafana" text:style-name="Internet_20_link" text:visited-style-name="Visited_20_Internet_20_Link">https://mpcperesvet.matchpoint-consulting.ru/grafana</text:a>.</text:p>
      <text:p text:style-name="Text_20_body"><draw:frame draw:style-name="fr3" draw:name="Изображение3" text:anchor-type="as-char" svg:width="17cm" svg:height="13.538cm" draw:z-index="58"><draw:image xlink:href="Pictures/10000001000004F8000003F5327DBD28.png" xlink:type="simple" xlink:show="embed" xlink:actuate="onLoad" draw:mime-type="image/png"/></draw:frame></text:p>
      <text:p text:style-name="Text_20_body">При первом запуске в окне доступа в качестве имени пользователя введите «<text:span text:style-name="T3">guest», пароль - «Peresvet».</text:span></text:p>
      <text:p text:style-name="Text_20_body">Далее для работы с платформой используйте «Руководство пользователя».</text:p>
      <text:h text:style-name="P12" text:outline-level="1"><text:bookmark-start text:name="__RefHeading___Toc6486_1607204571"/>Примеры работы с МПК-Пересвет<text:bookmark-end text:name="__RefHeading___Toc6486_1607204571"/></text:h>
      <text:p text:style-name="P22">Рассмотрим самый простой пример.</text:p>
      <text:h text:style-name="P13" text:outline-level="2"><text:bookmark-start text:name="__RefHeading___Toc6488_1607204571"/><text:soft-page-break/>Простой пример с одним объектом<text:bookmark-end text:name="__RefHeading___Toc6488_1607204571"/></text:h>
      <text:p text:style-name="P22">Для демонстрации работы с объектами, тегами, методами и экранами Grafana сделаем следующий пример.</text:p>
      <text:p text:style-name="P22">Допустим, у нас есть лампочка и мы можем тем или иным способом получить данные по току и напряжению (работу с коннекторами рассмотрим в следующих примерах).</text:p>
      <text:p text:style-name="P22">Кроме тока и напряжения у лампочки есть третий, расчётный тег - мощность.</text:p>
      <text:p text:style-name="P22">При изменении силы тока или напряжения мощность должна перерасчитываться.</text:p>
      <text:h text:style-name="P14" text:outline-level="3"><text:bookmark-start text:name="__RefHeading___Toc6490_1607204571"/>Объект<text:bookmark-end text:name="__RefHeading___Toc6490_1607204571"/></text:h>
      <text:p text:style-name="P22">Открываем конфигуратор, выбираем папку «Объекты» и нажимаем кнопку «Новый объект»:</text:p>
      <text:p text:style-name="P22"><draw:frame draw:style-name="fr2" draw:name="Изображение2" text:anchor-type="as-char" svg:width="15.785cm" svg:height="10.594cm" draw:z-index="29"><draw:image xlink:href="../../../../peresvet/docs/build/html/_images/01.start.png" xlink:type="simple" xlink:show="embed" xlink:actuate="onLoad" draw:mime-type="image/png"/><svg:title>../_images/01.start.png</svg:title></draw:frame><text:s/></text:p>
      <text:p text:style-name="P22">В появившемся окне свойств меняем имя объекта на «Лампочка»…</text:p>
      <text:p text:style-name="P22"><text:soft-page-break/><draw:frame draw:style-name="fr2" draw:name="Изображение3 Копия 1" text:anchor-type="as-char" svg:width="15.718cm" svg:height="10.552cm" draw:z-index="57"><draw:image xlink:href="../../../../peresvet/docs/build/html/_images/02.before_save.png" xlink:type="simple" xlink:show="embed" xlink:actuate="onLoad" draw:mime-type="image/png"/><svg:title>../_images/02.before_save.png</svg:title></draw:frame><text:s/></text:p>
      <text:p text:style-name="P22">…и, нажав кнопку «Записать», сохраняем изменения:</text:p>
      <text:p text:style-name="P22"><draw:frame draw:style-name="fr2" draw:name="Изображение4 Копия 1" text:anchor-type="as-char" svg:width="16.36cm" svg:height="10.984cm" draw:z-index="56"><draw:image xlink:href="../../../../peresvet/docs/build/html/_images/03.after_save.png" xlink:type="simple" xlink:show="embed" xlink:actuate="onLoad" draw:mime-type="image/png"/><svg:title>../_images/03.after_save.png</svg:title></draw:frame><text:s/></text:p>
      <text:h text:style-name="P14" text:outline-level="3"><text:bookmark-start text:name="__RefHeading___Toc6492_1607204571"/><text:soft-page-break/>Теги<text:bookmark-end text:name="__RefHeading___Toc6492_1607204571"/></text:h>
      <text:p text:style-name="P22">Оставляя текущим объектом «Лампочку», нажимаем кнопку «Новый тег»:</text:p>
      <text:p text:style-name="P22"><draw:frame draw:style-name="fr2" draw:name="Изображение5 Копия 1" text:anchor-type="as-char" svg:width="15.639cm" svg:height="10.448cm" draw:z-index="54"><draw:image xlink:href="../../../../peresvet/docs/build/html/_images/04.new_tag.png" xlink:type="simple" xlink:show="embed" xlink:actuate="onLoad" draw:mime-type="image/png"/><svg:title>../_images/04.new_tag.png</svg:title></draw:frame><text:s/></text:p>
      <text:p text:style-name="P22">Меняем имя тега и единицы измерения…</text:p>
      <text:p text:style-name="P22"><text:soft-page-break/><draw:frame draw:style-name="fr2" draw:name="Изображение6 Копия 1" text:anchor-type="as-char" svg:width="16.708cm" svg:height="11.217cm" draw:z-index="55"><draw:image xlink:href="../../../../peresvet/docs/build/html/_images/05.tag_props.png" xlink:type="simple" xlink:show="embed" xlink:actuate="onLoad" draw:mime-type="image/png"/><svg:title>../_images/05.tag_props.png</svg:title></draw:frame><text:s/></text:p>
      <text:p text:style-name="P22">…и, нажав кнопку «Записать», сохраняем изменения:</text:p>
      <text:p text:style-name="P22"><draw:frame draw:style-name="fr1" draw:name="Изображение41" text:anchor-type="char" svg:width="16.341cm" svg:height="10.97cm" draw:z-index="62"><draw:image xlink:href="Pictures/10000000000004BE0000032FCBB7F498.png" xlink:type="simple" xlink:show="embed" xlink:actuate="onLoad" draw:mime-type="image/png"/></draw:frame><text:soft-page-break/><text:s/></text:p>
      <text:p text:style-name="P22">Аналогичным образом создаём ещё два тега, U и P:</text:p>
      <text:p text:style-name="P22"><text:soft-page-break/><draw:frame draw:style-name="fr2" draw:name="Изображение8 Копия 1" text:anchor-type="as-char" svg:width="16.796cm" svg:height="11.277cm" draw:z-index="30"><draw:image xlink:href="../../../../peresvet/docs/build/html/_images/07.IUP.png" xlink:type="simple" xlink:show="embed" xlink:actuate="onLoad" draw:mime-type="image/png"/><svg:title>../_images/07.IUP.png</svg:title></draw:frame><text:s/></text:p>
      <text:h text:style-name="P14" text:outline-level="3"><text:bookmark-start text:name="__RefHeading___Toc6494_1607204571"/>Запись/чтение данных<text:bookmark-end text:name="__RefHeading___Toc6494_1607204571"/></text:h>
      <text:p text:style-name="P22">Проверим, что данные в теги записываются и читаются.</text:p>
      <text:p text:style-name="P22">Выберем тег «I» и откроем панель «Данные тега»:</text:p>
      <text:p text:style-name="P22"><text:soft-page-break/><draw:frame draw:style-name="fr2" draw:name="Изображение9 Копия 1" text:anchor-type="as-char" svg:width="16.357cm" svg:height="10.98cm" draw:z-index="31"><draw:image xlink:href="../../../../peresvet/docs/build/html/_images/08.open_read_save.png" xlink:type="simple" xlink:show="embed" xlink:actuate="onLoad" draw:mime-type="image/png"/><svg:title>../_images/08.open_read_save.png</svg:title></draw:frame><text:s/></text:p>
      <text:list text:style-name="L2">
        <text:list-item>
          <text:p text:style-name="P17">В поле «Значение» впишем 0.</text:p>
        </text:list-item>
        <text:list-item>
          <text:p text:style-name="P17">В поле «body» можно посмотреть сформированное тело запроса на запись.</text:p>
        </text:list-item>
      </text:list>
      <text:p text:style-name="P22"><text:soft-page-break/><draw:frame draw:style-name="fr2" draw:name="Изображение10 Копия 1" text:anchor-type="as-char" svg:width="16.87cm" svg:height="11.326cm" draw:z-index="53"><draw:image xlink:href="../../../../peresvet/docs/build/html/_images/09.set_data.png" xlink:type="simple" xlink:show="embed" xlink:actuate="onLoad" draw:mime-type="image/png"/><svg:title>../_images/09.set_data.png</svg:title></draw:frame><text:s/></text:p>
      <text:p text:style-name="P22">Нажимаем кнопку «Записать», затем «Получить данные».</text:p>
      <text:p text:style-name="P22">В таблице «Значение-время-качество» появится текущее значение тега «I»:</text:p>
      <text:p text:style-name="P22"><text:soft-page-break/><draw:frame draw:style-name="fr2" draw:name="Изображение11 Копия 1" text:anchor-type="as-char" svg:width="16.893cm" svg:height="11.342cm" draw:z-index="52"><draw:image xlink:href="../../../../peresvet/docs/build/html/_images/10.get_data.png" xlink:type="simple" xlink:show="embed" xlink:actuate="onLoad" draw:mime-type="image/png"/><svg:title>../_images/10.get_data.png</svg:title></draw:frame><text:s/></text:p>
      <text:h text:style-name="P14" text:outline-level="3"><text:bookmark-start text:name="__RefHeading___Toc6496_1607204571"/>Расчётный метод<text:bookmark-end text:name="__RefHeading___Toc6496_1607204571"/></text:h>
      <text:p text:style-name="P22">Создадим метод для расчёта мощности лампочки.</text:p>
      <text:p text:style-name="P22">Для этого выберем тег «P» и нажмём кнопку «Новый метод»:</text:p>
      <text:p text:style-name="P22"><text:soft-page-break/><draw:frame draw:style-name="fr2" draw:name="Изображение12 Копия 1" text:anchor-type="as-char" svg:width="16.796cm" svg:height="11.254cm" draw:z-index="32"><draw:image xlink:href="../../../../peresvet/docs/build/html/_images/11.new_method.png" xlink:type="simple" xlink:show="embed" xlink:actuate="onLoad" draw:mime-type="image/png"/><svg:title>../_images/11.new_method.png</svg:title></draw:frame><text:s/></text:p>
      <text:p text:style-name="P22">Затем:</text:p>
      <text:list text:style-name="L5">
        <text:list-item>
          <text:p text:style-name="P18">Изменим имя метода</text:p>
        </text:list-item>
        <text:list-item>
          <text:p text:style-name="P18">В поле «Адрес» введём название метода, под которым он будет зарегистрирован в системе для вызовов. Запомним это имя - <text:span text:style-name="Source_20_Text">power</text:span>:</text:p>
          <text:p text:style-name="P19"><text:soft-page-break/><draw:frame draw:style-name="fr4" draw:name="Изображение13 Копия 1" text:anchor-type="as-char" svg:y="-9.726cm" svg:width="15.635cm" svg:height="8.862cm" draw:z-index="51"><draw:image xlink:href="../../../../peresvet/docs/build/html/_images/12.method_name_address.png" xlink:type="simple" xlink:show="embed" xlink:actuate="onLoad" draw:mime-type="image/png"/><svg:title>../_images/12.method_name_address.png</svg:title></draw:frame><text:s/></text:p>
        </text:list-item>
        <text:list-item>
          <text:p text:style-name="P18">Блок «Инициаторы». Очень важный блок, в котором мы выбираем, какие события могут инициировать выполнение расчётного метода.</text:p>
          <text:p text:style-name="P18">Здесь выберем оба предложенных тега: I и U, то есть изменения обоих этих тегов будут приводить к перерасчёту мощности.</text:p>
          <text:p text:style-name="P8">Обратите внимание, что в списке возможных инициаторов расчёта нет самого тега «P»: изменение тега не может приводить к перерасчёту его самого, так как это вызовет бесконечный цикл расчётов.</text:p>
          <text:p text:style-name="P19"><text:soft-page-break/><draw:frame draw:style-name="fr2" draw:name="Изображение14 Копия 1" text:anchor-type="as-char" svg:width="15.577cm" svg:height="8.828cm" draw:z-index="50"><draw:image xlink:href="../../../../peresvet/docs/build/html/_images/13.method_initiators.png" xlink:type="simple" xlink:show="embed" xlink:actuate="onLoad" draw:mime-type="image/png"/><svg:title>../_images/13.method_initiators.png</svg:title></draw:frame><text:s/></text:p>
        </text:list-item>
        <text:list-item>
          <text:p text:style-name="P18">Укажем, какие данные необходимо передать методу для расчёта.</text:p>
          <text:p text:style-name="P18">Данные, передаваемые в метод в каждом параметре - это результат запроса <text:a xlink:type="simple" xlink:href="../../../../peresvet/docs/build/html/data_api.html#tags_app_api_svc.data_get" text:style-name="Internet_20_link" text:visited-style-name="Visited_20_Internet_20_Link"><text:span text:style-name="Source_20_Text">получения данных</text:span></text:a>.</text:p>
          <text:p text:style-name="P18">Для расчёта мощности нужны текущие значения двух тегов: силы тока и напряжения. Поэтому создаём два параметра, дважды нажав на синюю кнопку с плюсом. Заполняем данные параметров как показано на картинке:</text:p>
          <text:p text:style-name="P18"><draw:frame draw:style-name="fr2" draw:name="Изображение15 Копия 1" text:anchor-type="as-char" svg:width="15.575cm" svg:height="9.319cm" draw:z-index="49"><draw:image xlink:href="../../../../peresvet/docs/build/html/_images/14.method_parameters.png" xlink:type="simple" xlink:show="embed" xlink:actuate="onLoad" draw:mime-type="image/png"/><svg:title>../_images/14.method_parameters.png</svg:title></draw:frame><text:s/></text:p>
          <text:p text:style-name="P18"><text:soft-page-break/>Здесь мы указали, что в метод передаются два параметра: первым (индекс = 1) - сила тока.</text:p>
          <text:p text:style-name="P18">Вторым (индекс = 2) - напряжение.</text:p>
          <text:p text:style-name="P18">Поле «Конфигурация» заполняется автоматически после выбора тега в поле «Тег».</text:p>
          <text:p text:style-name="P18">Внимание</text:p>
          <text:p text:style-name="P18">После изучения документации на запрос <text:a xlink:type="simple" xlink:href="../../../../peresvet/docs/build/html/data_api.html#tags_app_api_svc.data_get" text:style-name="Internet_20_link" text:visited-style-name="Visited_20_Internet_20_Link"><text:span text:style-name="Source_20_Text">получения данных</text:span></text:a> можно вручную править поле «Конфигурация», составляя сколь угодно сложные запросы получения данных. Поле «Конфигурация» можно расширять для удобства ввода текста.</text:p>
          <text:p text:style-name="P18"><draw:frame draw:style-name="fr2" draw:name="Изображение16 Копия 1" text:anchor-type="as-char" svg:width="16.166cm" svg:height="3.965cm" draw:z-index="47"><draw:image xlink:href="../../../../peresvet/docs/build/html/_images/15.extend_config.png" xlink:type="simple" xlink:show="embed" xlink:actuate="onLoad" draw:mime-type="image/png"/><svg:title>../_images/15.extend_config.png</svg:title></draw:frame><text:s/></text:p>
          <text:p text:style-name="P8">Очень важный момент, относящийся к расчётам значений тегов: тег мощности рассчитывается, когда изменяется значение тегов «I» и «U». Допустим, расчёт инициируется изменением тега «I» и метка времени нового значения «I» - «2024-10-27 10:00:00+03:00». В этом случае запрос данных в параметрах будет производиться также на метку времени «2024-10-27 10:00:00+03:00» и новое рассчитанное значение тега мощности также будет записано с этой меткой времени, не смотря на то, что сам расчёт, возможно, будет производиться в другое время.</text:p>
        </text:list-item>
        <text:list-item>
          <text:p text:style-name="P18">Нажимаем кнопку «Записать» для сохранения изменений:</text:p>
          <text:p text:style-name="P18"><text:soft-page-break/><draw:frame draw:style-name="fr2" draw:name="Изображение17 Копия 1" text:anchor-type="as-char" svg:width="15.565cm" svg:height="9.312cm" draw:z-index="48"><draw:image xlink:href="../../../../peresvet/docs/build/html/_images/16.save_method.png" xlink:type="simple" xlink:show="embed" xlink:actuate="onLoad" draw:mime-type="image/png"/><svg:title>../_images/16.save_method.png</svg:title></draw:frame><text:s/></text:p>
        </text:list-item>
      </text:list>
      <text:p text:style-name="P22">Теперь напишем код метода.</text:p>
      <text:p text:style-name="P22">В папке <text:span text:style-name="Source_20_Text">methods</text:span> уже написан метод для этого примера.</text:p>
      <text:p text:style-name="P22">Откроем файл <text:span text:style-name="Source_20_Text">methods/test_method.py</text:span> и рассмотрим метод <text:span text:style-name="Source_20_Text">calc_power</text:span>:</text:p>
      <text:p text:style-name="P23">@rpc("power")</text:p>
      <text:p text:style-name="P23">async def calc_power(I: dict, U: dict) -&gt; float:</text:p>
      <text:p text:style-name="P23"><text:s text:c="4"/>"""Метод возвращает произведение двух параметров.</text:p>
      <text:p text:style-name="P23"><text:s text:c="4"/>"""</text:p>
      <text:p text:style-name="P23"><text:s text:c="4"/>print(f"I: {json.dumps(I, indent=4)}")</text:p>
      <text:p text:style-name="P23"><text:s text:c="4"/>print(f"U: {json.dumps(U, indent=4)}")</text:p>
      <text:p text:style-name="P23"/>
      <text:p text:style-name="P23"><text:s text:c="4"/>cur_I = I["data"][0]["data"][0][0]</text:p>
      <text:p text:style-name="P23"><text:s text:c="4"/>cur_U = U["data"][0]["data"][0][0]</text:p>
      <text:p text:style-name="P23"/>
      <text:p text:style-name="P23"><text:s text:c="4"/>if cur_I == None or cur_U == None:</text:p>
      <text:p text:style-name="P23"><text:s text:c="8"/>return 0</text:p>
      <text:p text:style-name="P23"/>
      <text:p text:style-name="P23"><text:s text:c="4"/>return cur_I * cur_U</text:p>
      <text:p text:style-name="P10">Первая строка: <text:span text:style-name="Source_20_Text">@rpc("power")</text:span>: именно «power» мы вводили в поле «Адрес» при создании метода!</text:p>
      <text:p text:style-name="P22">Далее - строка объявления метода: <text:span text:style-name="Source_20_Text">async def calc_power(I: dict, U: dict) -&gt; float:</text:span>. Первым параметром указана сила тока, вторым - напряжение. Точно так же, как мы указывали индексы у параметров.</text:p>
      <text:p text:style-name="P22">Далее метод просто для удобства выводит в консоль пришедшие данные, затем рассчитывает мощность как произведение двух параметров.</text:p>
      <text:h text:style-name="P14" text:outline-level="3"><text:bookmark-start text:name="__RefHeading___Toc6498_1607204571"/><text:soft-page-break/>Запуск расчётного метода<text:bookmark-end text:name="__RefHeading___Toc6498_1607204571"/></text:h>
      <text:p text:style-name="P22">Для запуска метода необходимо установить пакеты, указанные в файле <text:span text:style-name="Source_20_Text">methods/requirements.txt</text:span> либо для всех пользователей:</text:p>
      <text:p text:style-name="P23">$ pip3 install -r requirements.txt</text:p>
      <text:p text:style-name="P22">Либо создав виртуальную среду проекта.</text:p>
      <text:p text:style-name="P22">После установки пакетов запускаем в терминале скрипт в папке <text:span text:style-name="Source_20_Text">methods</text:span>:</text:p>
      <text:p text:style-name="P23">$ python3 test_method.py</text:p>
      <text:p text:style-name="P22">Результат должен быть примерно таким:</text:p>
      <text:p text:style-name="P22"><draw:frame draw:style-name="fr2" draw:name="Изображение18 Копия 1" text:anchor-type="as-char" svg:width="14.769cm" svg:height="6.588cm" draw:z-index="33"><draw:image xlink:href="../../../../peresvet/docs/build/html/_images/17.run_method.png" xlink:type="simple" xlink:show="embed" xlink:actuate="onLoad" draw:mime-type="image/png"/><svg:title>../_images/17.run_method.png</svg:title></draw:frame><text:s/></text:p>
      <text:h text:style-name="P14" text:outline-level="3"><text:bookmark-start text:name="__RefHeading___Toc6500_1607204571"/>Проверим расчёт<text:bookmark-end text:name="__RefHeading___Toc6500_1607204571"/></text:h>
      <text:p text:style-name="P22">Помним, что расчёт мощности инициируется изменениями значений тока и напряжения.</text:p>
      <text:p text:style-name="P22">Запишем в тег «U» значение 230.</text:p>
      <text:p text:style-name="P22">Для этого выберем в иерархии тег «U» и запишем в него требуемое значение:</text:p>
      <text:p text:style-name="P22"><text:soft-page-break/><draw:frame draw:style-name="fr2" draw:name="Изображение19 Копия 1" text:anchor-type="as-char" svg:width="16.522cm" svg:height="9.883cm" draw:z-index="46"><draw:image xlink:href="../../../../peresvet/docs/build/html/_images/18.set_u.png" xlink:type="simple" xlink:show="embed" xlink:actuate="onLoad" draw:mime-type="image/png"/><svg:title>../_images/18.set_u.png</svg:title></draw:frame><text:s/></text:p>
      <text:p text:style-name="P22">В консоли, в которой мы запустили метод, появится вывод:</text:p>
      <text:p text:style-name="P22"><draw:frame draw:style-name="fr4" draw:name="Изображение20 Копия 1" text:anchor-type="as-char" svg:y="-8.338cm" svg:width="17.602cm" svg:height="10.934cm" draw:z-index="45"><draw:image xlink:href="../../../../peresvet/docs/build/html/_images/19.print_calc.png" xlink:type="simple" xlink:show="embed" xlink:actuate="onLoad" draw:mime-type="image/png"/><svg:title>../_images/19.print_calc.png</svg:title></draw:frame><text:s/></text:p>
      <text:p text:style-name="P22"><text:soft-page-break/>Проверим значение тега мощности «P». Оно должно быть равно 0, так как перед этим в тег «I» мы записали 0:</text:p>
      <text:p text:style-name="P22"><draw:frame draw:style-name="fr2" draw:name="Изображение21 Копия 1" text:anchor-type="as-char" svg:width="16.738cm" svg:height="10.014cm" draw:z-index="34"><draw:image xlink:href="../../../../peresvet/docs/build/html/_images/20.P_is_0.png" xlink:type="simple" xlink:show="embed" xlink:actuate="onLoad" draw:mime-type="image/png"/><svg:title>../_images/20.P_is_0.png</svg:title></draw:frame><text:s/></text:p>
      <text:p text:style-name="P22">Теперь запишем в тег «I» значение 1:</text:p>
      <text:p text:style-name="P22"><draw:frame draw:style-name="fr2" draw:name="Изображение22 Копия 1" text:anchor-type="as-char" svg:width="16.568cm" svg:height="9.911cm" draw:z-index="44"><draw:image xlink:href="../../../../peresvet/docs/build/html/_images/21.I_is_1.png" xlink:type="simple" xlink:show="embed" xlink:actuate="onLoad" draw:mime-type="image/png"/><svg:title>../_images/21.I_is_1.png</svg:title></draw:frame><text:s/></text:p>
      <text:p text:style-name="P22"><text:soft-page-break/>И проверим значение мощности, которое должно быть равно 230 Вт:</text:p>
      <text:p text:style-name="P22"><draw:frame draw:style-name="fr2" draw:name="Изображение23 Копия 1" text:anchor-type="as-char" svg:width="16.769cm" svg:height="10.031cm" draw:z-index="35"><draw:image xlink:href="../../../../peresvet/docs/build/html/_images/22.P_is_230.png" xlink:type="simple" xlink:show="embed" xlink:actuate="onLoad" draw:mime-type="image/png"/><svg:title>../_images/22.P_is_230.png</svg:title></draw:frame><text:s/></text:p>
      <text:h text:style-name="P14" text:outline-level="3"><text:bookmark-start text:name="__RefHeading___Toc6502_1607204571"/>Отображение данных в Grafana<text:bookmark-end text:name="__RefHeading___Toc6502_1607204571"/></text:h>
      <text:p text:style-name="P22">Данные из платформы можно получать запросами, описанными в разделе «Исторические данные».</text:p>
      <text:p text:style-name="P22">Данные тегов (как, впрочем, и всё общение с платформой) приходят в виде json и для манипулирования этими данными в Grafan’е рекомендуется изучить языки манипулирования json-данными <text:a xlink:type="simple" xlink:href="https://docs.jsonata.org/overview.html" text:style-name="Internet_20_link" text:visited-style-name="Visited_20_Internet_20_Link">JSONata</text:a> или <text:a xlink:type="simple" xlink:href="https://jsonpath.com/" text:style-name="Internet_20_link" text:visited-style-name="Visited_20_Internet_20_Link">JSONPath</text:a>.</text:p>
      <text:p text:style-name="P22">Предпочтительнее JSONata, так как обладает большими возможностями.</text:p>
      <text:p text:style-name="P22">Настроим отображение:</text:p>
      <text:list text:style-name="L6">
        <text:list-item>
          <text:p text:style-name="P15">текущих значений тегов «I», «U» и «P»;</text:p>
        </text:list-item>
        <text:list-item>
          <text:p text:style-name="P15">трендов значений этих тегов;</text:p>
        </text:list-item>
      </text:list>
      <text:list text:style-name="L7">
        <text:list-item>
          <text:p text:style-name="P20">Создадим новую доску данных.</text:p>
          <text:p text:style-name="P20">Для этого заходим в меню «Home –&gt; Dashboards» и нажимаем кнопку «New»</text:p>
          <text:p text:style-name="P20"><text:soft-page-break/><draw:frame draw:style-name="fr2" draw:name="Изображение24 Копия 1" text:anchor-type="as-char" svg:width="15.593cm" svg:height="10.821cm" draw:z-index="43"><draw:image xlink:href="../../../../peresvet/docs/build/html/_images/23.new_dashboard.png" xlink:type="simple" xlink:show="embed" xlink:actuate="onLoad" draw:mime-type="image/png"/><svg:title>../_images/23.new_dashboard.png</svg:title></draw:frame><text:s/></text:p>
          <text:p text:style-name="P20">Выбрав в выпадающем меню команду «New dashboard», попадаем на экран создания новой панели:</text:p>
          <text:p text:style-name="P20"><text:soft-page-break/><draw:frame draw:style-name="fr2" draw:name="Изображение25 Копия 1" text:anchor-type="as-char" svg:width="15.536cm" svg:height="10.781cm" draw:z-index="42"><draw:image xlink:href="../../../../peresvet/docs/build/html/_images/24.new_panel.png" xlink:type="simple" xlink:show="embed" xlink:actuate="onLoad" draw:mime-type="image/png"/><svg:title>../_images/24.new_panel.png</svg:title></draw:frame><text:s/></text:p>
          <text:p text:style-name="P20">…и выбираем источник данных «peresvet»:</text:p>
          <text:p text:style-name="P21"><draw:frame draw:style-name="fr2" draw:name="Изображение26 Копия 1" text:anchor-type="as-char" svg:width="15.436cm" svg:height="8.442cm" draw:z-index="36"><draw:image xlink:href="../../../../peresvet/docs/build/html/_images/25.ds.png" xlink:type="simple" xlink:show="embed" xlink:actuate="onLoad" draw:mime-type="image/png"/><svg:title>../_images/25.ds.png</svg:title></draw:frame><text:s/></text:p>
        </text:list-item>
        <text:list-item>
          <text:p text:style-name="P20">В появившемся окне настройки панели выберем тип панели «Stat».</text:p>
          <text:p text:style-name="P21"><text:soft-page-break/><draw:frame draw:style-name="fr2" draw:name="Изображение27 Копия 1" text:anchor-type="as-char" svg:width="15.55cm" svg:height="9.024cm" draw:z-index="41"><draw:image xlink:href="../../../../peresvet/docs/build/html/_images/26.stat.png" xlink:type="simple" xlink:show="embed" xlink:actuate="onLoad" draw:mime-type="image/png"/><svg:title>../_images/26.stat.png</svg:title></draw:frame><text:s/></text:p>
        </text:list-item>
        <text:list-item>
          <text:p text:style-name="P20">Настроим путь для получения данных, вписав <text:span text:style-name="Source_20_Text">/data/</text:span> на закладке <text:span text:style-name="Source_20_Text">Path</text:span>.</text:p>
          <text:p text:style-name="P9">По умолчанию в источнике данных «peresvet» настроен путь к платформе: <text:span text:style-name="Source_20_Text">http://&lt;server&gt;/v1/</text:span>. Добавляя к этому пути расширения <text:span text:style-name="Source_20_Text">data</text:span>, <text:span text:style-name="Source_20_Text">objects</text:span>, <text:span text:style-name="Source_20_Text">tags</text:span> и т.д., мы получаем возможность работать не только с данными, но и вообще со всеми сущностями платформы.</text:p>
          <text:p text:style-name="P21"><draw:frame draw:style-name="fr2" draw:name="Изображение28 Копия 1" text:anchor-type="as-char" svg:width="15.734cm" svg:height="8.29cm" draw:z-index="40"><draw:image xlink:href="../../../../peresvet/docs/build/html/_images/27.path.png" xlink:type="simple" xlink:show="embed" xlink:actuate="onLoad" draw:mime-type="image/png"/><svg:title>../_images/27.path.png</svg:title></draw:frame><text:s/></text:p>
        </text:list-item>
        <text:list-item>
          <text:p text:style-name="P20">Настроим запросы получения данных.</text:p>
          <text:p text:style-name="P20">Для того, чтобы не писать запрос вручную, его можно скопировать из конфигуратора.</text:p>
          <text:p text:style-name="P20"><text:soft-page-break/>Открываем конфигуратор, выбираем тег «I» и копируем запрос получения текущего значения тега.</text:p>
          <text:p text:style-name="P20"><draw:frame draw:style-name="fr2" draw:name="Изображение29 Копия 1" text:anchor-type="as-char" svg:width="15.685cm" svg:height="8.767cm" draw:z-index="37"><draw:image xlink:href="../../../../peresvet/docs/build/html/_images/28.q.png" xlink:type="simple" xlink:show="embed" xlink:actuate="onLoad" draw:mime-type="image/png"/><svg:title>../_images/28.q.png</svg:title></draw:frame><text:s/></text:p>
          <text:p text:style-name="P20">В окне настройки панели выбираем закладку «Params» и добавляем новый ключ «q». Значение ключа - скопированный нами запрос:</text:p>
          <text:p text:style-name="P20"><draw:frame draw:style-name="fr2" draw:name="Изображение30 Копия 1" text:anchor-type="as-char" svg:width="15.737cm" svg:height="9.559cm" draw:z-index="39"><draw:image xlink:href="../../../../peresvet/docs/build/html/_images/29.params.png" xlink:type="simple" xlink:show="embed" xlink:actuate="onLoad" draw:mime-type="image/png"/><svg:title>../_images/29.params.png</svg:title></draw:frame><text:s/></text:p>
          <text:p text:style-name="P20">Далее:</text:p>
          <text:list>
            <text:list-item>
              <text:p text:style-name="P16">Переходим на закладку «Fields»;</text:p>
            </text:list-item>
            <text:list-item>
              <text:p text:style-name="P16"><text:soft-page-break/>Меняем имя очереди на «I»;</text:p>
            </text:list-item>
            <text:list-item>
              <text:p text:style-name="P16">Вводим выражение на языке JSONPath, разбирающее ответ от платформы с текущим значением тега</text:p>
            </text:list-item>
            <text:list-item>
              <text:p text:style-name="P16">На экране появится «1» - текущее, введённое нами на предыдущих шагах значение тока.</text:p>
            </text:list-item>
          </text:list>
          <text:p text:style-name="P20"><draw:frame draw:style-name="fr2" draw:name="Изображение31 Копия 1" text:anchor-type="as-char" svg:width="15.868cm" svg:height="9.638cm" draw:z-index="38"><draw:image xlink:href="../../../../peresvet/docs/build/html/_images/30.data.png" xlink:type="simple" xlink:show="embed" xlink:actuate="onLoad" draw:mime-type="image/png"/><svg:title>../_images/30.data.png</svg:title></draw:frame><text:s/></text:p>
          <text:p text:style-name="P20">Повторим предыдущие шаги для оставшихся двух тегов напряжения и мощности, добавляя новые запросы нажатием кнопки «Add query»:</text:p>
          <text:p text:style-name="P20"><text:soft-page-break/><draw:frame draw:style-name="fr2" draw:name="Изображение32 Копия 1" text:anchor-type="as-char" svg:width="15.635cm" svg:height="8.781cm" draw:z-index="63"><draw:image xlink:href="../../../../peresvet/docs/build/html/_images/31.add_query.png" xlink:type="simple" xlink:show="embed" xlink:actuate="onLoad" draw:mime-type="image/png"/><svg:title>../_images/31.add_query.png</svg:title></draw:frame><text:s/></text:p>
          <text:p text:style-name="P20">Предупреждение:</text:p>
          <text:p text:style-name="P20">У каждого поля отменим кэширование данных:</text:p>
          <text:p text:style-name="P21"><draw:frame draw:style-name="fr2" draw:name="Изображение33 Копия 1" text:anchor-type="as-char" svg:width="15.558cm" svg:height="7.927cm" draw:z-index="64"><draw:image xlink:href="../../../../peresvet/docs/build/html/_images/39.cache.png" xlink:type="simple" xlink:show="embed" xlink:actuate="onLoad" draw:mime-type="image/png"/><svg:title>../_images/39.cache.png</svg:title></draw:frame><text:s/></text:p>
        </text:list-item>
        <text:list-item>
          <text:p text:style-name="P20">Окончательная настройка панели.</text:p>
          <text:p text:style-name="P20">После настройки данных значения напряжения и мощности отображаются красным цветом. Так выставлены настройки по умолчанию.</text:p>
          <text:list>
            <text:list-item>
              <text:p text:style-name="P20">Чтобы все значения отражались зелёным цветом, уберём порог значения «80»;</text:p>
              <text:p text:style-name="P21"><text:soft-page-break/><draw:frame draw:style-name="fr2" draw:name="Изображение34 Копия 1" text:anchor-type="as-char" svg:width="14.286cm" svg:height="8.675cm" draw:z-index="65"><draw:image xlink:href="../../../../peresvet/docs/build/html/_images/32.remove_threshold.png" xlink:type="simple" xlink:show="embed" xlink:actuate="onLoad" draw:mime-type="image/png"/><svg:title>../_images/32.remove_threshold.png</svg:title></draw:frame><text:s/></text:p>
            </text:list-item>
            <text:list-item>
              <text:p text:style-name="P20">Переименуем панель и нажмем кнопку «Save»:</text:p>
              <text:p text:style-name="P20"><draw:frame draw:style-name="fr2" draw:name="Изображение35 Копия 1" text:anchor-type="as-char" svg:width="14.289cm" svg:height="8.678cm" draw:z-index="66"><draw:image xlink:href="../../../../peresvet/docs/build/html/_images/33.save.png" xlink:type="simple" xlink:show="embed" xlink:actuate="onLoad" draw:mime-type="image/png"/><svg:title>../_images/33.save.png</svg:title></draw:frame><text:s/></text:p>
              <text:p text:style-name="P20">Появится окно, в котором нужно задать имя доски данных.</text:p>
            </text:list-item>
          </text:list>
          <text:p text:style-name="P20">Предупреждение:</text:p>
          <text:p text:style-name="P20">Чтобы на панели рядом с именем тега не отображался 0, введите в поля <text:span text:style-name="Source_20_Text">Alias</text:span> пробел:</text:p>
          <text:p text:style-name="P21"><text:soft-page-break/><draw:frame draw:style-name="fr3" draw:name="Изображение36 Копия 1" text:anchor-type="as-char" svg:width="9.897cm" svg:height="2.565cm" draw:z-index="67"><draw:image xlink:href="../../../../peresvet/docs/build/html/_images/35.space.png" xlink:type="simple" xlink:show="embed" xlink:actuate="onLoad" draw:mime-type="image/png"/><svg:title>../_images/35.space.png</svg:title></draw:frame><text:s/></text:p>
        </text:list-item>
        <text:list-item>
          <text:p text:style-name="P20">Выровняем новую панель на экране и создадим новую панель, с трендом, для чего выберем команду «Add –&gt; Visualization»:</text:p>
          <text:p text:style-name="P21"><draw:frame draw:style-name="fr2" draw:name="Изображение37 Копия 1" text:anchor-type="as-char" svg:width="15.863cm" svg:height="9.135cm" draw:z-index="68"><draw:image xlink:href="../../../../peresvet/docs/build/html/_images/34.trend.png" xlink:type="simple" xlink:show="embed" xlink:actuate="onLoad" draw:mime-type="image/png"/><svg:title>../_images/34.trend.png</svg:title></draw:frame><text:s/></text:p>
        </text:list-item>
        <text:list-item>
          <text:p text:style-name="P20">Настройка панели с трендом.</text:p>
          <text:p text:style-name="P20">Тип панели оставим по умолчанию - «Time series».</text:p>
          <text:p text:style-name="P20">Получение данных настроим похоже предыдущей панели, за исключением того, что ключ запроса «q» будет включать функции Grafan’ы <text:span text:style-name="Source_20_Text">$__isoFrom()</text:span> и <text:span text:style-name="Source_20_Text">$__isoTo()</text:span>, обозначающие начало и конец запрашиваемого временного периода:</text:p>
          <text:p text:style-name="P20"><text:span text:style-name="Source_20_Text">q={"tagId":"2d95d0a6-28c7-103f-9c49-d763ac5895e8","format":true,"start":"$__isoFrom()","finish":"$__isoTo()"}</text:span>.</text:p>
          <text:p text:style-name="P20">Закладки «Fields» у всех трёх запросов должны быть такого вида:</text:p>
          <text:p text:style-name="P21"><text:soft-page-break/><draw:frame draw:style-name="fr2" draw:name="Изображение38 Копия 1" text:anchor-type="as-char" svg:width="15.685cm" svg:height="9.527cm" draw:z-index="69"><draw:image xlink:href="../../../../peresvet/docs/build/html/_images/36.trend_fields.png" xlink:type="simple" xlink:show="embed" xlink:actuate="onLoad" draw:mime-type="image/png"/><svg:title>../_images/36.trend_fields.png</svg:title></draw:frame><text:s/></text:p>
        </text:list-item>
        <text:list-item>
          <text:p text:style-name="P20">Выбор временных периодов.</text:p>
          <text:p text:style-name="P20">Настроив панель с трендом для отображения трёх тегов, приведём доску данных приблизительно к такому виду и выберем диапазон времени для отображения на экране, а также периодичность обновления данных:</text:p>
          <text:p text:style-name="P21"><text:soft-page-break/><draw:frame draw:style-name="fr2" draw:name="Изображение39" text:anchor-type="as-char" svg:width="15.406cm" svg:height="12.026cm" draw:z-index="70"><draw:image xlink:href="../../../../peresvet/docs/build/html/_images/37.periods.png" xlink:type="simple" xlink:show="embed" xlink:actuate="onLoad" draw:mime-type="image/png"/><svg:title>../_images/37.periods.png</svg:title></draw:frame><text:s/></text:p>
        </text:list-item>
        <text:list-item>
          <text:p text:style-name="P20">Проверим работу модели. Для чего записываем новые значения в теги «I» и «U» и наблюдаем изменение данных на панели с электрическими параметрами:</text:p>
          <text:p text:style-name="P20"><draw:frame draw:style-name="fr2" draw:name="Изображение40" text:anchor-type="as-char" svg:width="15.697cm" svg:height="7.251cm" draw:z-index="61"><draw:image xlink:href="../../../../peresvet/docs/build/html/_images/38.check.png" xlink:type="simple" xlink:show="embed" xlink:actuate="onLoad" draw:mime-type="image/png"/><svg:title>../_images/38.check.png</svg:title></draw:frame>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Обычный" style:font-family-generic="roman" style:font-pitch="variable" style:text-scale="97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true" fo:hyphenation-remain-char-count="2" fo:hyphenation-push-char-count="2" loext:hyphenation-no-caps="true" loext:hyphenation-no-last-word="tru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5cm" style:contextual-spacing="true">
        <style:tab-stops/>
      </style:paragraph-properties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bold" style:text-scale="9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3cm" fo:margin-bottom="0.21cm" style:contextual-spacing="true"/>
      <style:text-properties fo:font-size="20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Глоссарий._20_Заголовок" style:display-name="Глоссарий. Заголовок" style:family="paragraph" style:parent-style-name="Text_20_body" style:master-page-name="">
      <style:paragraph-properties fo:text-align="center" style:justify-single-word="false" style:page-number="auto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Код" style:family="paragraph" style:parent-style-name="Text_20_body">
      <loext:graphic-properties draw:fill="solid" draw:fill-color="#eeeeee"/>
      <style:paragraph-properties fo:margin-top="0cm" fo:margin-bottom="0.25cm" style:contextual-spacing="true" fo:line-height="100%" fo:background-color="#eeeeee"/>
      <style:text-properties style:font-name="Courier New" fo:font-family="'Courier New'" style:font-style-name="Обычный" style:font-family-generic="modern" style:font-pitch="fixed" fo:font-size="10pt" officeooo:rsid="002c7d4f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 style:master-page-name="">
      <style:paragraph-properties fo:margin-top="0.21cm" fo:margin-bottom="0.6cm" style:contextual-spacing="false" fo:text-align="center" style:justify-single-word="false" style:page-number="auto"/>
    </style:style>
    <style:style style:name="Signature" style:family="paragraph" style:parent-style-name="Standard" style:class="text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ttention" style:family="paragraph" style:parent-style-name="List">
      <style:paragraph-properties fo:padding="0.049cm" fo:border-left="none" fo:border-right="none" fo:border-top="0.06pt solid #000000" fo:border-bottom="0.06pt solid #000000"/>
      <style:text-properties fo:font-style="italic" officeooo:rsid="007f38f4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svg:width="0.041cm" fo:min-height="0.041cm" text:anchor-type="paragraph" svg:x="0cm" svg:y="0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Изображение2 Копия 1" text:anchor-type="as-char" svg:y="-0.418cm" svg:width="0.542cm" svg:height="0.542cm" draw:z-index="59"><draw:image xlink:href="Pictures/1000000100000064000000646E675ECB.png" xlink:type="simple" xlink:show="embed" xlink:actuate="onLoad" draw:mime-type="image/png"/></draw:frame><text:s/>МПК-Пересвет<text:tab/>Руководство администратора</text:p>
      </style:header>
      <style:footer>
        <text:p text:style-name="MP1">Стр. <text:bookmark-start text:name="PageNumWizard_FOOTER_Базовый2"/><text:page-number text:select-page="current">31</text:page-number><text:s/>из <text:page-count>31</text:page-count><text:bookmark-end text:name="PageNumWizard_FOOTER_Базовый2"/></text:p>
        <text:p text:style-name="Footer"><text:tab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6:19:15.504979986</meta:creation-date>
    <meta:generator>LibreOffice/24.2.7.2$Linux_X86_64 LibreOffice_project/420$Build-2</meta:generator>
    <dc:date>2026-06-10T15:15:09.228856412</dc:date>
    <meta:editing-duration>P1DT3H6M55S</meta:editing-duration>
    <meta:editing-cycles>114</meta:editing-cycles>
    <meta:print-date>2025-12-01T16:07:16.490263855</meta:print-date>
    <meta:printed-by>Файлы PDF</meta:printed-by>
    <meta:document-statistic meta:table-count="0" meta:image-count="42" meta:object-count="0" meta:page-count="31" meta:paragraph-count="168" meta:word-count="1240" meta:character-count="8803" meta:non-whitespace-character-count="7632"/>
  </office:meta>
</office:document-meta>
</file>