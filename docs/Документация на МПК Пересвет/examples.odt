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monospac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fo:background-color="#f8f8f8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background-color="#f8f8f8"/>
    </style:style>
    <style:style style:name="P4" style:family="paragraph" style:parent-style-name="Preformatted_20_Text">
      <style:text-properties fo:background-color="#f8f8f8"/>
    </style:style>
    <style:style style:name="P5" style:family="paragraph" style:parent-style-name="Preformatted_20_Text">
      <style:paragraph-properties fo:margin-top="0cm" fo:margin-bottom="0.499cm" style:contextual-spacing="false"/>
      <style:text-properties fo:background-color="#f8f8f8"/>
    </style:style>
    <style:style style:name="P6" style:family="paragraph" style:parent-style-name="Text_20_body" style:master-page-name="HTML">
      <style:paragraph-properties fo:margin-top="0cm" fo:margin-bottom="0cm" style:contextual-spacing="false" style:page-number="auto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peresvet/docs/build/html/search.html" xlink:type="simple">
          <form:properties>
            <form:property form:property-name="PropertyChangeNotificationEnabled" office:value-type="boolean" office:boolean-value="true"/>
          </form:properties>
          <form:text form:name="q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hidden form:name="check_keywords" form:control-implementation="ooo:com.sun.star.form.component.HiddenControl" xml:id="control2" form:id="control2" form:value="yes"/>
          <form:hidden form:name="area" form:control-implementation="ooo:com.sun.star.form.component.HiddenControl" xml:id="control3" form:id="control3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a xlink:type="simple" xlink:href="../../../../peresvet/docs/build/html/index.html"><draw:frame draw:style-name="fr2" draw:name="Изображение1" text:anchor-type="as-char" svg:width="2.699cm" svg:height="3.201cm" draw:z-index="0"><draw:image xlink:href="../../../../peresvet/docs/build/html/_static/logo.png" xlink:type="simple" xlink:show="embed" xlink:actuate="onLoad" draw:mime-type="image/png"/><svg:title>Логотип</svg:title></draw:frame></draw:a><text:a xlink:type="simple" xlink:href="../../../../peresvet/docs/build/html/index.html" text:style-name="Internet_20_link" text:visited-style-name="Visited_20_Internet_20_Link"><text:s/></text:a></text:p>
      <text:p text:style-name="Text_20_body">0.4 </text:p>
      <text:p text:style-name="Text_20_body"><draw:control text:anchor-type="as-char" draw:z-index="40" draw:name="Фигура1" draw:style-name="gr1" draw:text-style-name="P19" svg:width="7.039cm" svg:height="0.874cm" draw:control="control1"/><text:s/></text:p>
      <text:p text:style-name="Text_20_body">Содержание:</text:p>
      <text:list text:style-name="L1">
        <text:list-item>
          <text:p text:style-name="P9"><text:a xlink:type="simple" xlink:href="../../../../peresvet/docs/build/html/description.html" text:style-name="Internet_20_link" text:visited-style-name="Visited_20_Internet_20_Link">Описание</text:a> </text:p>
        </text:list-item>
        <text:list-item>
          <text:p text:style-name="P9"><text:a xlink:type="simple" xlink:href="../../../../peresvet/docs/build/html/terms.html" text:style-name="Internet_20_link" text:visited-style-name="Visited_20_Internet_20_Link">Используемые термины</text:a> </text:p>
        </text:list-item>
        <text:list-item>
          <text:p text:style-name="P9"><text:a xlink:type="simple" xlink:href="../../../../peresvet/docs/build/html/components.html" text:style-name="Internet_20_link" text:visited-style-name="Visited_20_Internet_20_Link">Компоненты системы</text:a> </text:p>
        </text:list-item>
        <text:list-item>
          <text:p text:style-name="P9"><text:a xlink:type="simple" xlink:href="../../../../peresvet/docs/build/html/historical_data.html" text:style-name="Internet_20_link" text:visited-style-name="Visited_20_Internet_20_Link">Исторические данные</text:a> </text:p>
        </text:list-item>
        <text:list-item>
          <text:p text:style-name="P9"><text:a xlink:type="simple" xlink:href="../../../../peresvet/docs/build/html/installation.html" text:style-name="Internet_20_link" text:visited-style-name="Visited_20_Internet_20_Link">Установка и запуск</text:a> </text:p>
        </text:list-item>
        <text:list-item>
          <text:p text:style-name="P9"><text:a xlink:type="simple" xlink:href="../../../../peresvet/docs/build/html/configurator/configurator.html" text:style-name="Internet_20_link" text:visited-style-name="Visited_20_Internet_20_Link">Конфигуратор модели</text:a> </text:p>
        </text:list-item>
        <text:list-item>
          <text:p text:style-name="P9"><text:a xlink:type="simple" xlink:href="#" text:style-name="Internet_20_link" text:visited-style-name="Visited_20_Internet_20_Link">Примеры работы с платформой</text:a></text:p>
          <text:list>
            <text:list-item>
              <text:p text:style-name="P9"><text:a xlink:type="simple" xlink:href="#id3" text:style-name="Internet_20_link" text:visited-style-name="Visited_20_Internet_20_Link">Простой пример с одним объектом</text:a></text:p>
              <text:list>
                <text:list-item>
                  <text:p text:style-name="P9"><text:a xlink:type="simple" xlink:href="#id4" text:style-name="Internet_20_link" text:visited-style-name="Visited_20_Internet_20_Link">1. Объект</text:a> </text:p>
                </text:list-item>
                <text:list-item>
                  <text:p text:style-name="P9"><text:a xlink:type="simple" xlink:href="#id5" text:style-name="Internet_20_link" text:visited-style-name="Visited_20_Internet_20_Link">2. Теги</text:a> </text:p>
                </text:list-item>
                <text:list-item>
                  <text:p text:style-name="P9"><text:a xlink:type="simple" xlink:href="#id6" text:style-name="Internet_20_link" text:visited-style-name="Visited_20_Internet_20_Link">3. Запись/чтение данных</text:a> </text:p>
                </text:list-item>
                <text:list-item>
                  <text:p text:style-name="P9"><text:a xlink:type="simple" xlink:href="#id7" text:style-name="Internet_20_link" text:visited-style-name="Visited_20_Internet_20_Link">4. Расчётный метод</text:a> </text:p>
                </text:list-item>
                <text:list-item>
                  <text:p text:style-name="P9"><text:a xlink:type="simple" xlink:href="#id8" text:style-name="Internet_20_link" text:visited-style-name="Visited_20_Internet_20_Link">5. Запуск расчётного метода</text:a> </text:p>
                </text:list-item>
                <text:list-item>
                  <text:p text:style-name="P9"><text:a xlink:type="simple" xlink:href="#id9" text:style-name="Internet_20_link" text:visited-style-name="Visited_20_Internet_20_Link">6. Проверим расчёт</text:a> </text:p>
                </text:list-item>
                <text:list-item>
                  <text:p text:style-name="P9"><text:a xlink:type="simple" xlink:href="#grafana" text:style-name="Internet_20_link" text:visited-style-name="Visited_20_Internet_20_Link">7. Отображение данных в Grafana</text:a> </text:p>
                </text:list-item>
              </text:list>
            </text:list-item>
          </text:list>
        </text:list-item>
        <text:list-item>
          <text:p text:style-name="P9"><text:a xlink:type="simple" xlink:href="../../../../peresvet/docs/build/html/grafana/grafana_integration.html" text:style-name="Internet_20_link" text:visited-style-name="Visited_20_Internet_20_Link">Создание экранов в Grafana</text:a> </text:p>
        </text:list-item>
        <text:list-item>
          <text:p text:style-name="P8"><text:a xlink:type="simple" xlink:href="../../../../peresvet/docs/build/html/api.html" text:style-name="Internet_20_link" text:visited-style-name="Visited_20_Internet_20_Link">API</text:a> </text:p>
        </text:list-item>
      </text:list>
      <text:p text:style-name="P10"><text:a xlink:type="simple" xlink:href="../../../../peresvet/docs/build/html/index.html" text:style-name="Internet_20_link" text:visited-style-name="Visited_20_Internet_20_Link">МПК Пересвет</text:a> </text:p>
      <text:list text:style-name="L2">
        <text:list-item>
          <text:p text:style-name="P11">Примеры </text:p>
        </text:list-item>
        <text:list-item>
          <text:p text:style-name="P12"><text:a xlink:type="simple" xlink:href="../../../../peresvet/docs/build/html/_sources/examples/examples.rst.txt" text:style-name="Internet_20_link" text:visited-style-name="Visited_20_Internet_20_Link">Просмотреть исходный код страницы</text:a> </text:p>
        </text:list-item>
      </text:list>
      <text:p text:style-name="Horizontal_20_Line"/>
      <text:h text:style-name="P1" text:outline-level="1"><text:bookmark text:name="id1"/>Примеры<text:a xlink:type="simple" xlink:href="#examples" text:style-name="Internet_20_link" text:visited-style-name="Visited_20_Internet_20_Link"></text:a></text:h>
      <text:p text:style-name="Text_20_body">Для демонстрации работы с платформой создан отдельный <text:a xlink:type="simple" xlink:href="https://github.com/Vovaman/peresvet_examples" text:style-name="Internet_20_link" text:visited-style-name="Visited_20_Internet_20_Link">проект</text:a>, пополняемый новыми примерами.</text:p>
      <text:p text:style-name="Text_20_body">Также в указанном проекте можно создавать новые задачи с запросами на новые примеры.</text:p>
      <text:p text:style-name="Text_20_body">Здесь рассмотрим самый простой пример.</text:p>
      <text:h text:style-name="Heading_20_2" text:outline-level="2">Простой пример с одним объектом<text:a xlink:type="simple" xlink:href="#id3" text:style-name="Internet_20_link" text:visited-style-name="Visited_20_Internet_20_Link"></text:a></text:h>
      <text:p text:style-name="Text_20_body">Для демонстрации работы с объектами, тегами, методами и экранами Grafana сделаем следующий пример.</text:p>
      <text:p text:style-name="Text_20_body">Допустим, у нас есть лампочка и мы можем тем или иным способом получить данные по току и напряжению (работу с коннекторами рассмотрим в следующих примерах).</text:p>
      <text:p text:style-name="Text_20_body"><text:soft-page-break/>Кроме тока и напряжения у лампочки есть третий, расчётный тег - мощность.</text:p>
      <text:p text:style-name="Text_20_body">При изменении силы тока или напряжения мощность должна перерасчитываться.</text:p>
      <text:h text:style-name="Heading_20_3" text:outline-level="3">1. Объект<text:a xlink:type="simple" xlink:href="#id4" text:style-name="Internet_20_link" text:visited-style-name="Visited_20_Internet_20_Link"></text:a></text:h>
      <text:p text:style-name="Text_20_body">Открываем конфигуратор, выбираем папку «Объекты» и нажимаем кнопку «Новый объект»:</text:p>
      <text:p text:style-name="Text_20_body"><draw:frame draw:style-name="fr1" draw:name="Изображение2" text:anchor-type="as-char" svg:width="32.094cm" svg:height="21.537cm" draw:z-index="1"><draw:image xlink:href="../../../../peresvet/docs/build/html/_images/01.start.png" xlink:type="simple" xlink:show="embed" xlink:actuate="onLoad" draw:mime-type="image/png"/><svg:title>../_images/01.start.png</svg:title></draw:frame><text:s/></text:p>
      <text:p text:style-name="Text_20_body">В появившемся окне свойств меняем имя объекта на «Лампочка»…</text:p>
      <text:p text:style-name="Text_20_body"><text:soft-page-break/><draw:frame draw:style-name="fr1" draw:name="Изображение3" text:anchor-type="as-char" svg:width="32.12cm" svg:height="21.564cm" draw:z-index="2"><draw:image xlink:href="../../../../peresvet/docs/build/html/_images/02.before_save.png" xlink:type="simple" xlink:show="embed" xlink:actuate="onLoad" draw:mime-type="image/png"/><svg:title>../_images/02.before_save.png</svg:title></draw:frame><text:s/></text:p>
      <text:p text:style-name="Text_20_body">…и, нажав кнопку «Записать», сохраняем изменения:</text:p>
      <text:p text:style-name="Text_20_body"><text:soft-page-break/><draw:frame draw:style-name="fr1" draw:name="Изображение4" text:anchor-type="as-char" svg:width="32.12cm" svg:height="21.564cm" draw:z-index="3"><draw:image xlink:href="../../../../peresvet/docs/build/html/_images/03.after_save.png" xlink:type="simple" xlink:show="embed" xlink:actuate="onLoad" draw:mime-type="image/png"/><svg:title>../_images/03.after_save.png</svg:title></draw:frame><text:s/></text:p>
      <text:h text:style-name="Heading_20_3" text:outline-level="3">2. Теги<text:a xlink:type="simple" xlink:href="#id5" text:style-name="Internet_20_link" text:visited-style-name="Visited_20_Internet_20_Link"></text:a></text:h>
      <text:p text:style-name="Text_20_body">Оставляя текущим объектом «Лампочку», нажимаем кнопку «Новый тег»:</text:p>
      <text:p text:style-name="Text_20_body"><text:soft-page-break/><draw:frame draw:style-name="fr1" draw:name="Изображение5" text:anchor-type="as-char" svg:width="32.12cm" svg:height="21.458cm" draw:z-index="4"><draw:image xlink:href="../../../../peresvet/docs/build/html/_images/04.new_tag.png" xlink:type="simple" xlink:show="embed" xlink:actuate="onLoad" draw:mime-type="image/png"/><svg:title>../_images/04.new_tag.png</svg:title></draw:frame><text:s/></text:p>
      <text:p text:style-name="Text_20_body">Меняем имя тега и единицы измерения…</text:p>
      <text:p text:style-name="Text_20_body"><text:soft-page-break/><draw:frame draw:style-name="fr1" draw:name="Изображение6" text:anchor-type="as-char" svg:width="32.12cm" svg:height="21.564cm" draw:z-index="5"><draw:image xlink:href="../../../../peresvet/docs/build/html/_images/05.tag_props.png" xlink:type="simple" xlink:show="embed" xlink:actuate="onLoad" draw:mime-type="image/png"/><svg:title>../_images/05.tag_props.png</svg:title></draw:frame><text:s/></text:p>
      <text:p text:style-name="Text_20_body">…и, нажав кнопку «Записать», сохраняем изменения:</text:p>
      <text:p text:style-name="Text_20_body"><text:soft-page-break/><draw:frame draw:style-name="fr1" draw:name="Изображение7" text:anchor-type="as-char" svg:width="32.12cm" svg:height="21.564cm" draw:z-index="6"><draw:image xlink:href="../../../../peresvet/docs/build/html/_images/06.tag_saved_props.png" xlink:type="simple" xlink:show="embed" xlink:actuate="onLoad" draw:mime-type="image/png"/><svg:title>../_images/06.tag_saved_props.png</svg:title></draw:frame><text:s/></text:p>
      <text:p text:style-name="Text_20_body">Аналогичным образом создаём ещё два тега, U и P:</text:p>
      <text:p text:style-name="Text_20_body"><text:soft-page-break/><draw:frame draw:style-name="fr1" draw:name="Изображение8" text:anchor-type="as-char" svg:width="32.12cm" svg:height="21.564cm" draw:z-index="7"><draw:image xlink:href="../../../../peresvet/docs/build/html/_images/07.IUP.png" xlink:type="simple" xlink:show="embed" xlink:actuate="onLoad" draw:mime-type="image/png"/><svg:title>../_images/07.IUP.png</svg:title></draw:frame><text:s/></text:p>
      <text:h text:style-name="Heading_20_3" text:outline-level="3">3. Запись/чтение данных<text:a xlink:type="simple" xlink:href="#id6" text:style-name="Internet_20_link" text:visited-style-name="Visited_20_Internet_20_Link"></text:a></text:h>
      <text:p text:style-name="Text_20_body">Проверим, что данные в теги записываются и читаются.</text:p>
      <text:p text:style-name="Text_20_body">Выберем тег «I» и откроем панель «Данные тега»:</text:p>
      <text:p text:style-name="Text_20_body"><text:soft-page-break/><draw:frame draw:style-name="fr1" draw:name="Изображение9" text:anchor-type="as-char" svg:width="32.12cm" svg:height="21.564cm" draw:z-index="8"><draw:image xlink:href="../../../../peresvet/docs/build/html/_images/08.open_read_save.png" xlink:type="simple" xlink:show="embed" xlink:actuate="onLoad" draw:mime-type="image/png"/><svg:title>../_images/08.open_read_save.png</svg:title></draw:frame><text:s/></text:p>
      <text:list text:style-name="L3">
        <text:list-item>
          <text:p text:style-name="P13">В поле «Значение» впишем 0.</text:p>
        </text:list-item>
        <text:list-item>
          <text:p text:style-name="P13">В поле «body» можно посмотреть сформированное тело запроса на запись.</text:p>
        </text:list-item>
      </text:list>
      <text:p text:style-name="Text_20_body"><text:soft-page-break/><draw:frame draw:style-name="fr1" draw:name="Изображение10" text:anchor-type="as-char" svg:width="32.12cm" svg:height="21.564cm" draw:z-index="9"><draw:image xlink:href="../../../../peresvet/docs/build/html/_images/09.set_data.png" xlink:type="simple" xlink:show="embed" xlink:actuate="onLoad" draw:mime-type="image/png"/><svg:title>../_images/09.set_data.png</svg:title></draw:frame><text:s/></text:p>
      <text:p text:style-name="Text_20_body">Нажимаем кнопку «Записать», затем «Получить данные».</text:p>
      <text:p text:style-name="Text_20_body">В таблице «Значение-время-качество» появится текущее значение тега «I»:</text:p>
      <text:p text:style-name="Text_20_body"><text:soft-page-break/><draw:frame draw:style-name="fr1" draw:name="Изображение11" text:anchor-type="as-char" svg:width="32.12cm" svg:height="21.564cm" draw:z-index="10"><draw:image xlink:href="../../../../peresvet/docs/build/html/_images/10.get_data.png" xlink:type="simple" xlink:show="embed" xlink:actuate="onLoad" draw:mime-type="image/png"/><svg:title>../_images/10.get_data.png</svg:title></draw:frame><text:s/></text:p>
      <text:h text:style-name="Heading_20_3" text:outline-level="3">4. Расчётный метод<text:a xlink:type="simple" xlink:href="#id7" text:style-name="Internet_20_link" text:visited-style-name="Visited_20_Internet_20_Link"></text:a></text:h>
      <text:p text:style-name="Text_20_body">Создадим метод для расчёта мощности лампочки.</text:p>
      <text:p text:style-name="Text_20_body">Для этого выберем тег «P» и нажмём кнопку «Новый метод»:</text:p>
      <text:p text:style-name="Text_20_body"><text:soft-page-break/><draw:frame draw:style-name="fr1" draw:name="Изображение12" text:anchor-type="as-char" svg:width="32.068cm" svg:height="21.484cm" draw:z-index="11"><draw:image xlink:href="../../../../peresvet/docs/build/html/_images/11.new_method.png" xlink:type="simple" xlink:show="embed" xlink:actuate="onLoad" draw:mime-type="image/png"/><svg:title>../_images/11.new_method.png</svg:title></draw:frame><text:s/></text:p>
      <text:p text:style-name="Text_20_body">Затем:</text:p>
      <text:list text:style-name="L4">
        <text:list-item>
          <text:p text:style-name="P14">Изменим имя метода</text:p>
        </text:list-item>
        <text:list-item>
          <text:p text:style-name="P14">В поле «Адрес» введём название метода, под которым он будет зарегистрирован в системе для вызовов. Запомним это имя - <text:span text:style-name="Source_20_Text">power</text:span>:</text:p>
          <text:p text:style-name="P15"><text:soft-page-break/><draw:frame draw:style-name="fr1" draw:name="Изображение13" text:anchor-type="as-char" svg:width="38.285cm" svg:height="21.696cm" draw:z-index="12"><draw:image xlink:href="../../../../peresvet/docs/build/html/_images/12.method_name_address.png" xlink:type="simple" xlink:show="embed" xlink:actuate="onLoad" draw:mime-type="image/png"/><svg:title>../_images/12.method_name_address.png</svg:title></draw:frame><text:s/></text:p>
        </text:list-item>
        <text:list-item>
          <text:p text:style-name="P14">Блок «Инициаторы». Очень важный блок, в котором мы выбираем, какие события могут инициировать выполнение расчётного метода.</text:p>
          <text:p text:style-name="P14">Здесь выберем оба предложенных тега: I и U, то есть изменения обоих этих тегов будут приводить к перерасчёту мощности.</text:p>
          <text:p text:style-name="P14">Внимание</text:p>
          <text:p text:style-name="P14">Обратите внимание, что в списке возможных инициаторов расчёта нет самого тега «P»: изменение тега не может приводить к перерасчёту его самого, так как это вызовет бесконечный цикл расчётов.</text:p>
          <text:p text:style-name="P15"><text:soft-page-break/><draw:frame draw:style-name="fr1" draw:name="Изображение14" text:anchor-type="as-char" svg:width="38.285cm" svg:height="21.696cm" draw:z-index="13"><draw:image xlink:href="../../../../peresvet/docs/build/html/_images/13.method_initiators.png" xlink:type="simple" xlink:show="embed" xlink:actuate="onLoad" draw:mime-type="image/png"/><svg:title>../_images/13.method_initiators.png</svg:title></draw:frame><text:s/></text:p>
        </text:list-item>
        <text:list-item>
          <text:p text:style-name="P14">Укажем, какие данные необходимо передать методу для расчёта.</text:p>
          <text:p text:style-name="P14">Данные, передаваемые в метод в каждом параметре - это результат запроса <text:a xlink:type="simple" xlink:href="../../../../peresvet/docs/build/html/data_api.html#tags_app_api_svc.data_get" text:style-name="Internet_20_link" text:visited-style-name="Visited_20_Internet_20_Link"><text:span text:style-name="Source_20_Text">получения данных</text:span></text:a>.</text:p>
          <text:p text:style-name="P14">Для расчёта мощности нужны текущие значения двух тегов: силы тока и напряжения. Поэтому создаём два параметра, дважды нажав на синюю кнопку с плюсом. Заполняем данные параметров как показано на картинке:</text:p>
          <text:p text:style-name="P14"><text:soft-page-break/><draw:frame draw:style-name="fr1" draw:name="Изображение15" text:anchor-type="as-char" svg:width="38.523cm" svg:height="23.045cm" draw:z-index="14"><draw:image xlink:href="../../../../peresvet/docs/build/html/_images/14.method_parameters.png" xlink:type="simple" xlink:show="embed" xlink:actuate="onLoad" draw:mime-type="image/png"/><svg:title>../_images/14.method_parameters.png</svg:title></draw:frame><text:s/></text:p>
          <text:p text:style-name="P14">Здесь мы указали, что в метод передаются два параметра: первым (индекс = 1) - сила тока.</text:p>
          <text:p text:style-name="P14">Вторым (индекс = 2) - напряжение.</text:p>
          <text:p text:style-name="P14">Поле «Конфигурация» заполняется автоматически после выбора тега в поле «Тег».</text:p>
          <text:p text:style-name="P14">Внимание</text:p>
          <text:p text:style-name="P14">После изучения документации на запрос <text:a xlink:type="simple" xlink:href="../../../../peresvet/docs/build/html/data_api.html#tags_app_api_svc.data_get" text:style-name="Internet_20_link" text:visited-style-name="Visited_20_Internet_20_Link"><text:span text:style-name="Source_20_Text">получения данных</text:span></text:a> можно вручную править <text:soft-page-break/>поле «Конфигурация», составляя сколь угодно сложные запросы получения данных. Поле «Конфигурация» можно расширять для удобства ввода текста.</text:p>
          <text:p text:style-name="P14"><draw:frame draw:style-name="fr1" draw:name="Изображение16" text:anchor-type="as-char" svg:width="30.639cm" svg:height="7.514cm" draw:z-index="15"><draw:image xlink:href="../../../../peresvet/docs/build/html/_images/15.extend_config.png" xlink:type="simple" xlink:show="embed" xlink:actuate="onLoad" draw:mime-type="image/png"/><svg:title>../_images/15.extend_config.png</svg:title></draw:frame><text:s/></text:p>
          <text:p text:style-name="P14">Внимание</text:p>
          <text:p text:style-name="P14">Очень важный момент, относящийся к расчётам значений тегов: тег мощности рассчитывается, когда изменяется значение тегов «I» и «U». Допустим, расчёт инициируется изменением тега «I» и метка времени нового значения «I» - «2024-10-27 10:00:00+03:00». В этом случае запрос данных в параметрах будет производиться также на метку времени «2024-10-27 10:00:00+03:00» и новое рассчитанное значение тега мощности также будет записано с этой меткой времени, не смотря на то, что сам расчёт, возможно, будет производиться в другое время.</text:p>
        </text:list-item>
        <text:list-item>
          <text:p text:style-name="P14">Нажимаем кнопку «Записать» для сохранения изменений:</text:p>
          <text:p text:style-name="P14"><text:soft-page-break/><draw:frame draw:style-name="fr1" draw:name="Изображение17" text:anchor-type="as-char" svg:width="38.523cm" svg:height="23.045cm" draw:z-index="16"><draw:image xlink:href="../../../../peresvet/docs/build/html/_images/16.save_method.png" xlink:type="simple" xlink:show="embed" xlink:actuate="onLoad" draw:mime-type="image/png"/><svg:title>../_images/16.save_method.png</svg:title></draw:frame><text:s/></text:p>
        </text:list-item>
      </text:list>
      <text:p text:style-name="Text_20_body">Теперь напишем код метода.</text:p>
      <text:p text:style-name="Text_20_body">В папке <text:span text:style-name="Source_20_Text">methods</text:span> проекта <text:a xlink:type="simple" xlink:href="https://github.com/Vovaman/peresvet" text:style-name="Internet_20_link" text:visited-style-name="Visited_20_Internet_20_Link">https://github.com/Vovaman/peresvet</text:a> уже написан метод для этого примера.</text:p>
      <text:p text:style-name="Text_20_body">Откроем файл <text:span text:style-name="Source_20_Text">methods/test_method.py</text:span> и рассмотрим метод <text:span text:style-name="Source_20_Text">calc_power</text:span>:</text:p>
      <text:p text:style-name="P2">@rpc("power")</text:p>
      <text:p text:style-name="P4">async def calc_power(I: dict, U: dict) -&gt; float:</text:p>
      <text:p text:style-name="P4"><text:soft-page-break/><text:s text:c="4"/>"""Метод возвращает произведение двух параметров.</text:p>
      <text:p text:style-name="Preformatted_20_Text"/>
      <text:p text:style-name="P4"><text:s text:c="4"/>"""</text:p>
      <text:p text:style-name="P4"><text:s text:c="4"/>print(f"I: {json.dumps(I, indent=4)}")</text:p>
      <text:p text:style-name="P4"><text:s text:c="4"/>print(f"U: {json.dumps(U, indent=4)}")</text:p>
      <text:p text:style-name="Preformatted_20_Text"/>
      <text:p text:style-name="P4"><text:s text:c="4"/>cur_I = I["data"][0]["data"][0][0]</text:p>
      <text:p text:style-name="P4"><text:s text:c="4"/>cur_U = U["data"][0]["data"][0][0]</text:p>
      <text:p text:style-name="Preformatted_20_Text"/>
      <text:p text:style-name="P4"><text:s text:c="4"/>if cur_I == None or cur_U == None:</text:p>
      <text:p text:style-name="P4"><text:s text:c="8"/>return 0</text:p>
      <text:p text:style-name="Preformatted_20_Text"/>
      <text:p text:style-name="P5"><text:s text:c="4"/>return cur_I * cur_U</text:p>
      <text:p text:style-name="Text_20_body">Внимание</text:p>
      <text:p text:style-name="Text_20_body">Первая строка: <text:span text:style-name="Source_20_Text">@rpc("power")</text:span>: именно «power» мы вводили в поле «Адрес» при создании метода!</text:p>
      <text:p text:style-name="Text_20_body">Далее - строка объявления метода: <text:span text:style-name="Source_20_Text">async def calc_power(I: dict, U: dict) -&gt; float:</text:span>. Первым параметром указана сила тока, вторым - напряжение. Точно так же, как мы указывали индексы у параметров.</text:p>
      <text:p text:style-name="Text_20_body">Далее метод просто для удобства выводит в консоль пришедшие данные, затем рассчитывает мощность как произведение двух параметров.</text:p>
      <text:h text:style-name="Heading_20_3" text:outline-level="3">5. Запуск расчётного метода<text:a xlink:type="simple" xlink:href="#id8" text:style-name="Internet_20_link" text:visited-style-name="Visited_20_Internet_20_Link"></text:a></text:h>
      <text:p text:style-name="Text_20_body">Для запуска метода необходимо установить пакеты, указанные в файле <text:span text:style-name="Source_20_Text">methods/requirements.txt</text:span> либо для всех пользователей:</text:p>
      <text:p text:style-name="P3">$ pip3 install -r requirements.txt</text:p>
      <text:p text:style-name="Text_20_body">Либо создав виртуальную среду проекта.</text:p>
      <text:p text:style-name="Text_20_body">После установки пакетов запускаем в терминале скрипт в папке <text:span text:style-name="Source_20_Text">methods</text:span>:</text:p>
      <text:p text:style-name="P3">$ python3 test_method.py</text:p>
      <text:p text:style-name="Text_20_body">Результат должен быть примерно таким:</text:p>
      <text:p text:style-name="Text_20_body"><text:soft-page-break/><draw:frame draw:style-name="fr1" draw:name="Изображение18" text:anchor-type="as-char" svg:width="25.744cm" svg:height="11.483cm" draw:z-index="17"><draw:image xlink:href="../../../../peresvet/docs/build/html/_images/17.run_method.png" xlink:type="simple" xlink:show="embed" xlink:actuate="onLoad" draw:mime-type="image/png"/><svg:title>../_images/17.run_method.png</svg:title></draw:frame><text:s/></text:p>
      <text:h text:style-name="Heading_20_3" text:outline-level="3">6. Проверим расчёт<text:a xlink:type="simple" xlink:href="#id9" text:style-name="Internet_20_link" text:visited-style-name="Visited_20_Internet_20_Link"></text:a></text:h>
      <text:p text:style-name="Text_20_body">Помним, что расчёт мощности инициируется изменениями значений тока и напряжения.</text:p>
      <text:p text:style-name="Text_20_body">Запишем в тег «U» значение 230.</text:p>
      <text:p text:style-name="Text_20_body">Для этого выберем в иерархии тег «U» и запишем в него требуемое значение:</text:p>
      <text:p text:style-name="Text_20_body"><text:soft-page-break/><draw:frame draw:style-name="fr1" draw:name="Изображение19" text:anchor-type="as-char" svg:width="38.523cm" svg:height="23.045cm" draw:z-index="18"><draw:image xlink:href="../../../../peresvet/docs/build/html/_images/18.set_u.png" xlink:type="simple" xlink:show="embed" xlink:actuate="onLoad" draw:mime-type="image/png"/><svg:title>../_images/18.set_u.png</svg:title></draw:frame><text:s/></text:p>
      <text:p text:style-name="Text_20_body">В консоли, в которой мы запустили метод, появится вывод:</text:p>
      <text:p text:style-name="Text_20_body"><text:soft-page-break/><draw:frame draw:style-name="fr1" draw:name="Изображение20" text:anchor-type="as-char" svg:width="33.84cm" svg:height="23.495cm" draw:z-index="19"><draw:image xlink:href="../../../../peresvet/docs/build/html/_images/19.print_calc.png" xlink:type="simple" xlink:show="embed" xlink:actuate="onLoad" draw:mime-type="image/png"/><svg:title>../_images/19.print_calc.png</svg:title></draw:frame><text:s/></text:p>
      <text:p text:style-name="Text_20_body">Проверим значение тега мощности «P». Оно должно быть равно 0, так как перед этим в тег «I» мы записали 0:</text:p>
      <text:p text:style-name="Text_20_body"><text:soft-page-break/><draw:frame draw:style-name="fr1" draw:name="Изображение21" text:anchor-type="as-char" svg:width="38.523cm" svg:height="23.045cm" draw:z-index="20"><draw:image xlink:href="../../../../peresvet/docs/build/html/_images/20.P_is_0.png" xlink:type="simple" xlink:show="embed" xlink:actuate="onLoad" draw:mime-type="image/png"/><svg:title>../_images/20.P_is_0.png</svg:title></draw:frame><text:s/></text:p>
      <text:p text:style-name="Text_20_body">Теперь запишем в тег «I» значение 1:</text:p>
      <text:p text:style-name="Text_20_body"><text:soft-page-break/><draw:frame draw:style-name="fr1" draw:name="Изображение22" text:anchor-type="as-char" svg:width="38.523cm" svg:height="23.045cm" draw:z-index="21"><draw:image xlink:href="../../../../peresvet/docs/build/html/_images/21.I_is_1.png" xlink:type="simple" xlink:show="embed" xlink:actuate="onLoad" draw:mime-type="image/png"/><svg:title>../_images/21.I_is_1.png</svg:title></draw:frame><text:s/></text:p>
      <text:p text:style-name="Text_20_body">И проверим значение мощности, которое должно быть равно 230 Вт:</text:p>
      <text:p text:style-name="Text_20_body"><text:soft-page-break/><draw:frame draw:style-name="fr1" draw:name="Изображение23" text:anchor-type="as-char" svg:width="38.523cm" svg:height="23.045cm" draw:z-index="22"><draw:image xlink:href="../../../../peresvet/docs/build/html/_images/22.P_is_230.png" xlink:type="simple" xlink:show="embed" xlink:actuate="onLoad" draw:mime-type="image/png"/><svg:title>../_images/22.P_is_230.png</svg:title></draw:frame><text:s/></text:p>
      <text:p text:style-name="Text_20_body">Примечание</text:p>
      <text:p text:style-name="Text_20_body">В следующих примерах будет показано, как настроить получение данных в теги из внешних источников.</text:p>
      <text:h text:style-name="Heading_20_3" text:outline-level="3">7. Отображение данных в Grafana<text:a xlink:type="simple" xlink:href="#grafana" text:style-name="Internet_20_link" text:visited-style-name="Visited_20_Internet_20_Link"></text:a></text:h>
      <text:p text:style-name="Text_20_body">Примечание</text:p>
      <text:p text:style-name="Text_20_body"><text:soft-page-break/>Данные из платформы можно получать <text:a xlink:type="simple" xlink:href="../../../../peresvet/docs/build/html/data_api.html#tags_app_api_svc.data_get" text:style-name="Internet_20_link" text:visited-style-name="Visited_20_Internet_20_Link"><text:span text:style-name="Source_20_Text">описанным в документации запросом</text:span></text:a>.</text:p>
      <text:p text:style-name="Text_20_body">Данные тегов (как, впрочем, и всё общение с платформой) приходят в виде json и для манипулирования этими данными в Grafan’е рекомендуется изучить языки манипулирования json-данными <text:a xlink:type="simple" xlink:href="https://docs.jsonata.org/overview.html" text:style-name="Internet_20_link" text:visited-style-name="Visited_20_Internet_20_Link">JSONata</text:a> или <text:a xlink:type="simple" xlink:href="https://jsonpath.com/" text:style-name="Internet_20_link" text:visited-style-name="Visited_20_Internet_20_Link">JSONPath</text:a>.</text:p>
      <text:p text:style-name="Text_20_body">Предпочтительнее JSONata, так как обладает большими возможностями.</text:p>
      <text:p text:style-name="Text_20_body">Настроим отображение:</text:p>
      <text:list text:style-name="L5">
        <text:list-item>
          <text:p text:style-name="P16">текущих значений тегов «I», «U» и «P»;</text:p>
        </text:list-item>
        <text:list-item>
          <text:p text:style-name="P16">трендов значений этих тегов;</text:p>
        </text:list-item>
      </text:list>
      <text:list text:style-name="L6">
        <text:list-item>
          <text:p text:style-name="P17">Создадим новую доску данных.</text:p>
          <text:p text:style-name="P17">Для этого заходим в меню «Home –&gt; Dashboards» и нажимаем кнопку «New»</text:p>
          <text:p text:style-name="P17"><text:soft-page-break/><draw:frame draw:style-name="fr1" draw:name="Изображение24" text:anchor-type="as-char" svg:width="31.38cm" svg:height="21.775cm" draw:z-index="23"><draw:image xlink:href="../../../../peresvet/docs/build/html/_images/23.new_dashboard.png" xlink:type="simple" xlink:show="embed" xlink:actuate="onLoad" draw:mime-type="image/png"/><svg:title>../_images/23.new_dashboard.png</svg:title></draw:frame><text:s/></text:p>
          <text:p text:style-name="P17">Выбрав в выпадающем меню команду «New dashboard», попадаем на экран создания новой панели:</text:p>
          <text:p text:style-name="P17"><text:soft-page-break/><draw:frame draw:style-name="fr1" draw:name="Изображение25" text:anchor-type="as-char" svg:width="31.38cm" svg:height="21.775cm" draw:z-index="24"><draw:image xlink:href="../../../../peresvet/docs/build/html/_images/24.new_panel.png" xlink:type="simple" xlink:show="embed" xlink:actuate="onLoad" draw:mime-type="image/png"/><svg:title>../_images/24.new_panel.png</svg:title></draw:frame><text:s/></text:p>
          <text:p text:style-name="P17">…и выбираем источник данных «peresvet»:</text:p>
          <text:p text:style-name="P18"><text:soft-page-break/><draw:frame draw:style-name="fr1" draw:name="Изображение26" text:anchor-type="as-char" svg:width="33.867cm" svg:height="18.521cm" draw:z-index="25"><draw:image xlink:href="../../../../peresvet/docs/build/html/_images/25.ds.png" xlink:type="simple" xlink:show="embed" xlink:actuate="onLoad" draw:mime-type="image/png"/><svg:title>../_images/25.ds.png</svg:title></draw:frame><text:s/></text:p>
        </text:list-item>
        <text:list-item>
          <text:p text:style-name="P17">В появившемся окне настройки панели выберем тип панели «Stat».</text:p>
          <text:p text:style-name="P18"><text:soft-page-break/><draw:frame draw:style-name="fr1" draw:name="Изображение27" text:anchor-type="as-char" svg:width="41.169cm" svg:height="25.003cm" draw:z-index="26"><draw:image xlink:href="../../../../peresvet/docs/build/html/_images/26.stat.png" xlink:type="simple" xlink:show="embed" xlink:actuate="onLoad" draw:mime-type="image/png"/><svg:title>../_images/26.stat.png</svg:title></draw:frame><text:s/></text:p>
        </text:list-item>
        <text:list-item>
          <text:p text:style-name="P17">Настроим путь для получения данных, вписав <text:span text:style-name="Source_20_Text">/data/</text:span> на закладке <text:span text:style-name="Source_20_Text">Path</text:span>.</text:p>
          <text:p text:style-name="P17">Примечание</text:p>
          <text:p text:style-name="P17">По умолчанию в источнике данных «peresvet» настроен путь к платформе: <text:soft-page-break/><text:span text:style-name="Source_20_Text">http://&lt;server&gt;/v1/</text:span>. Добавляя к этому пути расширения <text:span text:style-name="Source_20_Text">data</text:span>, <text:span text:style-name="Source_20_Text">objects</text:span>, <text:span text:style-name="Source_20_Text">tags</text:span> и т.д., мы получаем возможность работать не только с данными, но и вообще со всеми сущностями платформы.</text:p>
          <text:p text:style-name="P18"><draw:frame draw:style-name="fr1" draw:name="Изображение28" text:anchor-type="as-char" svg:width="41.169cm" svg:height="25.003cm" draw:z-index="27"><draw:image xlink:href="../../../../peresvet/docs/build/html/_images/27.path.png" xlink:type="simple" xlink:show="embed" xlink:actuate="onLoad" draw:mime-type="image/png"/><svg:title>../_images/27.path.png</svg:title></draw:frame><text:s/></text:p>
        </text:list-item>
        <text:list-item>
          <text:p text:style-name="P17">Настроим запросы получения данных.</text:p>
          <text:p text:style-name="P17"><text:soft-page-break/>Для того, чтобы не писать запрос вручную, его можно скопировать из конфигуратора.</text:p>
          <text:p text:style-name="P17">Открываем конфигуратор, выбираем тег «I» и копируем запрос получения текущего значения тега.</text:p>
          <text:p text:style-name="P17"><draw:frame draw:style-name="fr1" draw:name="Изображение29" text:anchor-type="as-char" svg:width="41.169cm" svg:height="25.003cm" draw:z-index="28"><draw:image xlink:href="../../../../peresvet/docs/build/html/_images/28.q.png" xlink:type="simple" xlink:show="embed" xlink:actuate="onLoad" draw:mime-type="image/png"/><svg:title>../_images/28.q.png</svg:title></draw:frame><text:s/></text:p>
          <text:p text:style-name="P17"><text:soft-page-break/>В окне настройки панели выбираем закладку «Params» и добавляем новый ключ «q». Значение ключа - скопированный нами запрос:</text:p>
          <text:p text:style-name="P17"><draw:frame draw:style-name="fr1" draw:name="Изображение30" text:anchor-type="as-char" svg:width="41.169cm" svg:height="25.003cm" draw:z-index="29"><draw:image xlink:href="../../../../peresvet/docs/build/html/_images/29.params.png" xlink:type="simple" xlink:show="embed" xlink:actuate="onLoad" draw:mime-type="image/png"/><svg:title>../_images/29.params.png</svg:title></draw:frame><text:s/></text:p>
          <text:p text:style-name="P17">Далее:<text:a xlink:type="simple" xlink:href="#id10" text:style-name="Internet_20_link" text:visited-style-name="Visited_20_Internet_20_Link"></text:a></text:p>
          <text:list>
            <text:list-item>
              <text:p text:style-name="P17"><text:soft-page-break/>Переходим на закладку «Fields»;</text:p>
            </text:list-item>
            <text:list-item>
              <text:p text:style-name="P17">Меняем имя очереди на «I»;</text:p>
            </text:list-item>
            <text:list-item>
              <text:p text:style-name="P17">Вводим выражение на языке JSONPath, разбирающее ответ от платформы с текущим значением тега</text:p>
            </text:list-item>
            <text:list-item>
              <text:p text:style-name="P17">На экране появится «1» - текущее, введённое нами на предыдущих шагах значение тока.</text:p>
            </text:list-item>
          </text:list>
          <text:p text:style-name="P17"><text:soft-page-break/><draw:frame draw:style-name="fr1" draw:name="Изображение31" text:anchor-type="as-char" svg:width="41.169cm" svg:height="25.003cm" draw:z-index="30"><draw:image xlink:href="../../../../peresvet/docs/build/html/_images/30.data.png" xlink:type="simple" xlink:show="embed" xlink:actuate="onLoad" draw:mime-type="image/png"/><svg:title>../_images/30.data.png</svg:title></draw:frame><text:s/></text:p>
          <text:p text:style-name="P17">Повторим предыдущие шаги для оставшихся двух тегов напряжения и мощности, добавляя новые запросы нажатием кнопки «Add query»:</text:p>
          <text:p text:style-name="P17"><text:soft-page-break/><draw:frame draw:style-name="fr1" draw:name="Изображение32" text:anchor-type="as-char" svg:width="41.169cm" svg:height="25.003cm" draw:z-index="31"><draw:image xlink:href="../../../../peresvet/docs/build/html/_images/31.add_query.png" xlink:type="simple" xlink:show="embed" xlink:actuate="onLoad" draw:mime-type="image/png"/><svg:title>../_images/31.add_query.png</svg:title></draw:frame><text:s/></text:p>
          <text:p text:style-name="P17">Предупреждение</text:p>
          <text:p text:style-name="P17">У каждого поля отменим кэширование данных:</text:p>
          <text:p text:style-name="P18"><text:soft-page-break/><draw:frame draw:style-name="fr1" draw:name="Изображение33" text:anchor-type="as-char" svg:width="50.8cm" svg:height="27.781cm" draw:z-index="32"><draw:image xlink:href="../../../../peresvet/docs/build/html/_images/39.cache.png" xlink:type="simple" xlink:show="embed" xlink:actuate="onLoad" draw:mime-type="image/png"/><svg:title>../_images/39.cache.png</svg:title></draw:frame><text:s/></text:p>
        </text:list-item>
        <text:list-item>
          <text:p text:style-name="P17"><text:soft-page-break/>Окончательная настройка панели.</text:p>
          <text:p text:style-name="P17">После настройки данных значения напряжения и мощности отображаются красным цветом. Так выставлены настройки по умолчанию.</text:p>
          <text:list>
            <text:list-item>
              <text:p text:style-name="P17">Чтобы все значения отражались зелёным цветом, уберём порог значения «80»;</text:p>
              <text:p text:style-name="P18"><text:soft-page-break/><draw:frame draw:style-name="fr1" draw:name="Изображение34" text:anchor-type="as-char" svg:width="41.169cm" svg:height="25.003cm" draw:z-index="33"><draw:image xlink:href="../../../../peresvet/docs/build/html/_images/32.remove_threshold.png" xlink:type="simple" xlink:show="embed" xlink:actuate="onLoad" draw:mime-type="image/png"/><svg:title>../_images/32.remove_threshold.png</svg:title></draw:frame><text:s/></text:p>
            </text:list-item>
            <text:list-item>
              <text:p text:style-name="P17">Переименуем панель и нажмем кнопку «Save»:</text:p>
              <text:p text:style-name="P17"><text:soft-page-break/><draw:frame draw:style-name="fr1" draw:name="Изображение35" text:anchor-type="as-char" svg:width="41.169cm" svg:height="25.003cm" draw:z-index="34"><draw:image xlink:href="../../../../peresvet/docs/build/html/_images/33.save.png" xlink:type="simple" xlink:show="embed" xlink:actuate="onLoad" draw:mime-type="image/png"/><svg:title>../_images/33.save.png</svg:title></draw:frame><text:s/></text:p>
              <text:p text:style-name="P17">Появится окно, в котором нужно задать имя доски данных.</text:p>
            </text:list-item>
          </text:list>
          <text:p text:style-name="P17">Предупреждение</text:p>
          <text:p text:style-name="P17">Чтобы на панели рядом с именем тега не отображался 0, введите в поля <text:span text:style-name="Source_20_Text">Alias</text:span> пробел:</text:p>
          <text:p text:style-name="P18"><text:soft-page-break/><draw:frame draw:style-name="fr1" draw:name="Изображение36" text:anchor-type="as-char" svg:width="13.07cm" svg:height="3.387cm" draw:z-index="35"><draw:image xlink:href="../../../../peresvet/docs/build/html/_images/35.space.png" xlink:type="simple" xlink:show="embed" xlink:actuate="onLoad" draw:mime-type="image/png"/><svg:title>../_images/35.space.png</svg:title></draw:frame><text:s/></text:p>
        </text:list-item>
        <text:list-item>
          <text:p text:style-name="P17">Выровняем новую панель на экране и создадим новую панель, с трендом, для чего выберем команду «Add –&gt; Visualization»:</text:p>
          <text:p text:style-name="P18"><text:soft-page-break/><draw:frame draw:style-name="fr1" draw:name="Изображение37" text:anchor-type="as-char" svg:width="41.169cm" svg:height="25.003cm" draw:z-index="36"><draw:image xlink:href="../../../../peresvet/docs/build/html/_images/34.trend.png" xlink:type="simple" xlink:show="embed" xlink:actuate="onLoad" draw:mime-type="image/png"/><svg:title>../_images/34.trend.png</svg:title></draw:frame><text:s/></text:p>
        </text:list-item>
        <text:list-item>
          <text:p text:style-name="P17">Настройка панели с трендом.</text:p>
          <text:p text:style-name="P17">Тип панели оставим по умолчанию - «Time series».</text:p>
          <text:p text:style-name="P17">Получение данных настроим похоже предыдущей панели, за исключением того, что ключ <text:soft-page-break/>запроса «q» будет включать функции Grafan’ы <text:span text:style-name="Source_20_Text">$__isoFrom()</text:span> и <text:span text:style-name="Source_20_Text">$__isoTo()</text:span>, обозначающие начало и конец запрашиваемого временного периода:</text:p>
          <text:p text:style-name="P17"><text:span text:style-name="Source_20_Text">q={"tagId":"2d95d0a6-28c7-103f-9c49-d763ac5895e8","format":true,"start":"$__isoFrom()","finish":"$__isoTo()"}</text:span>.</text:p>
          <text:p text:style-name="P17">Закладки «Fields» у всех трёх запросов должны быть такого вида:</text:p>
          <text:p text:style-name="P18"><text:soft-page-break/><draw:frame draw:style-name="fr1" draw:name="Изображение38" text:anchor-type="as-char" svg:width="41.169cm" svg:height="25.003cm" draw:z-index="37"><draw:image xlink:href="../../../../peresvet/docs/build/html/_images/36.trend_fields.png" xlink:type="simple" xlink:show="embed" xlink:actuate="onLoad" draw:mime-type="image/png"/><svg:title>../_images/36.trend_fields.png</svg:title></draw:frame><text:s/></text:p>
        </text:list-item>
        <text:list-item>
          <text:p text:style-name="P17">Выбор временных периодов.</text:p>
          <text:p text:style-name="P17">Настроив панель с трендом для отображения трёх тегов, приведём доску данных приблизительно к такому виду и выберем диапазон времени для отображения на экране, а также периодичность обновления данных:</text:p>
          <text:p text:style-name="P18"><text:soft-page-break/><draw:frame draw:style-name="fr1" draw:name="Изображение39" text:anchor-type="as-char" svg:width="26.776cm" svg:height="20.902cm" draw:z-index="38"><draw:image xlink:href="../../../../peresvet/docs/build/html/_images/37.periods.png" xlink:type="simple" xlink:show="embed" xlink:actuate="onLoad" draw:mime-type="image/png"/><svg:title>../_images/37.periods.png</svg:title></draw:frame><text:s/></text:p>
        </text:list-item>
        <text:list-item>
          <text:p text:style-name="P17">Проверим работу модели. Для чего записываем новые значения в теги «I» и «U» и наблюдаем изменение данных на панели с электрическими параметрами:</text:p>
          <text:p text:style-name="P17"><text:soft-page-break/><draw:frame draw:style-name="fr1" draw:name="Изображение40" text:anchor-type="as-char" svg:width="49.662cm" svg:height="20.876cm" draw:z-index="39"><draw:image xlink:href="../../../../peresvet/docs/build/html/_images/38.check.png" xlink:type="simple" xlink:show="embed" xlink:actuate="onLoad" draw:mime-type="image/png"/><svg:title>../_images/38.check.png</svg:title></draw:frame><text:s/></text:p>
        </text:list-item>
      </text:list>
      <text:p text:style-name="P7"><text:a xlink:type="simple" xlink:href="../../../../peresvet/docs/build/html/configurator/configurator.html" text:style-name="Internet_20_link" text:visited-style-name="Visited_20_Internet_20_Link">Предыдущая</text:a> <text:a xlink:type="simple" xlink:href="../../../../peresvet/docs/build/html/grafana/grafana_integration.html" text:style-name="Internet_20_link" text:visited-style-name="Visited_20_Internet_20_Link">Следующая </text:a></text:p>
      <text:p text:style-name="Horizontal_20_Line"/>
      <text:p text:style-name="Text_20_body">© Авторские права 2025, ООО Матч Поинт Консалтинг. </text:p>
      <text:p text:style-name="P7">Собрано при помощи <text:a xlink:type="simple" xlink:href="https://www.sphinx-doc.org/" text:style-name="Internet_20_link" text:visited-style-name="Visited_20_Internet_20_Link">Sphinx</text:a> с использованием <text:a xlink:type="simple" xlink:href="https://github.com/readthedocs/sphinx_rtd_theme" text:style-name="Internet_20_link" text:visited-style-name="Visited_20_Internet_20_Link">темы,</text:a> предоставленной <text:a xlink:type="simple" xlink:href="https://readthedocs.org/" text:style-name="Internet_20_link" text:visited-style-name="Visited_20_Internet_20_Link">Read the Docs</text:a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2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25%"/>
      <style:text-properties style:font-name="courier new" fo:font-family="'courier new', monospace" fo:font-size="10pt" style:font-name-asian="courier new" style:font-family-asian="'courier new', monospace" style:font-size-asian="10pt" style:font-name-complex="courier new" style:font-family-complex="'courier new', monospac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>
      <style:text-properties fo:font-style="italic" style:font-style-asian="italic" style:font-style-complex="italic"/>
    </style:style>
    <style:style style:name="ins" style:family="text">
      <style:text-properties fo:color="#000000" loext:opacity="100%" style:text-line-through-style="none" style:text-line-through-type="none" style:text-underline-style="none" style:text-blinking="false" fo:background-color="#ffff99" style:text-overline-style="none" style:text-overline-color="font-color"/>
    </style:style>
    <style:style style:name="Source_20_Text" style:display-name="Source Text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Example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q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имеры — документация МПК Пересвет 0.4</dc:title>
    <meta:document-statistic meta:table-count="0" meta:image-count="40" meta:object-count="0" meta:page-count="45" meta:paragraph-count="191" meta:word-count="1332" meta:character-count="9218" meta:non-whitespace-character-count="7986"/>
    <meta:generator>LibreOffice/24.2.7.2$Linux_X86_64 LibreOffice_project/420$Build-2</meta:generator>
    <meta:user-defined meta:name=""/>
    <meta:user-defined meta:name="viewport">width=device-width, initial-scale=1.0</meta:user-defined>
  </office:meta>
</office:document-meta>
</file>