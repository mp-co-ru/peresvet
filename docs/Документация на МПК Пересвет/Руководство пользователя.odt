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BE0000032FCBB7F498.png" manifest:media-type="image/png"/>
  <manifest:file-entry manifest:full-path="Pictures/10000001000003FE0000015AE3AA8DB3.png" manifest:media-type="image/png"/>
  <manifest:file-entry manifest:full-path="Pictures/10000001000003FE000001AD2240C8E0.png" manifest:media-type="image/png"/>
  <manifest:file-entry manifest:full-path="Pictures/1000000100000328000001D2160D4966.png" manifest:media-type="image/png"/>
  <manifest:file-entry manifest:full-path="Pictures/1000000100000328000001D2544FF5C0.png" manifest:media-type="image/png"/>
  <manifest:file-entry manifest:full-path="Pictures/1000000100000328000001ECB3300B21.png" manifest:media-type="image/png"/>
  <manifest:file-entry manifest:full-path="Pictures/1000000000000328000001D23E5C910E.png" manifest:media-type="image/png"/>
  <manifest:file-entry manifest:full-path="Pictures/1000000100000328000001D24BFE3490.png" manifest:media-type="image/png"/>
  <manifest:file-entry manifest:full-path="Pictures/1000000100000328000001D2B42D9FCE.png" manifest:media-type="image/png"/>
  <manifest:file-entry manifest:full-path="Pictures/1000000100000328000001D21BA0D1EA.png" manifest:media-type="image/png"/>
  <manifest:file-entry manifest:full-path="Pictures/1000000100000328000001D254657DA7.png" manifest:media-type="image/png"/>
  <manifest:file-entry manifest:full-path="Pictures/1000000100000328000001D2DF50CC0B.png" manifest:media-type="image/png"/>
  <manifest:file-entry manifest:full-path="Pictures/1000000100000328000001EC25E0DB1E.png" manifest:media-type="image/png"/>
  <manifest:file-entry manifest:full-path="Pictures/1000000100000328000001D209AF7705.png" manifest:media-type="image/png"/>
  <manifest:file-entry manifest:full-path="Pictures/1000000100000328000001D69BFDE014.png" manifest:media-type="image/png"/>
  <manifest:file-entry manifest:full-path="Pictures/1000000100000328000001D2D7953EBD.png" manifest:media-type="image/png"/>
  <manifest:file-entry manifest:full-path="Pictures/1000000100000064000000646E675ECB.png" manifest:media-type="image/png"/>
  <manifest:file-entry manifest:full-path="Pictures/10000001000003FE000001AB16AF5DBC.png" manifest:media-type="image/png"/>
  <manifest:file-entry manifest:full-path="Pictures/10000001000003FE000001ABD50B13F3.png" manifest:media-type="image/png"/>
  <manifest:file-entry manifest:full-path="Pictures/1000000100000328000001D29C343D5D.png" manifest:media-type="image/png"/>
  <manifest:file-entry manifest:full-path="Pictures/100000010000030D000001D2D8583E0B.png" manifest:media-type="image/png"/>
  <manifest:file-entry manifest:full-path="Pictures/1000000100000328000001D247A8DEC2.png" manifest:media-type="image/png"/>
  <manifest:file-entry manifest:full-path="Pictures/1000000100000328000001EC8957E616.png" manifest:media-type="image/png"/>
  <manifest:file-entry manifest:full-path="Pictures/10000001000003FE000001340502AB11.png" manifest:media-type="image/png"/>
  <manifest:file-entry manifest:full-path="Pictures/10000001000003D0000002BC46FD0A63.png" manifest:media-type="image/png"/>
  <manifest:file-entry manifest:full-path="Pictures/1000000100000328000001F009EC30A1.png" manifest:media-type="image/png"/>
  <manifest:file-entry manifest:full-path="Pictures/1000000100000328000001D2A9D6B970.png" manifest:media-type="image/png"/>
  <manifest:file-entry manifest:full-path="Pictures/1000000100000328000001F0AC713E13.png" manifest:media-type="image/png"/>
  <manifest:file-entry manifest:full-path="Pictures/1000000000000328000001EC89AB257F.png" manifest:media-type="image/png"/>
  <manifest:file-entry manifest:full-path="Pictures/1000000000000328000001D2A52CCC1F.png" manifest:media-type="image/png"/>
  <manifest:file-entry manifest:full-path="Pictures/10000001000003FE0000015A8AB2332C.png" manifest:media-type="image/png"/>
  <manifest:file-entry manifest:full-path="Pictures/1000000100000328000001EC4A26F9A0.png" manifest:media-type="image/png"/>
  <manifest:file-entry manifest:full-path="Pictures/1000000100000412000002150B33B12B.png" manifest:media-type="image/png"/>
  <manifest:file-entry manifest:full-path="Pictures/1000000100000328000001EC0C4671AE.png" manifest:media-type="image/png"/>
  <manifest:file-entry manifest:full-path="Pictures/1000000000000328000001D2C7CC8A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Обычный" style:font-family-generic="swiss" style:font-pitch="variable"/>
    <style:font-face style:name="Courier New" svg:font-family="'Courier New'" style:font-adornments="Обычный" style:font-family-generic="modern" style:font-pitch="fixed"/>
    <style:font-face style:name="CyrillicOld" svg:font-family="CyrillicOld" style:font-adornments="Жирный"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Mono-Regular" svg:font-family="SFMono-Regular, Menlo, Monaco, Consolas, 'Liberation Mono', 'Courier New', Courier, monospace"/>
    <style:font-face style:name="Times New Roman" svg:font-family="'Times New Roman'" style:font-adornments="Обычный" style:font-family-generic="roman" style:font-pitch="variable"/>
    <style:font-face style:name="courier new" svg:font-family="'courier new', monospace"/>
  </office:font-face-decls>
  <office:automatic-styles>
    <style:style style:name="Таблица1" style:family="table">
      <style:table-properties style:width="17cm" table:align="margins"/>
    </style:style>
    <style:style style:name="Таблица1.A" style:family="table-column">
      <style:table-column-properties style:column-width="5.807cm" style:rel-column-width="22384*"/>
    </style:style>
    <style:style style:name="Таблица1.B" style:family="table-column">
      <style:table-column-properties style:column-width="11.194cm" style:rel-column-width="43151*"/>
    </style:style>
    <style:style style:name="Таблица1.A1" style:family="table-cell">
      <style:table-cell-properties fo:background-color="#dddddd" fo:padding="0.097cm" fo:border-left="1.5pt solid #000000" fo:border-right="none" fo:border-top="1.5pt solid #000000" fo:border-bottom="1.5pt solid #000000">
        <style:background-image/>
      </style:table-cell-properties>
    </style:style>
    <style:style style:name="Таблица1.B1" style:family="table-cell">
      <style:table-cell-properties fo:background-color="#dddddd" fo:padding="0.097cm" fo:border-left="0.5pt solid #000000" fo:border-right="1.5pt solid #000000" fo:border-top="1.5pt solid #000000" fo:border-bottom="1.5pt solid #000000">
        <style:background-image/>
      </style:table-cell-properties>
    </style:style>
    <style:style style:name="Таблица1.A2" style:family="table-cell">
      <style:table-cell-properties fo:padding="0.097cm" fo:border-left="1.5pt solid #000000" fo:border-right="none" fo:border-top="none" fo:border-bottom="none"/>
    </style:style>
    <style:style style:name="Таблица1.B2" style:family="table-cell">
      <style:table-cell-properties fo:padding="0.097cm" fo:border-left="0.5pt solid #000000" fo:border-right="1.5pt solid #000000" fo:border-top="none" fo:border-bottom="none"/>
    </style:style>
    <style:style style:name="Таблица1.A3" style:family="table-cell">
      <style:table-cell-properties fo:background-color="#eeeeee" fo:padding="0.097cm" fo:border-left="1.5pt solid #000000" fo:border-right="none" fo:border-top="none" fo:border-bottom="none">
        <style:background-image/>
      </style:table-cell-properties>
    </style:style>
    <style:style style:name="Таблица1.B3" style:family="table-cell">
      <style:table-cell-properties fo:background-color="#eeeeee" fo:padding="0.097cm" fo:border-left="0.5pt solid #000000" fo:border-right="1.5pt solid #000000" fo:border-top="none" fo:border-bottom="none">
        <style:background-image/>
      </style:table-cell-properties>
    </style:style>
    <style:style style:name="Таблица1.A4" style:family="table-cell">
      <style:table-cell-properties fo:padding="0.097cm" fo:border-left="1.5pt solid #000000" fo:border-right="none" fo:border-top="none" fo:border-bottom="none"/>
    </style:style>
    <style:style style:name="Таблица1.B4" style:family="table-cell">
      <style:table-cell-properties fo:padding="0.097cm" fo:border-left="0.5pt solid #000000" fo:border-right="1.5pt solid #000000" fo:border-top="none" fo:border-bottom="none"/>
    </style:style>
    <style:style style:name="Таблица1.A6" style:family="table-cell">
      <style:table-cell-properties fo:padding="0.097cm" fo:border-left="1.5pt solid #000000" fo:border-right="none" fo:border-top="none" fo:border-bottom="none"/>
    </style:style>
    <style:style style:name="Таблица1.B6" style:family="table-cell">
      <style:table-cell-properties fo:padding="0.097cm" fo:border-left="0.5pt solid #000000" fo:border-right="1.5pt solid #000000" fo:border-top="none" fo:border-bottom="none"/>
    </style:style>
    <style:style style:name="Таблица1.A8" style:family="table-cell">
      <style:table-cell-properties fo:background-color="transparent" fo:padding="0.097cm" fo:border-left="1.5pt solid #000000" fo:border-right="none" fo:border-top="none" fo:border-bottom="none">
        <style:background-image/>
      </style:table-cell-properties>
    </style:style>
    <style:style style:name="Таблица1.B8" style:family="table-cell">
      <style:table-cell-properties fo:background-color="transparent" fo:padding="0.097cm" fo:border-left="0.5pt solid #000000" fo:border-right="1.5pt solid #000000" fo:border-top="none" fo:border-bottom="none">
        <style:background-image/>
      </style:table-cell-properties>
    </style:style>
    <style:style style:name="Таблица1.A13" style:family="table-cell">
      <style:table-cell-properties fo:background-color="#eeeeee" fo:padding="0.097cm" fo:border-left="1.5pt solid #000000" fo:border-right="none" fo:border-top="none" fo:border-bottom="1.5pt solid #000000">
        <style:background-image/>
      </style:table-cell-properties>
    </style:style>
    <style:style style:name="Таблица1.B13" style:family="table-cell">
      <style:table-cell-properties fo:background-color="#eeeeee" fo:padding="0.097cm" fo:border-left="0.5pt solid #000000" fo:border-right="1.5pt solid #000000" fo:border-top="none" fo:border-bottom="1.5pt solid #000000">
        <style:background-image/>
      </style:table-cell-properties>
    </style:style>
    <style:style style:name="Таблица2" style:family="table">
      <style:table-properties style:width="16.995cm" table:align="left"/>
    </style:style>
    <style:style style:name="Таблица2.A" style:family="table-column">
      <style:table-column-properties style:column-width="1.893cm"/>
    </style:style>
    <style:style style:name="Таблица2.B" style:family="table-column">
      <style:table-column-properties style:column-width="15.102cm"/>
    </style:style>
    <style:style style:name="Таблица2.A1" style:family="table-cell">
      <style:table-cell-properties style:vertical-align="middle" fo:padding-left="0.423cm" fo:padding-right="0.423cm" fo:padding-top="0.212cm" fo:padding-bottom="0.212cm" fo:border="0.05pt solid #e1e4e5"/>
    </style:style>
    <style:style style:name="Таблица2.A2" style:family="table-cell">
      <style:table-cell-properties style:vertical-align="middle" fo:background-color="#f3f6f6" fo:padding-left="0.423cm" fo:padding-right="0cm" fo:padding-top="0cm" fo:padding-bottom="0.212cm" fo:border-left="0.05pt solid #e1e4e5" fo:border-right="none" fo:border-top="none" fo:border-bottom="0.05pt solid #e1e4e5">
        <style:background-image/>
      </style:table-cell-properties>
    </style:style>
    <style:style style:name="Таблица2.A3" style:family="table-cell">
      <style:table-cell-properties style:vertical-align="middle"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text-properties officeooo:rsid="00214725" officeooo:paragraph-rsid="00214725"/>
    </style:style>
    <style:style style:name="P4" style:family="paragraph" style:parent-style-name="Table_20_Contents">
      <style:text-properties officeooo:rsid="00214725" officeooo:paragraph-rsid="003ecb49"/>
    </style:style>
    <style:style style:name="P5" style:family="paragraph" style:parent-style-name="Table_20_Contents">
      <style:text-properties officeooo:rsid="00214725" officeooo:paragraph-rsid="0040a0b9"/>
    </style:style>
    <style:style style:name="P6" style:family="paragraph" style:parent-style-name="Text_20_body">
      <style:text-properties officeooo:paragraph-rsid="0017002a"/>
    </style:style>
    <style:style style:name="P7" style:family="paragraph" style:parent-style-name="Title">
      <style:text-properties officeooo:paragraph-rsid="0017002a"/>
    </style:style>
    <style:style style:name="P8" style:family="paragraph" style:parent-style-name="Text_20_body">
      <style:paragraph-properties fo:text-align="center" style:justify-single-word="false"/>
      <style:text-properties officeooo:paragraph-rsid="0018c9af"/>
    </style:style>
    <style:style style:name="P9" style:family="paragraph" style:parent-style-name="Text_20_body">
      <style:paragraph-properties fo:text-align="center" style:justify-single-word="false"/>
    </style:style>
    <style:style style:name="P10" style:family="paragraph" style:parent-style-name="Table_20_Contents">
      <style:text-properties officeooo:paragraph-rsid="003ecb49"/>
    </style:style>
    <style:style style:name="P11" style:family="paragraph" style:parent-style-name="Table_20_Contents">
      <style:text-properties officeooo:paragraph-rsid="0040a0b9"/>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3">
      <style:paragraph-properties>
        <style:tab-stops>
          <style:tab-stop style:position="15.998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Text_20_body">
      <style:text-properties officeooo:paragraph-rsid="006cf938"/>
    </style:style>
    <style:style style:name="P17" style:family="paragraph" style:parent-style-name="Text_20_body">
      <style:paragraph-properties fo:margin-top="0cm" fo:margin-bottom="0cm" style:contextual-spacing="false"/>
      <style:text-properties officeooo:paragraph-rsid="006cf938"/>
    </style:style>
    <style:style style:name="P18" style:family="paragraph" style:parent-style-name="Table_20_Contents">
      <style:paragraph-properties fo:margin-left="0cm" fo:margin-right="0cm" fo:margin-top="0cm" fo:margin-bottom="0cm" style:contextual-spacing="false" fo:line-height="100%" fo:text-indent="0cm" style:auto-text-indent="false"/>
      <style:text-properties fo:font-size="10.5pt"/>
    </style:style>
    <style:style style:name="P19" style:family="paragraph" style:parent-style-name="Table_20_Heading">
      <style:paragraph-properties fo:margin-left="0cm" fo:margin-right="0cm" fo:margin-top="0cm" fo:margin-bottom="0cm" style:contextual-spacing="false" fo:line-height="100%" fo:text-indent="0cm" style:auto-text-indent="false"/>
      <style:text-properties fo:font-size="10.5pt" fo:font-weight="bold"/>
    </style:style>
    <style:style style:name="P20" style:family="paragraph" style:parent-style-name="Table_20_Contents">
      <style:paragraph-properties fo:margin-left="0cm" fo:margin-right="0cm" fo:margin-top="0cm" fo:margin-bottom="0cm" style:contextual-spacing="false" fo:line-height="100%" fo:text-indent="0cm" style:auto-text-indent="false"/>
    </style:style>
    <style:style style:name="P21" style:family="paragraph" style:parent-style-name="Text_20_body">
      <style:text-properties officeooo:paragraph-rsid="004b603d"/>
    </style:style>
    <style:style style:name="P22" style:family="paragraph" style:parent-style-name="Text_20_body">
      <style:text-properties officeooo:paragraph-rsid="00535c0e"/>
    </style:style>
    <style:style style:name="P23" style:family="paragraph" style:parent-style-name="Text_20_body">
      <style:paragraph-properties fo:text-align="start" style:justify-single-word="false"/>
    </style:style>
    <style:style style:name="P24" style:family="paragraph" style:parent-style-name="Text_20_body">
      <style:text-properties officeooo:rsid="00671d88" officeooo:paragraph-rsid="00671d88"/>
    </style:style>
    <style:style style:name="P25" style:family="paragraph" style:parent-style-name="Код">
      <style:text-properties officeooo:paragraph-rsid="00586bbd"/>
    </style:style>
    <style:style style:name="P26" style:family="paragraph" style:parent-style-name="Title" style:master-page-name="First_20_Page">
      <style:paragraph-properties style:page-number="auto"/>
      <style:text-properties style:font-name="CyrillicOld" fo:font-weight="bold" officeooo:paragraph-rsid="0017002a"/>
    </style:style>
    <style:style style:name="P27" style:family="paragraph" style:parent-style-name="Attention" style:list-style-name="L5"/>
    <style:style style:name="P28" style:family="paragraph" style:parent-style-name="Attention" style:list-style-name="L7"/>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Contents_20_3">
      <style:paragraph-properties>
        <style:tab-stops>
          <style:tab-stop style:position="15.998cm"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Heading_20_1">
      <style:paragraph-properties fo:break-before="page"/>
    </style:style>
    <style:style style:name="P34" style:family="paragraph" style:parent-style-name="Heading_20_2">
      <style:text-properties officeooo:paragraph-rsid="006cf938"/>
    </style:style>
    <style:style style:name="P35" style:family="paragraph" style:parent-style-name="Heading_20_3">
      <style:text-properties officeooo:paragraph-rsid="006cf938"/>
    </style:style>
    <style:style style:name="P36" style:family="paragraph" style:parent-style-name="List" style:list-style-name="L1"/>
    <style:style style:name="P37" style:family="paragraph" style:parent-style-name="List" style:list-style-name="L2"/>
    <style:style style:name="P38" style:family="paragraph" style:parent-style-name="List" style:list-style-name="L3"/>
    <style:style style:name="P39" style:family="paragraph" style:parent-style-name="List" style:list-style-name="L6"/>
    <style:style style:name="P40" style:family="paragraph" style:parent-style-name="List" style:list-style-name="L7"/>
    <style:style style:name="P41" style:family="paragraph" style:parent-style-name="Text_20_body" style:list-style-name="L4">
      <style:text-properties officeooo:paragraph-rsid="006cf938"/>
    </style:style>
    <style:style style:name="P42" style:family="paragraph" style:parent-style-name="Text_20_body" style:list-style-name="L5">
      <style:text-properties officeooo:paragraph-rsid="006cf938"/>
    </style:style>
    <style:style style:name="P43" style:family="paragraph" style:parent-style-name="Text_20_body" style:list-style-name="L5">
      <style:paragraph-properties fo:margin-top="0cm" fo:margin-bottom="0cm" style:contextual-spacing="false"/>
      <style:text-properties officeooo:paragraph-rsid="006cf938"/>
    </style:style>
    <style:style style:name="P44" style:family="paragraph" style:parent-style-name="Text_20_body" style:list-style-name="L7">
      <style:text-properties officeooo:paragraph-rsid="006cf938"/>
    </style:style>
    <style:style style:name="P45" style:family="paragraph" style:parent-style-name="Text_20_body" style:list-style-name="L7">
      <style:paragraph-properties fo:margin-top="0cm" fo:margin-bottom="0cm" style:contextual-spacing="false"/>
      <style:text-properties officeooo:paragraph-rsid="006cf938"/>
    </style:style>
    <style:style style:name="T1" style:family="text">
      <style:text-properties style:font-name="CyrillicOld" fo:font-weight="bold"/>
    </style:style>
    <style:style style:name="T2" style:family="text">
      <style:text-properties officeooo:rsid="0018c9af"/>
    </style:style>
    <style:style style:name="T3" style:family="text">
      <style:text-properties fo:font-size="10.5pt"/>
    </style:style>
    <style:style style:name="T4" style:family="text">
      <style:text-properties fo:font-size="10.5pt" fo:font-weight="bold" style:font-size-asian="10.5pt" style:font-weight-asian="bold" style:font-size-complex="10.5pt" style:font-weight-complex="bold"/>
    </style:style>
    <style:style style:name="T5" style:family="text">
      <style:text-properties fo:font-size="10.5pt" style:font-size-asian="10.5pt" style:font-size-complex="10.5pt"/>
    </style:style>
    <style:style style:name="T6" style:family="text">
      <style:text-properties fo:font-weight="bold" style:font-weight-asian="bold" style:font-weight-complex="bold"/>
    </style:style>
    <style:style style:name="T7" style:family="text">
      <style:text-properties fo:color="#e74c3c" loext:opacity="100%" style:font-name="SFMono-Regular" fo:font-size="7.5pt" fo:background-color="#ffffff" loext:char-shading-value="0" loext:padding-left="0.132cm" loext:padding-right="0.132cm" loext:padding-top="0.053cm" loext:padding-bottom="0.053cm" loext:border="0.06pt solid #e1e4e5"/>
    </style:style>
    <style:style style:name="T8" style:family="text">
      <style:text-properties officeooo:rsid="00656a6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2" draw:name="Изображение1" text:anchor-type="as-char" svg:width="8.264cm" svg:height="5.927cm" draw:z-index="152"><draw:image xlink:href="Pictures/10000001000003D0000002BC46FD0A63.png" xlink:type="simple" xlink:show="embed" xlink:actuate="onLoad" draw:mime-type="image/png"/></draw:frame></text:p>
      <text:p text:style-name="P6"><text:span text:style-name="T1"/></text:p>
      <text:p text:style-name="P6"><text:span text:style-name="T1"/></text:p>
      <text:p text:style-name="P6"><text:span text:style-name="T1"/></text:p>
      <text:p text:style-name="P7">Программа для ЭВМ «МПК-Пересвет»</text:p>
      <text:p text:style-name="P6"/>
      <text:p text:style-name="Title">Руководство пользователя</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
      <text:p text:style-name="P8"/>
      <text:p text:style-name="P8"/>
      <text:p text:style-name="P8"/>
      <text:p text:style-name="P8"/>
      <text:p text:style-name="P8"/>
      <text:p text:style-name="P8">Москва <text:span text:style-name="T2">2025</text:span></text:p>
      <text:p text:style-name="Глоссарий._20_Заголовок"><text:soft-page-break/>ГЛОССАРИЙ</text:p>
      <table:table table:name="Таблица1" table:style-name="Таблица1">
        <table:table-column table:style-name="Таблица1.A"/>
        <table:table-column table:style-name="Таблица1.B"/>
        <table:table-row>
          <table:table-cell table:style-name="Таблица1.A1" office:value-type="string">
            <text:p text:style-name="P2">Термин</text:p>
          </table:table-cell>
          <table:table-cell table:style-name="Таблица1.B1" office:value-type="string">
            <text:p text:style-name="P2">Определение</text:p>
          </table:table-cell>
        </table:table-row>
        <table:table-row>
          <table:table-cell table:style-name="Таблица1.A2" office:value-type="string">
            <text:p text:style-name="P3">Модель технического объекта</text:p>
          </table:table-cell>
          <table:table-cell table:style-name="Таблица1.B2" office:value-type="string">
            <text:p text:style-name="P3">Совокупность статической и динамической моделей объекта.</text:p>
          </table:table-cell>
        </table:table-row>
        <table:table-row>
          <table:table-cell table:style-name="Таблица1.A3" office:value-type="string">
            <text:p text:style-name="P3">Статическая модель объекта</text:p>
          </table:table-cell>
          <table:table-cell table:style-name="Таблица1.B3" office:value-type="string">
            <text:p text:style-name="P3">Иерархия сущностей. Также в иерархию включаются сущности, описывающие информационную систему. В простейшем случае статическая модель может представлять собой просто линейный список тегов (параметров объектов).</text:p>
          </table:table-cell>
        </table:table-row>
        <table:table-row>
          <table:table-cell table:style-name="Таблица1.A2" office:value-type="string">
            <text:p text:style-name="P3">Динамическая модель</text:p>
          </table:table-cell>
          <table:table-cell table:style-name="Таблица1.B4" office:value-type="string">
            <text:p text:style-name="P3">Совокупность методов, реализуемых на каких-либо языках программирования. В виде методов реализуются бизнес-процессы, протекающие на моделируемом объекте, а также выполняются расчёты значений рассчитываемых тегов. Выполнение методов инициируется при возникновении событий в модели.</text:p>
          </table:table-cell>
        </table:table-row>
        <table:table-row>
          <table:table-cell table:style-name="Таблица1.A3" office:value-type="string">
            <text:p text:style-name="Table_20_Contents">Сущность </text:p>
          </table:table-cell>
          <table:table-cell table:style-name="Таблица1.B3" office:value-type="string">
            <text:p text:style-name="P10">Основные сущности статической модели технического объекта: теги, объекты, тревоги, методы, расписания, константы. Дополнительные сущности, описывающие информационную систему: хранилище данных, источник данных. Также есть возможность создавать дополнительные сущности, самостоятельно реализуя логику работы с ними.</text:p>
          </table:table-cell>
        </table:table-row>
        <table:table-row>
          <table:table-cell table:style-name="Таблица1.A2" office:value-type="string">
            <text:p text:style-name="Table_20_Contents">Тег </text:p>
            <text:p text:style-name="Table_20_Contents"/>
          </table:table-cell>
          <table:table-cell table:style-name="Таблица1.B6" office:value-type="string">
            <text:p text:style-name="P10">Параметр объекта. Например: температура, давление, сила тока и т.д. Значения тегов хранятся в том или ином хранилище данных. Каждое значение тега обязательно имеет метку времени. Кроме того, может иметь показатель качества значения.</text:p>
            <text:p text:style-name="P10">Тег в иерархии представляется узлом, дочерним по отношению к какому-либо объекту.</text:p>
            <text:p text:style-name="P10">Поддерживаемые типы значений тегов: целый, вещественный, строковый, json.</text:p>
          </table:table-cell>
        </table:table-row>
        <table:table-row>
          <table:table-cell table:style-name="Таблица1.A3" office:value-type="string">
            <text:p text:style-name="P4">Объект</text:p>
          </table:table-cell>
          <table:table-cell table:style-name="Таблица1.B3" office:value-type="string">
            <text:p text:style-name="P4">Основная сущность при моделировании технических объектов. Объектом может быть: предприятие, цех, участок, технологическая линия, агрегат, датчик и т.д. Каждый объект может содержать любое количество объектов-потомков. Также объект может содержать любое количество тегов.</text:p>
          </table:table-cell>
        </table:table-row>
        <table:table-row>
          <table:table-cell table:style-name="Таблица1.A8" office:value-type="string">
            <text:p text:style-name="P5">Расписание</text:p>
          </table:table-cell>
          <table:table-cell table:style-name="Таблица1.B8" office:value-type="string">
            <text:p text:style-name="P5">Заданная последовательность, определяющая моменты времени, в которые будут выполняться те или иные задачи. Задачами могут быть: запуск расчёта вычисляемых тегов, запуск на исполнение каких-либо методов (к примеру, генерация отчётов и рассылка их по почте).</text:p>
          </table:table-cell>
        </table:table-row>
        <table:table-row>
          <table:table-cell table:style-name="Таблица1.A3" office:value-type="string">
            <text:p text:style-name="P5">Событие</text:p>
          </table:table-cell>
          <table:table-cell table:style-name="Таблица1.B3" office:value-type="string">
            <text:p text:style-name="P5">В платформе поддерживаются три основных типа событий: изменение тега, возникновение тревоги, событие расписания. К этим событиям можно привязывать выполнение различных методов, тем самым «оживляя» модель технического объекта. События являются инициаторами действий.</text:p>
          </table:table-cell>
        </table:table-row>
        <text:soft-page-break/>
        <table:table-row>
          <table:table-cell table:style-name="Таблица1.A8" office:value-type="string">
            <text:p text:style-name="P5">Тревога</text:p>
          </table:table-cell>
          <table:table-cell table:style-name="Таблица1.B8" office:value-type="string">
            <text:p text:style-name="P5">Это состояние тега, которое может возникнуть при изменении тега и при выполнении некоторых заданных условий. Есть четыре вида стандартных тревог: LoLo, Lo, Hi, HiHi.</text:p>
            <text:p text:style-name="P11">В «МПК-Пересвет», в отличие от типовых тревог LoLo-Lo-Hi-HiHi, есть возможность создать любое их количество. Более того, возможно создавать сложные тревоги, возникновение которых учитывает значение других тегов. Это достигается тем, что условием возникновения тревоги может быть указано не только какое-то значение тега, а результат расчёта метода, который может реализовывать любую сложную логику.</text:p>
          </table:table-cell>
        </table:table-row>
        <table:table-row>
          <table:table-cell table:style-name="Таблица1.A3" office:value-type="string">
            <text:p text:style-name="P5">Метод</text:p>
          </table:table-cell>
          <table:table-cell table:style-name="Таблица1.B3" office:value-type="string">
            <text:p text:style-name="P5">Программный код, реализующий логику поведения моделируемого объекта. Методы вызываются на исполнение возникающими событиями и используются для: расчёта значений вычисляемых тегов, определения факта возникновения/пропадания тревоги, вызова внешних процессов и т.д.</text:p>
          </table:table-cell>
        </table:table-row>
        <table:table-row>
          <table:table-cell table:style-name="Таблица1.A8" office:value-type="string">
            <text:p text:style-name="P5">Хранилище данных</text:p>
          </table:table-cell>
          <table:table-cell table:style-name="Таблица1.B8" office:value-type="string">
            <text:p text:style-name="P5">База данных, в которой хранятся исторические данные (значения тегов). Платформа может поддерживать одновременно несколько хранилищ данных разных типов. Рекомендуемое хранилище данных для систем промышленной автоматизации - PostgreSQL. Также есть драйвер для Victoriametrics. Возможно написание драйверов для любых других типов хранилищ данных.</text:p>
          </table:table-cell>
        </table:table-row>
        <table:table-row>
          <table:table-cell table:style-name="Таблица1.A13" office:value-type="string">
            <text:p text:style-name="P5">Коннектор</text:p>
          </table:table-cell>
          <table:table-cell table:style-name="Таблица1.B13" office:value-type="string">
            <text:p text:style-name="P5">Программа, обеспечивающая сбор данных с устройства по определённому протоколу. Обычно для каждого протокола создаётся отдельный коннектор.</text:p>
          </table:table-cell>
        </table:table-row>
      </table:table>
      <text:p text:style-name="Standard"/>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rotected="true">
            <text:p text:style-name="P15">Содержание</text:p>
          </text:index-title>
          <text:p text:style-name="P12"><text:a xlink:type="simple" xlink:href="#__RefHeading___Toc768_27341558" text:style-name="Index_20_Link" text:visited-style-name="Index_20_Link">Назначение программы для ЭВМ «МПК-Пересвет»<text:tab/>6</text:a></text:p>
          <text:p text:style-name="P12"><text:a xlink:type="simple" xlink:href="#__RefHeading___Toc883_3861748061" text:style-name="Index_20_Link" text:visited-style-name="Index_20_Link">Что должен знать пользователь<text:tab/>6</text:a></text:p>
          <text:p text:style-name="P12"><text:a xlink:type="simple" xlink:href="#__RefHeading___Toc885_3861748061" text:style-name="Index_20_Link" text:visited-style-name="Index_20_Link">Исторические данные<text:tab/>6</text:a></text:p>
          <text:p text:style-name="P13"><text:a xlink:type="simple" xlink:href="#__RefHeading___Toc887_3861748061" text:style-name="Index_20_Link" text:visited-style-name="Index_20_Link">Правила работы с данными<text:tab/>6</text:a></text:p>
          <text:p text:style-name="P13"><text:a xlink:type="simple" xlink:href="#__RefHeading___Toc889_3861748061" text:style-name="Index_20_Link" text:visited-style-name="Index_20_Link">Коды качества<text:tab/>7</text:a></text:p>
          <text:p text:style-name="P13"><text:a xlink:type="simple" xlink:href="#__RefHeading___Toc891_3861748061" text:style-name="Index_20_Link" text:visited-style-name="Index_20_Link"><text:s/>Получение данных<text:tab/>8</text:a></text:p>
          <text:p text:style-name="P13"><text:a xlink:type="simple" xlink:href="#__RefHeading___Toc893_3861748061" text:style-name="Index_20_Link" text:visited-style-name="Index_20_Link">Пример массива данных<text:tab/>8</text:a></text:p>
          <text:p text:style-name="P13"><text:a xlink:type="simple" xlink:href="#__RefHeading___Toc895_3861748061" text:style-name="Index_20_Link" text:visited-style-name="Index_20_Link">Формат запроса на получение данных<text:tab/>8</text:a></text:p>
          <text:p text:style-name="P13"><text:a xlink:type="simple" xlink:href="#__RefHeading___Toc897_3861748061" text:style-name="Index_20_Link" text:visited-style-name="Index_20_Link">Формат ответа на запрос на получение данных<text:tab/>10</text:a></text:p>
          <text:p text:style-name="P13"><text:a xlink:type="simple" xlink:href="#__RefHeading___Toc899_3861748061" text:style-name="Index_20_Link" text:visited-style-name="Index_20_Link">Получение текущего значения тэга<text:tab/>10</text:a></text:p>
          <text:p text:style-name="P13"><text:a xlink:type="simple" xlink:href="#__RefHeading___Toc901_3861748061" text:style-name="Index_20_Link" text:visited-style-name="Index_20_Link">Метки времени в будущем и prsStep = false<text:tab/>11</text:a></text:p>
          <text:p text:style-name="P13"><text:a xlink:type="simple" xlink:href="#__RefHeading___Toc903_3861748061" text:style-name="Index_20_Link" text:visited-style-name="Index_20_Link">Метки времени в будущем, prsStep = true<text:tab/>12</text:a></text:p>
          <text:p text:style-name="P13"><text:a xlink:type="simple" xlink:href="#__RefHeading___Toc905_3861748061" text:style-name="Index_20_Link" text:visited-style-name="Index_20_Link">Ключ start<text:tab/>13</text:a></text:p>
          <text:p text:style-name="P14"><text:a xlink:type="simple" xlink:href="#__RefHeading___Toc907_3861748061" text:style-name="Index_20_Link" text:visited-style-name="Index_20_Link">prsStep = false<text:tab/>13</text:a></text:p>
          <text:p text:style-name="P14"><text:a xlink:type="simple" xlink:href="#__RefHeading___Toc909_3861748061" text:style-name="Index_20_Link" text:visited-style-name="Index_20_Link">prsStep = true<text:tab/>14</text:a></text:p>
          <text:p text:style-name="P14"><text:a xlink:type="simple" xlink:href="#__RefHeading___Toc911_3861748061" text:style-name="Index_20_Link" text:visited-style-name="Index_20_Link">Начало периода в запросе - перед любой меткой времени в базе<text:tab/>15</text:a></text:p>
          <text:p text:style-name="P14"><text:a xlink:type="simple" xlink:href="#__RefHeading___Toc913_3861748061" text:style-name="Index_20_Link" text:visited-style-name="Index_20_Link">Начало периода в запросе - после любой метки времени в базе<text:tab/>16</text:a></text:p>
          <text:p text:style-name="P13"><text:a xlink:type="simple" xlink:href="#__RefHeading___Toc915_3861748061" text:style-name="Index_20_Link" text:visited-style-name="Index_20_Link">Ключ finish<text:tab/>17</text:a></text:p>
          <text:p text:style-name="P14"><text:a xlink:type="simple" xlink:href="#__RefHeading___Toc917_3861748061" text:style-name="Index_20_Link" text:visited-style-name="Index_20_Link">finish = произвольной метке времени<text:tab/>17</text:a></text:p>
          <text:p text:style-name="P14"><text:a xlink:type="simple" xlink:href="#__RefHeading___Toc919_3861748061" text:style-name="Index_20_Link" text:visited-style-name="Index_20_Link">Ключ finish установлен перед любой существующей в базе меткой времени<text:tab/>18</text:a></text:p>
          <text:p text:style-name="P14"><text:a xlink:type="simple" xlink:href="#__RefHeading___Toc921_3861748061" text:style-name="Index_20_Link" text:visited-style-name="Index_20_Link">Ключ finish равен текущей метке времени<text:tab/>18</text:a></text:p>
          <text:p text:style-name="P13"><text:a xlink:type="simple" xlink:href="#__RefHeading___Toc923_3861748061" text:style-name="Index_20_Link" text:visited-style-name="Index_20_Link">Ключи start и finish<text:tab/>19</text:a></text:p>
          <text:p text:style-name="P14"><text:a xlink:type="simple" xlink:href="#__RefHeading___Toc925_3861748061" text:style-name="Index_20_Link" text:visited-style-name="Index_20_Link">start и finish внутри существующих в базе меток<text:tab/>19</text:a></text:p>
          <text:p text:style-name="P14"><text:a xlink:type="simple" xlink:href="#__RefHeading___Toc927_3861748061" text:style-name="Index_20_Link" text:visited-style-name="Index_20_Link">start выходит за пределы меток<text:tab/>20</text:a></text:p>
          <text:p text:style-name="P14"><text:a xlink:type="simple" xlink:href="#__RefHeading___Toc929_3861748061" text:style-name="Index_20_Link" text:visited-style-name="Index_20_Link">start и finish вне меток времени<text:tab/>21</text:a></text:p>
          <text:p text:style-name="P13"><text:a xlink:type="simple" xlink:href="#__RefHeading___Toc931_3861748061" text:style-name="Index_20_Link" text:visited-style-name="Index_20_Link">Ключ count<text:tab/>22</text:a></text:p>
          <text:p text:style-name="P13"><text:a xlink:type="simple" xlink:href="#__RefHeading___Toc933_3861748061" text:style-name="Index_20_Link" text:visited-style-name="Index_20_Link">Ключи count и finish<text:tab/>22</text:a></text:p>
          <text:p text:style-name="P13"><text:a xlink:type="simple" xlink:href="#__RefHeading___Toc935_3861748061" text:style-name="Index_20_Link" text:visited-style-name="Index_20_Link">Ключи count и start<text:tab/>25</text:a></text:p>
          <text:p text:style-name="P13"><text:a xlink:type="simple" xlink:href="#__RefHeading___Toc937_3861748061" text:style-name="Index_20_Link" text:visited-style-name="Index_20_Link">Ключ timeStep<text:tab/>28</text:a></text:p>
          <text:p text:style-name="P14"><text:a xlink:type="simple" xlink:href="#__RefHeading___Toc939_3861748061" text:style-name="Index_20_Link" text:visited-style-name="Index_20_Link">timeStep и count<text:tab/>28</text:a></text:p>
          <text:p text:style-name="P14"><text:a xlink:type="simple" xlink:href="#__RefHeading___Toc941_3861748061" text:style-name="Index_20_Link" text:visited-style-name="Index_20_Link">timeStep, count и finish<text:tab/>30</text:a></text:p>
          <text:p text:style-name="P14"><text:a xlink:type="simple" xlink:href="#__RefHeading___Toc943_3861748061" text:style-name="Index_20_Link" text:visited-style-name="Index_20_Link">timeStep, count и start<text:tab/>30</text:a></text:p>
          <text:p text:style-name="P14"><text:a xlink:type="simple" xlink:href="#__RefHeading___Toc945_3861748061" text:style-name="Index_20_Link" text:visited-style-name="Index_20_Link">timeStep, start и finish<text:tab/>32</text:a></text:p>
          <text:p text:style-name="P13"><text:a xlink:type="simple" xlink:href="#__RefHeading___Toc947_3861748061" text:style-name="Index_20_Link" text:visited-style-name="Index_20_Link">Ключ maxCount<text:tab/>33</text:a></text:p>
          <text:p text:style-name="P13"><text:a xlink:type="simple" xlink:href="#__RefHeading___Toc949_3861748061" text:style-name="Index_20_Link" text:visited-style-name="Index_20_Link">Ключ actual<text:tab/>33</text:a></text:p>
          <text:p text:style-name="P14"><text:a xlink:type="simple" xlink:href="#__RefHeading___Toc951_3861748061" text:style-name="Index_20_Link" text:visited-style-name="Index_20_Link">start и actual<text:tab/>33</text:a></text:p>
          <text:p text:style-name="P14"><text:a xlink:type="simple" xlink:href="#__RefHeading___Toc953_3861748061" text:style-name="Index_20_Link" text:visited-style-name="Index_20_Link">start, count, actual<text:tab/>34</text:a></text:p>
          <text:p text:style-name="P14"><text:a xlink:type="simple" xlink:href="#__RefHeading___Toc955_3861748061" text:style-name="Index_20_Link" text:visited-style-name="Index_20_Link">actual и finish<text:tab/>36</text:a></text:p>
          <text:p text:style-name="P14"><text:a xlink:type="simple" xlink:href="#__RefHeading___Toc957_3861748061" text:style-name="Index_20_Link" text:visited-style-name="Index_20_Link">finish, count, actual<text:tab/>37</text:a></text:p>
          <text:p text:style-name="P14"><text:a xlink:type="simple" xlink:href="#__RefHeading___Toc959_3861748061" text:style-name="Index_20_Link" text:visited-style-name="Index_20_Link">start, finish, actual<text:tab/>38</text:a></text:p>
          <text:p text:style-name="P14"><text:a xlink:type="simple" xlink:href="#__RefHeading___Toc961_3861748061" text:style-name="Index_20_Link" text:visited-style-name="Index_20_Link">start, finish, count, actual<text:tab/>39</text:a></text:p>
          <text:p text:style-name="P14"><text:a xlink:type="simple" xlink:href="#__RefHeading___Toc963_3861748061" text:style-name="Index_20_Link" text:visited-style-name="Index_20_Link">start, finish, maxCount, actual<text:tab/>40</text:a></text:p>
          <text:p text:style-name="P13"><text:a xlink:type="simple" xlink:href="#__RefHeading___Toc965_3861748061" text:style-name="Index_20_Link" text:visited-style-name="Index_20_Link">Ключ value<text:tab/>42</text:a></text:p>
          <text:p text:style-name="P14"><text:a xlink:type="simple" xlink:href="#__RefHeading___Toc967_3861748061" text:style-name="Index_20_Link" text:visited-style-name="Index_20_Link">value и actual<text:tab/>43</text:a></text:p>
          <text:p text:style-name="P13"><text:a xlink:type="simple" xlink:href="#__RefHeading___Toc969_3861748061" text:style-name="Index_20_Link" text:visited-style-name="Index_20_Link">null в истории данных<text:tab/>44</text:a></text:p>
          <text:p text:style-name="P12"><text:a xlink:type="simple" xlink:href="#__RefHeading___Toc6486_1607204571" text:style-name="Index_20_Link" text:visited-style-name="Index_20_Link"><text:soft-page-break/>Примеры работы с МПК-Пересвет<text:tab/>50</text:a></text:p>
          <text:p text:style-name="P13"><text:a xlink:type="simple" xlink:href="#__RefHeading___Toc6488_1607204571" text:style-name="Index_20_Link" text:visited-style-name="Index_20_Link">Простой пример с одним объектом<text:tab/>50</text:a></text:p>
          <text:p text:style-name="P14"><text:a xlink:type="simple" xlink:href="#__RefHeading___Toc6490_1607204571" text:style-name="Index_20_Link" text:visited-style-name="Index_20_Link">Объект<text:tab/>50</text:a></text:p>
          <text:p text:style-name="P14"><text:a xlink:type="simple" xlink:href="#__RefHeading___Toc6492_1607204571" text:style-name="Index_20_Link" text:visited-style-name="Index_20_Link">Теги<text:tab/>52</text:a></text:p>
          <text:p text:style-name="P14"><text:a xlink:type="simple" xlink:href="#__RefHeading___Toc6494_1607204571" text:style-name="Index_20_Link" text:visited-style-name="Index_20_Link">Запись/чтение данных<text:tab/>55</text:a></text:p>
          <text:p text:style-name="P14"><text:a xlink:type="simple" xlink:href="#__RefHeading___Toc6496_1607204571" text:style-name="Index_20_Link" text:visited-style-name="Index_20_Link">Расчётный метод<text:tab/>58</text:a></text:p>
          <text:p text:style-name="P14"><text:a xlink:type="simple" xlink:href="#__RefHeading___Toc6498_1607204571" text:style-name="Index_20_Link" text:visited-style-name="Index_20_Link">Запуск расчётного метода<text:tab/>64</text:a></text:p>
          <text:p text:style-name="P14"><text:a xlink:type="simple" xlink:href="#__RefHeading___Toc6500_1607204571" text:style-name="Index_20_Link" text:visited-style-name="Index_20_Link">Проверим расчёт<text:tab/>64</text:a></text:p>
          <text:p text:style-name="P14"><text:a xlink:type="simple" xlink:href="#__RefHeading___Toc6502_1607204571" text:style-name="Index_20_Link" text:visited-style-name="Index_20_Link">Отображение данных в Grafana<text:tab/>67</text:a></text:p>
        </text:index-body>
      </text:table-of-content>
      <text:p text:style-name="Standard"/>
      <text:p text:style-name="Standard"/>
      <text:h text:style-name="P33" text:outline-level="1"><text:bookmark-start text:name="__RefHeading___Toc768_27341558"/>Назначение программы <text:line-break/>для ЭВМ «МПК-Пересвет»<text:bookmark-end text:name="__RefHeading___Toc768_27341558"/></text:h>
      <text:p text:style-name="Text_20_body">Программа для ЭВМ «МПК-Пересвет» (далее по тексту – платформа или система) предназначена для создания моделей технических объектов и информационных систем. </text:p>
      <text:p text:style-name="Text_20_body">Через создание моделей объектов появляется возможность мониторинга и управления ими.</text:p>
      <text:p text:style-name="Text_20_body">Примеры моделируемых объектов: агрегат, технологическая линия, цех, предприятие, частный дом, здание, ТЭЦ, и т. д</text:p>
      <text:h text:style-name="Heading_20_1" text:outline-level="1"><text:bookmark-start text:name="__RefHeading___Toc883_3861748061"/>Что должен знать пользователь<text:bookmark-end text:name="__RefHeading___Toc883_3861748061"/></text:h>
      <text:p text:style-name="Text_20_body">Пользователь системы должен понимать принципы работы с историческими данными в платформе МПК-Пересвет. </text:p>
      <text:p text:style-name="Text_20_body">Экраны для пользователя создаёт администратор, соответственно, логика работы с системой зависит от логики работы экранов, в общем случае — от логики модели, созданной администратором на базе МПК-Пересвет.</text:p>
      <text:h text:style-name="Heading_20_1" text:outline-level="1"><text:bookmark-start text:name="__RefHeading___Toc885_3861748061"/>Исторические данные<text:bookmark-end text:name="__RefHeading___Toc885_3861748061"/></text:h>
      <text:p text:style-name="P21">Одна из главных задач Платформы - обеспечение клентов сохранёнными историческими данными. Клиенты получают данные с помощью запроса GET по адресу /v1/data/. </text:p>
      <text:p text:style-name="P21">Эта команда будет подробно объяснена ниже.</text:p>
      <text:h text:style-name="Heading_20_2" text:outline-level="2"><text:bookmark-start text:name="__RefHeading___Toc887_3861748061"/>Правила работы с данными<text:bookmark-end text:name="__RefHeading___Toc887_3861748061"/></text:h>
      <text:p text:style-name="Text_20_body">Важно:</text:p>
      <text:p text:style-name="Text_20_body">При работе с историческими данными запомним следующие правила:</text:p>
      <text:list text:style-name="L1">
        <text:list-item>
          <text:p text:style-name="P36">Для правильной работы с историческими данными все сервера, устройства, клиенты должны быть синхронизированы по времени.</text:p>
        </text:list-item>
        <text:list-item>
          <text:p text:style-name="P36">Если в тэге нет значений с метками времени из будущего, то последнее сохранённое на текущий момент времени в тэге значение является текущим значением тэга.</text:p>
          <text:list>
            <text:list-item>
              <text:p text:style-name="P36">Если значения тэга числовые:</text:p>
            </text:list-item>
            <text:list-item>
              <text:p text:style-name="P36">Если атрибут тэга prsStep равен true, тогда значения тэга между двумя метками времени не интерполируются.</text:p>
            </text:list-item>
            <text:list-item>
              <text:p text:style-name="P36">Если атрибут тэга prsStep равен false (по умолчанию), тогда значения тэга между двумя метками времени вычисляются с помощью линейной интерполяции.</text:p>
            </text:list-item>
            <text:list-item>
              <text:p text:style-name="P36"><text:soft-page-break/>Программы, предоставляющие данные пользователям, ответственны за верную интерпретацию атрибута prsStep у тэга. К примеру, тренд должен правильно показывать значения тэга между соседними метками времени.</text:p>
            </text:list-item>
          </text:list>
        </text:list-item>
        <text:list-item>
          <text:p text:style-name="P36">Все метки времени внутри платформы и в исторической базе данных хранятся и обрабатываются как целочисленные данные. Каждая метка времени - это количество микросекунд, начиная с 01-01-1970 00:00:00+00:00. Пример: 1000000 = 01-01-1970 00:00:01+00:00</text:p>
        </text:list-item>
        <text:list-item>
          <text:p text:style-name="P36">Если клиент посылает в платформу метку времени как строку в формате ISO 8601 и не указывает временнУю зону, то Платформа устанавливает для такой метки времени зону по умолчанию UTC (+00:00).</text:p>
        </text:list-item>
        <text:list-item>
          <text:p text:style-name="P36">Клиенты могут записывать значения тэгов с метками времени из будущего.</text:p>
        </text:list-item>
        <text:list-item>
          <text:p text:style-name="P36">Ответ на запрос GET /v1/data/ содержит массив значений тэга, отсортированный по метке времени в возрастающем порядке.</text:p>
        </text:list-item>
        <text:list-item>
          <text:p text:style-name="P36">Если тэг содержит несколько значений на одну и ту же метку времени, то текущим значением тэга на эту метку времени считается записанное последним.</text:p>
        </text:list-item>
        <text:list-item>
          <text:p text:style-name="P36">Каждое значение в тэге содержит код качества q. Если q = 0 или null, то значению тэга можно доверять. Иначе значение тэга ошибочно, код q определяет ошибку. См. коды качества.</text:p>
        </text:list-item>
        <text:list-item>
          <text:p text:style-name="P36">Следующие правила касаются ключей count, start, finish и timeStep в запросе GET /v1/data/.</text:p>
        </text:list-item>
        <text:list-item>
          <text:p text:style-name="P36">Комбинации ключей start, finish и timeStep совместно с ключом count определяют границы периода для возвращаемых данных.</text:p>
        </text:list-item>
        <text:list-item>
          <text:p text:style-name="P36">Ключ count определяет количество возвращаемых данных. Учитывается общее количество: и реально записанные в базе данных, и интерполированные значения тэгов.</text:p>
        </text:list-item>
        <text:list-item>
          <text:p text:style-name="P36">В случае отсутствия ключа finish его значение принимается равным текущему моменту времени. Это правило по умолчанию отсекает данные, записанные с метками времени из будущего.</text:p>
        </text:list-item>
      </text:list>
      <text:h text:style-name="Heading_20_2" text:outline-level="2"><text:bookmark-start text:name="__RefHeading___Toc889_3861748061"/>Коды качества<text:bookmark-end text:name="__RefHeading___Toc889_3861748061"/></text:h>
      <text:p text:style-name="Text_20_body">У каждого записанного в базу значения тэга есть так называемый «код качества», который возвращается в ключе q.</text:p>
      <text:p text:style-name="Text_20_body">Код качества - это, другими словами, код ошибки данных.</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19">Код</text:p>
            </table:table-cell>
            <table:table-cell table:style-name="Таблица2.A1" office:value-type="string">
              <text:p text:style-name="P19">Описание<text:span text:style-name="T4"/></text:p>
            </table:table-cell>
          </table:table-row>
        </table:table-header-rows>
        <table:table-row>
          <table:table-cell table:style-name="Таблица2.A2" office:value-type="string">
            <text:p text:style-name="P18">0 | null<text:span text:style-name="T5"/></text:p>
          </table:table-cell>
          <table:table-cell table:style-name="Таблица2.A2" office:value-type="string">
            <text:p text:style-name="P18">Обычное значение. Данные «хорошие».<text:span text:style-name="T5"/></text:p>
          </table:table-cell>
        </table:table-row>
        <table:table-row>
          <table:table-cell table:style-name="Таблица2.A3" office:value-type="string">
            <text:p text:style-name="P18">100<text:span text:style-name="T5"/></text:p>
          </table:table-cell>
          <table:table-cell table:style-name="Таблица2.A3" office:value-type="string">
            <text:p text:style-name="P20"><text:span text:style-name="T3">Разорвана связь между платформой и коннектором, записывающим данные в тэг. Используется совместно со значением тэга </text:span><text:span text:style-name="Source_20_Text"><text:span text:style-name="T7">null</text:span></text:span><text:span text:style-name="T3">.</text:span></text:p>
          </table:table-cell>
        </table:table-row>
        <table:table-row>
          <table:table-cell table:style-name="Таблица2.A2" office:value-type="string">
            <text:p text:style-name="P18">101<text:span text:style-name="T5"/></text:p>
          </table:table-cell>
          <table:table-cell table:style-name="Таблица2.A2" office:value-type="string">
            <text:p text:style-name="P20"><text:span text:style-name="T3">Платформа завершила работу. Используется совместно со значением тэга </text:span><text:span text:style-name="Source_20_Text"><text:span text:style-name="T7">null</text:span></text:span><text:span text:style-name="T3"> и записывается в процессе завершения платформой работы.</text:span></text:p>
          </table:table-cell>
        </table:table-row>
        <table:table-row>
          <table:table-cell table:style-name="Таблица2.A3" office:value-type="string">
            <text:p text:style-name="P18">102<text:span text:style-name="T5"/></text:p>
          </table:table-cell>
          <table:table-cell table:style-name="Таблица2.A3" office:value-type="string">
            <text:p text:style-name="P20"><text:span text:style-name="T3">Разорвана связь между коннектором и поставщиком данных. Используется совместно со значением тэга </text:span><text:span text:style-name="Source_20_Text"><text:span text:style-name="T7">null</text:span></text:span><text:span text:style-name="T3">.</text:span></text:p>
          </table:table-cell>
        </table:table-row>
      </table:table>
      <text:h text:style-name="Heading_20_2" text:outline-level="2"><text:bookmark-start text:name="__RefHeading___Toc891_3861748061"/><text:soft-page-break/><text:line-break/>Получение данных<text:bookmark-end text:name="__RefHeading___Toc891_3861748061"/></text:h>
      <text:p text:style-name="Text_20_body">Подробно рассмотрим примеры получения исторических данных.</text:p>
      <text:h text:style-name="Heading_20_2" text:outline-level="2"><text:bookmark-start text:name="__RefHeading___Toc893_3861748061"/>Пример массива данных<text:bookmark-end text:name="__RefHeading___Toc893_3861748061"/></text:h>
      <text:p text:style-name="Text_20_body">Допустим, у нас есть тэг «Tag1» у объекта «Object1». Идентификатор тега — «1500c712-726a-103e-9264-a5021ec2dae1». Атрибут «prsTagValueTypeCode» этого тэга равен 1 и это значит, что тэг хранит вещественные значения. Исторические данные этого тэга:</text:p>
      <text:p text:style-name="Text_20_body"><draw:frame draw:style-name="fr1" draw:name="Врезка1" text:anchor-type="char" svg:x="1.087cm" svg:y="-0.3cm" svg:width="14.138cm" draw:z-index="148"><draw:text-box fo:min-height="8.435cm"><text:p text:style-name="Drawing"><draw:frame draw:style-name="fr7" draw:name="Изображение3" text:anchor-type="paragraph" svg:width="14.138cm" style:rel-width="100%" svg:height="8.435cm" style:rel-height="scale" draw:z-index="149"><draw:image xlink:href="Pictures/100000010000030D000001D2D8583E0B.png" xlink:type="simple" xlink:show="embed" xlink:actuate="onLoad" draw:mime-type="image/png"/></draw:frame>Рисунок <text:sequence text:ref-name="refDrawing0" text:name="Drawing" text:formula="ooow:Drawing+1" style:num-format="1">1</text:sequence>: Данные тега</text:p></draw:text-box></draw:frame></text:p>
      <text:p text:style-name="Attention">Для простоты будем оперировать только часами и минутами в качестве меток времени.</text:p>
      <text:p text:style-name="Text_20_body">Итак, исторические данные тэга Tag1:</text:p>
      <text:p text:style-name="Код">[</text:p>
      <text:p text:style-name="Код"><text:s text:c="2"/>[1, "09:30"],</text:p>
      <text:p text:style-name="Код"><text:s text:c="2"/>[3, "09:35"],</text:p>
      <text:p text:style-name="Код"><text:s text:c="2"/>[2.5, "09:40"],</text:p>
      <text:p text:style-name="Код"><text:s text:c="2"/>[5, "09:45"],</text:p>
      <text:p text:style-name="Код"><text:s text:c="2"/>[4, "09:50"]</text:p>
      <text:p text:style-name="Код">]</text:p>
      <text:h text:style-name="Heading_20_2" text:outline-level="2"><text:bookmark-start text:name="__RefHeading___Toc895_3861748061"/>Формат запроса на получение данных<text:bookmark-end text:name="__RefHeading___Toc895_3861748061"/></text:h>
      <text:p text:style-name="Text_20_body">Пример:</text:p>
      <text:p text:style-name="Код"><text:soft-page-break/>{</text:p>
      <text:p text:style-name="Код"><text:s text:c="2"/>"tagId": ["id первого тэга", "id второго тэга"],</text:p>
      <text:p text:style-name="Код"><text:s text:c="2"/>"start": "2018-12-09 12:00:00+03:00",</text:p>
      <text:p text:style-name="Код"><text:s text:c="2"/>"finish": "2018-12-09 14:00:00+03:00",</text:p>
      <text:p text:style-name="Код"><text:s text:c="2"/>"count": 8,</text:p>
      <text:p text:style-name="Код"><text:s text:c="2"/>"timeStep": 60000000,</text:p>
      <text:p text:style-name="Код"><text:s text:c="2"/>"maxCount": 700,</text:p>
      <text:p text:style-name="Код"><text:s text:c="2"/>"actual": false,</text:p>
      <text:p text:style-name="Код"><text:s text:c="2"/>"format": true,</text:p>
      <text:p text:style-name="Код"><text:s text:c="2"/>"value": 10</text:p>
      <text:p text:style-name="Код">}</text:p>
      <text:p text:style-name="Text_20_body"><text:span text:style-name="T6">tagId</text:span> (str или массив из str), обязательный<text:tab/>— тэг(и) для которых необходимо получить данные.</text:p>
      <text:p text:style-name="Text_20_body"><text:span text:style-name="T6">start</text:span> (int, str), необязательный <text:tab/><text:tab/>— метка времени начала периода для получения данных (see). Если start - строка, то ее значение обрабатывается в соответствии со стандартом ISO 8601.</text:p>
      <text:p text:style-name="Text_20_body">Возможные значения:</text:p>
      <text:list text:style-name="L2">
        <text:list-item>
          <text:p text:style-name="P37">«2018-12-20 00:00:00+03:00».</text:p>
        </text:list-item>
        <text:list-item>
          <text:p text:style-name="P37">«2018-12-20 00:00:00» - временнАя зона для этого значения будет установлена в UTC (00:00).</text:p>
        </text:list-item>
        <text:list-item>
          <text:p text:style-name="P37">1544662830000000 значение равно: «2018-12-13 01:00:30+00:00».</text:p>
        </text:list-item>
        <text:list-item>
          <text:p text:style-name="P37">«01:00» предположим, что текущая дата на сервере платформы - 2018-12-20, тогда «01:00» будет преобразовано в «2018-12-20 01:00:00+00:00».</text:p>
        </text:list-item>
        <text:list-item>
          <text:p text:style-name="P37">«01:00,5+03:00» равно (оставим предыдущее предположение о дате) «2018-12-20 01:00:30+3:00».</text:p>
        </text:list-item>
        <text:list-item>
          <text:p text:style-name="P37">другие примеры указания времени можно посмотреть на странице стандарта ISO 8601.</text:p>
        </text:list-item>
      </text:list>
      <text:p text:style-name="Text_20_body"><text:span text:style-name="T6">finish</text:span> (int, str), необязательный <text:tab/><text:tab/>— метка времени конца периода, соответствует тем же правилам, что и ключ start.</text:p>
      <text:p text:style-name="Text_20_body"><text:span text:style-name="T6">count</text:span> (int), необязательный <text:tab/><text:tab/><text:tab/>— количество значений, ожидаемых в ответе.</text:p>
      <text:p text:style-name="Text_20_body"><text:span text:style-name="T6">timeStep</text:span> (int), необязательный <text:tab/><text:tab/>— промежуток времени между соседними возвращаемыми значениями тэга</text:p>
      <text:p text:style-name="Text_20_body"><text:span text:style-name="T6">maxCount</text:span> (int), необязательный <text:tab/><text:tab/>— ключ используется, в основном, виджетами и принимает значение ширины виджета в пикселях. Таким образом, платформа знает, что виджет не может показать больше значений, чем указано в maxCount. В этом случае платформа возвращает не больше значений, чем указано в maxCount.</text:p>
      <text:p text:style-name="Text_20_body">Ключ maxCount предотвращает излишнюю загрузку платформы при работе с большими массивами данных.</text:p>
      <text:p text:style-name="Text_20_body"><text:span text:style-name="T6">format</text:span> (любой тип и значение), необязательный <text:tab/>— если этот ключ присутствует и не равен None, тогда метки времени возвращаются в виде строк в формате ISO 8601, часовая зона - зона сервера, на котором работает платформа.</text:p>
      <text:p text:style-name="Text_20_body"><text:soft-page-break/><text:span text:style-name="T6">actual</text:span> (bool), необязательный <text:tab/><text:tab/>— если этот ключ присутствует и установлен в true, тогда в ответе на запрос присутствуют только реальные записанные базу данных значения тэга.</text:p>
      <text:p text:style-name="Text_20_body"><text:span text:style-name="T6">value</text:span> (any), необязательный <text:tab/><text:tab/><text:tab/>— фильтр значений тега.</text:p>
      <text:h text:style-name="Heading_20_2" text:outline-level="2"><text:bookmark-start text:name="__RefHeading___Toc897_3861748061"/>Формат ответа на запрос на получение данных<text:bookmark-end text:name="__RefHeading___Toc897_3861748061"/></text:h>
      <text:p text:style-name="Text_20_body">Пример:</text:p>
      <text:p text:style-name="Код">{</text:p>
      <text:p text:style-name="Код"><text:s text:c="3"/>"data": [</text:p>
      <text:p text:style-name="Код"><text:s text:c="5"/>{</text:p>
      <text:p text:style-name="Код"><text:s text:c="7"/>"exceed": false,</text:p>
      <text:p text:style-name="Код"><text:s text:c="7"/>"tagId": "id тега",</text:p>
      <text:p text:style-name="Код"><text:s text:c="7"/>"data": [</text:p>
      <text:p text:style-name="Код"><text:s text:c="9"/>[1, "2018-12-31T00:00:00+03:00", null],</text:p>
      <text:p text:style-name="Код"><text:s text:c="9"/>[120, "2018-12-31T00:01:00+03:00", null]</text:p>
      <text:p text:style-name="Код"><text:s text:c="7"/>]</text:p>
      <text:p text:style-name="Код"><text:s text:c="5"/>}</text:p>
      <text:p text:style-name="Код"><text:s text:c="3"/>]</text:p>
      <text:p text:style-name="Код">}</text:p>
      <text:p text:style-name="Text_20_body">Если запрос выполнен без ошибок, ответ всегда содержит один ключ — data, который является массивом элементов типа json, каждый элемент — данные по одному тегу из запроса.</text:p>
      <text:p text:style-name="Text_20_body">Ключи элемента из массива:</text:p>
      <text:p text:style-name="Text_20_body"><text:span text:style-name="T6">exceed</text:span> (bool) <text:tab/><text:tab/>— флаг того, что данных в архиве больше, чем запрошено; логика работы флага: если в запросе указан ключ maxCount, то в ответе устанавливается флаг exceed; если этот флаг = true, то это означает, что в архиве содержится больше значений, чем указано в запросе в ключе maxCount, поэтому возвращённые значения тега усреденены и лучший выход - изменить запрос, запросив меньшее количество значений тега; если в запросе нет ключа maxCount, то ключ exceed в ответе отсутствует;</text:p>
      <text:p text:style-name="Text_20_body"><text:span text:style-name="T6">tagId</text:span> (str) <text:tab/><text:tab/><text:tab/>— идентификатор тега;</text:p>
      <text:p text:style-name="P22"><text:span text:style-name="T6">data</text:span> (массив массивов) <text:tab/>— массив значений, попадающих в запрошенный период; каждый элемент массива - в свою очередь, тоже массив и состоит из трёх элементов: [y, x , q], <text:line-break/>где: <text:line-break/>y - значение тега; <text:line-break/>x - метка времени, с которой записано значение тега; <text:line-break/>q - код качества значения.</text:p>
      <text:p text:style-name="Text_20_body">Ниже — примеры запросов.</text:p>
      <text:h text:style-name="Heading_20_2" text:outline-level="2"><text:bookmark-start text:name="__RefHeading___Toc899_3861748061"/>Получение текущего значения тэга<text:bookmark-end text:name="__RefHeading___Toc899_3861748061"/></text:h>
      <text:p text:style-name="Text_20_body">Самый простой запрос на получение данных выглядит так:</text:p>
      <text:p text:style-name="Код"><text:soft-page-break/>{</text:p>
      <text:p text:style-name="Код"><text:s text:c="2"/>"tagId": "1500c712-726a-103e-9264-a5021ec"</text:p>
      <text:p text:style-name="Код">}</text:p>
      <text:p text:style-name="Text_20_body">Запрос выше показывает, как можно получить текущее значение одного тэга.</text:p>
      <text:p text:style-name="Text_20_body">Допустим, текущий момент времени — 09:53:</text:p>
      <text:p text:style-name="Text_20_body"/>
      <text:p text:style-name="Text_20_body"><draw:frame draw:style-name="fr6" draw:name="Изображение4" text:anchor-type="char" svg:x="2.681cm" svg:y="-0.289cm" svg:width="9.29cm" svg:height="5.405cm" draw:z-index="150"><draw:image xlink:href="Pictures/1000000100000328000001D69BFDE014.png" xlink:type="simple" xlink:show="embed" xlink:actuate="onLoad" draw:mime-type="image/png"/></draw:frame>Ответом буде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4, 1545288780000000, null]</text:p>
      <text:p text:style-name="Код"><text:s text:c="6"/>]</text:p>
      <text:p text:style-name="Код"><text:s text:c="4"/>}</text:p>
      <text:p text:style-name="Код"><text:s text:c="2"/>]</text:p>
      <text:p text:style-name="Код">}</text:p>
      <text:p text:style-name="Text_20_body">В соответствии с правилом 2 текущее значение тэга - 4. Метка времени (1545288780000000) соответствует текущему моменту времени. Такой ответ будет идентичен для тэгов с атрибутом prsStep, равным true и false.</text:p>
      <text:p text:style-name="Attention">Для простоты понимания меток времени во всех следующих запросах будем использовать ключ format.<text:line-break/>Опять же для простоты исключим из всех дальнейших меток времени дату.</text:p>
      <text:h text:style-name="Heading_20_2" text:outline-level="2"><text:bookmark-start text:name="__RefHeading___Toc901_3861748061"/>Метки времени в будущем и prsStep = false<text:bookmark-end text:name="__RefHeading___Toc901_3861748061"/></text:h>
      <text:p text:style-name="Text_20_body">Допустим, текущий момент времени 09:47:30. Это значит, что мы имеем одно значение тэга, сохранённое с меткой времени в будущем. Пусть prsStep = false, то есть мы должны интерполировать значения тэгов.</text:p>
      <text:p text:style-name="P9"><text:soft-page-break/><draw:frame draw:style-name="fr2" draw:name="Изображение5" text:anchor-type="as-char" svg:width="10.834cm" svg:height="6.248cm" draw:z-index="141"><draw:image xlink:href="Pictures/1000000100000328000001D2544FF5C0.png" xlink:type="simple" xlink:show="embed" xlink:actuate="onLoad" draw:mime-type="image/png"/></draw:frame></text:p>
      <text:p text:style-name="Text_20_body">Тогда запрос</text:p>
      <text:p text:style-name="Код">{</text:p>
      <text:p text:style-name="Код"><text:s text:c="2"/>"tagId": "1500c712-726a-103e-9264-a5021ec2dae1",</text:p>
      <text:p text:style-name="Код"><text:s text:c="2"/>"format": true</text:p>
      <text:p text:style-name="Код">}</text:p>
      <text:p text:style-name="Text_20_body">Вернё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4.5, "09:47:30", null]</text:p>
      <text:p text:style-name="Код"><text:s text:c="6"/>]</text:p>
      <text:p text:style-name="Код"><text:s text:c="4"/>}</text:p>
      <text:p text:style-name="Код"><text:s text:c="2"/>]</text:p>
      <text:p text:style-name="Код">}</text:p>
      <text:h text:style-name="Heading_20_2" text:outline-level="2"><text:bookmark-start text:name="__RefHeading___Toc903_3861748061"/>Метки времени в будущем, prsStep = true<text:bookmark-end text:name="__RefHeading___Toc903_3861748061"/></text:h>
      <text:p text:style-name="Text_20_body">Этот пример отличается от предыдущего тем, что prsStep = true.</text:p>
      <text:p text:style-name="P9"><draw:frame draw:style-name="fr2" draw:name="Изображение6" text:anchor-type="as-char" svg:width="10.883cm" svg:height="6.276cm" draw:z-index="140"><draw:image xlink:href="Pictures/1000000100000328000001D2DF50CC0B.png" xlink:type="simple" xlink:show="embed" xlink:actuate="onLoad" draw:mime-type="image/png"/></draw:frame></text:p>
      <text:p text:style-name="P23"><text:soft-page-break/>Тогда запрос</text:p>
      <text:p text:style-name="Код">{</text:p>
      <text:p text:style-name="Код"><text:s text:c="2"/>"tagId": "1500c712-726a-103e-9264-a5021ec2dae1",</text:p>
      <text:p text:style-name="Код"><text:s text:c="2"/>"format": true</text:p>
      <text:p text:style-name="Код">}</text:p>
      <text:p text:style-name="P23">Вернё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5, "09:47:30", null]</text:p>
      <text:p text:style-name="Код"><text:s text:c="6"/>]</text:p>
      <text:p text:style-name="Код"><text:s text:c="4"/>}</text:p>
      <text:p text:style-name="Код"><text:s text:c="2"/>]</text:p>
      <text:p text:style-name="Код">}</text:p>
      <text:h text:style-name="Heading_20_2" text:outline-level="2"><text:bookmark-start text:name="__RefHeading___Toc905_3861748061"/>Ключ start<text:bookmark-end text:name="__RefHeading___Toc905_3861748061"/></text:h>
      <text:h text:style-name="Heading_20_3" text:outline-level="3"><text:bookmark-start text:name="__RefHeading___Toc907_3861748061"/>prsStep = false<text:bookmark-end text:name="__RefHeading___Toc907_3861748061"/></text:h>
      <text:p text:style-name="P23">Добавим к нашему запросу ключ start. Ключ start устанавливает начало периода для получения данных. Пусть start = 09:32:30 и prsStep = false.</text:p>
      <text:p text:style-name="P9"><draw:frame draw:style-name="fr2" draw:name="Изображение7" text:anchor-type="as-char" svg:width="10.717cm" svg:height="6.181cm" draw:z-index="138"><draw:image xlink:href="Pictures/1000000100000328000001D2D7953EBD.png" xlink:type="simple" xlink:show="embed" xlink:actuate="onLoad" draw:mime-type="image/png"/></draw:frame></text:p>
      <text:p text:style-name="P23">Запрос:</text:p>
      <text:p text:style-name="Код">{</text:p>
      <text:p text:style-name="Код"><text:s text:c="2"/>"tagId": "1500c712-726a-103e-9264-a5021ec2dae1",</text:p>
      <text:p text:style-name="Код"><text:s text:c="2"/>"format": true,</text:p>
      <text:p text:style-name="Код"><text:s text:c="2"/>"start": "09:32:30"</text:p>
      <text:p text:style-name="Код">}</text:p>
      <text:p text:style-name="P23">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2, "09:32:30", null],</text:p>
      <text:p text:style-name="Код"><text:s text:c="8"/>[3, "09:35:00", null],</text:p>
      <text:p text:style-name="Код"><text:s text:c="8"/>[2.5, "09:40:00", null],</text:p>
      <text:p text:style-name="Код"><text:s text:c="8"/>[5, "09:45:00", null],</text:p>
      <text:p text:style-name="Код"><text:s text:c="8"/>[4, "09:50:00", null],</text:p>
      <text:p text:style-name="Код"><text:s text:c="8"/>[4, "09:53:00", null]</text:p>
      <text:p text:style-name="Код"><text:s text:c="6"/>]</text:p>
      <text:p text:style-name="Код"><text:s text:c="4"/>}</text:p>
      <text:p text:style-name="Код"><text:s text:c="2"/>]</text:p>
      <text:p text:style-name="Код">}</text:p>
      <text:h text:style-name="Heading_20_3" text:outline-level="3"><text:bookmark-start text:name="__RefHeading___Toc909_3861748061"/>prsStep = true<text:bookmark-end text:name="__RefHeading___Toc909_3861748061"/></text:h>
      <text:p text:style-name="P9"><draw:frame draw:style-name="fr2" draw:name="Изображение8" text:anchor-type="as-char" svg:width="10.437cm" svg:height="6.018cm" draw:z-index="139"><draw:image xlink:href="Pictures/1000000100000328000001D21BA0D1EA.png" xlink:type="simple" xlink:show="embed" xlink:actuate="onLoad" draw:mime-type="image/png"/></draw:frame></text:p>
      <text:p text:style-name="P23">Запрос:</text:p>
      <text:p text:style-name="Код">{</text:p>
      <text:p text:style-name="Код"><text:s text:c="2"/>"tagId": "1500c712-726a-103e-9264-a5021ec2dae1",</text:p>
      <text:p text:style-name="Код"><text:s text:c="2"/>"format": true,</text:p>
      <text:p text:style-name="Код"><text:s text:c="2"/>"start": "09:32:30"</text:p>
      <text:p text:style-name="Код">}</text:p>
      <text:p text:style-name="P23">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1, "09:32:30", null],</text:p>
      <text:p text:style-name="Код"><text:s text:c="8"/>[3, "09:35:00", null],</text:p>
      <text:p text:style-name="Код"><text:s text:c="8"/>[2.5, "09:40:00", null],</text:p>
      <text:p text:style-name="Код"><text:s text:c="8"/>[5, "09:45:00", null],</text:p>
      <text:p text:style-name="Код"><text:s text:c="8"/>[4, "09:50:00", null],</text:p>
      <text:p text:style-name="Код"><text:s text:c="8"/>[4, "09:53:00", null]</text:p>
      <text:p text:style-name="Код"><text:s text:c="6"/>]</text:p>
      <text:p text:style-name="Код"><text:s text:c="4"/>}</text:p>
      <text:p text:style-name="Код"><text:s text:c="2"/>]</text:p>
      <text:p text:style-name="Код">}</text:p>
      <text:h text:style-name="Heading_20_3" text:outline-level="3"><text:bookmark-start text:name="__RefHeading___Toc911_3861748061"/>Начало периода в запросе - перед любой меткой времени в базе<text:bookmark-end text:name="__RefHeading___Toc911_3861748061"/></text:h>
      <text:p text:style-name="P23">Пусть start = 09:27:30.</text:p>
      <text:p text:style-name="P9"><draw:frame draw:style-name="fr2" draw:name="Изображение9" text:anchor-type="as-char" svg:width="10.419cm" svg:height="6.01cm" draw:z-index="137"><draw:image xlink:href="Pictures/1000000100000328000001D2B42D9FCE.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start": "09:27:30"</text:p>
      <text:p text:style-name="Код">}</text:p>
      <text:p text:style-name="Text_20_body">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null ,"09:27:30", null],</text:p>
      <text:p text:style-name="Код"><text:s text:c="8"/>[1, "09:30:00", null],</text:p>
      <text:p text:style-name="Код"><text:s text:c="8"/>[3, "09:35:00", null],</text:p>
      <text:p text:style-name="Код"><text:s text:c="8"/>[2.5, "09:40:00", null],</text:p>
      <text:p text:style-name="Код"><text:s text:c="8"/>[5, "09:45:00", null],</text:p>
      <text:p text:style-name="Код"><text:s text:c="8"/>[4, "09:50:00", null],</text:p>
      <text:p text:style-name="Код"><text:s text:c="8"/>[4, "09:53:00", null]</text:p>
      <text:p text:style-name="Код"><text:s text:c="6"/>]</text:p>
      <text:p text:style-name="Код"><text:s text:c="4"/>}</text:p>
      <text:p text:style-name="Код"><text:s text:c="2"/>]</text:p>
      <text:p text:style-name="Код">}</text:p>
      <text:h text:style-name="Heading_20_3" text:outline-level="3"><text:bookmark-start text:name="__RefHeading___Toc913_3861748061"/>Начало периода в запросе - после любой метки времени в базе<text:bookmark-end text:name="__RefHeading___Toc913_3861748061"/></text:h>
      <text:p text:style-name="Text_20_body">Пусть start = 09:52:30.</text:p>
      <text:p text:style-name="P9"><draw:frame draw:style-name="fr2" draw:name="Изображение10" text:anchor-type="as-char" svg:width="10.123cm" svg:height="5.838cm" draw:z-index="136"><draw:image xlink:href="Pictures/1000000000000328000001D23E5C910E.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start": "09:52:30"</text:p>
      <text:p text:style-name="Код">}</text:p>
      <text:p text:style-name="Text_20_body">Возвращается последнее значение в базе как на метку start, так и на текущую метку времени.</text:p>
      <text:p text:style-name="Text_20_body">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4, "09:52:30", null],</text:p>
      <text:p text:style-name="Код"><text:s text:c="8"/>[4, "09:55:00", null]</text:p>
      <text:p text:style-name="Код"><text:s text:c="6"/>]</text:p>
      <text:p text:style-name="Код"><text:s text:c="4"/>}</text:p>
      <text:p text:style-name="Код"><text:s text:c="2"/>]</text:p>
      <text:p text:style-name="Код">}</text:p>
      <text:h text:style-name="Heading_20_2" text:outline-level="2"><text:bookmark-start text:name="__RefHeading___Toc915_3861748061"/>Ключ finish<text:bookmark-end text:name="__RefHeading___Toc915_3861748061"/></text:h>
      <text:h text:style-name="Heading_20_3" text:outline-level="3"><text:bookmark-start text:name="__RefHeading___Toc917_3861748061"/>finish = произвольной метке времени<text:bookmark-end text:name="__RefHeading___Toc917_3861748061"/></text:h>
      <text:p text:style-name="Text_20_body">Устанавливая ключ finish, мы ограничиваем конец периода получения данных.</text:p>
      <text:p text:style-name="P9"><draw:frame draw:style-name="fr2" draw:name="Изображение11" text:anchor-type="as-char" svg:width="9.913cm" svg:height="5.717cm" draw:z-index="133"><draw:image xlink:href="Pictures/1000000100000328000001D2160D4966.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finish": "09:32:30"</text:p>
      <text:p text:style-name="Код">}</text:p>
      <text:p text:style-name="Text_20_body">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2, "09:32:30", null]</text:p>
      <text:p text:style-name="Код"><text:s text:c="6"/>]</text:p>
      <text:p text:style-name="Код"><text:s text:c="4"/>}</text:p>
      <text:p text:style-name="Код"><text:s text:c="2"/>]</text:p>
      <text:p text:style-name="Код">}</text:p>
      <text:h text:style-name="Heading_20_3" text:outline-level="3"><text:bookmark-start text:name="__RefHeading___Toc919_3861748061"/>Ключ finish установлен перед любой <text:line-break/>существующей в базе меткой времени<text:bookmark-end text:name="__RefHeading___Toc919_3861748061"/></text:h>
      <text:p text:style-name="P9"><draw:frame draw:style-name="fr2" draw:name="Изображение12" text:anchor-type="as-char" svg:width="10.022cm" svg:height="5.78cm" draw:z-index="134"><draw:image xlink:href="Pictures/1000000100000328000001D209AF7705.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finish": "09:27:30"</text:p>
      <text:p text:style-name="Код">}</text:p>
      <text:p text:style-name="Text_20_body">Отве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09:27:30", "y": null]</text:p>
      <text:p text:style-name="Код"><text:s text:c="6"/>]</text:p>
      <text:p text:style-name="Код"><text:s text:c="4"/>}</text:p>
      <text:p text:style-name="Код"><text:s text:c="2"/>]</text:p>
      <text:p text:style-name="Код">}</text:p>
      <text:h text:style-name="Heading_20_3" text:outline-level="3"><text:bookmark-start text:name="__RefHeading___Toc921_3861748061"/>Ключ finish равен текущей метке времени<text:bookmark-end text:name="__RefHeading___Toc921_3861748061"/></text:h>
      <text:p text:style-name="Text_20_body">Если мы установим ключ finish на текущую метку времени, то запрос будет в точности таким же, как в запросе «Получение текущего значения тэга».</text:p>
      <text:h text:style-name="Heading_20_2" text:outline-level="2"><text:bookmark-start text:name="__RefHeading___Toc923_3861748061"/><text:soft-page-break/>Ключи start и finish<text:bookmark-end text:name="__RefHeading___Toc923_3861748061"/></text:h>
      <text:p text:style-name="Text_20_body">Ниже — несколько примеров одновременно установленных ключей start и finish.</text:p>
      <text:h text:style-name="Heading_20_3" text:outline-level="3"><text:bookmark-start text:name="__RefHeading___Toc925_3861748061"/>start и finish внутри существующих в базе меток<text:bookmark-end text:name="__RefHeading___Toc925_3861748061"/></text:h>
      <text:p text:style-name="P9"><draw:frame draw:style-name="fr2" draw:name="Изображение13" text:anchor-type="as-char" svg:width="9.839cm" svg:height="5.674cm" draw:z-index="130"><draw:image xlink:href="Pictures/1000000100000328000001D24BFE3490.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start": "09:32:30",</text:p>
      <text:p text:style-name="Код"><text:s text:c="2"/>"finish": "09:47:30"</text:p>
      <text:p text:style-name="Код">}</text:p>
      <text:p text:style-name="Text_20_body">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2, "09:32:30", null],</text:p>
      <text:p text:style-name="Код"><text:s text:c="8"/>[3, "09:35:00", null],</text:p>
      <text:p text:style-name="Код"><text:s text:c="8"/>[2.5, "09:40:00", null],</text:p>
      <text:p text:style-name="Код"><text:s text:c="8"/>[5, "09:45:00", null],</text:p>
      <text:p text:style-name="Код"><text:s text:c="8"/>[4.5, "09:47:30", null]</text:p>
      <text:p text:style-name="Код"><text:s text:c="6"/>]</text:p>
      <text:p text:style-name="Код"><text:s text:c="4"/>}</text:p>
      <text:p text:style-name="Код"><text:s text:c="2"/>]</text:p>
      <text:p text:style-name="Код">}</text:p>
      <text:h text:style-name="Heading_20_3" text:outline-level="3"><text:bookmark-start text:name="__RefHeading___Toc927_3861748061"/>start выходит за пределы меток<text:bookmark-end text:name="__RefHeading___Toc927_3861748061"/></text:h>
      <text:p text:style-name="P9"><draw:frame draw:style-name="fr2" draw:name="Изображение14" text:anchor-type="as-char" svg:width="9.996cm" svg:height="5.764cm" draw:z-index="132"><draw:image xlink:href="Pictures/1000000100000328000001D247A8DEC2.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start": "09:27:30",</text:p>
      <text:p text:style-name="Код"><text:s text:c="2"/>"finish": "09:47:30"</text:p>
      <text:p text:style-name="Код">}</text:p>
      <text:p text:style-name="Text_20_body">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null, "09:27:30", null],</text:p>
      <text:p text:style-name="Код"><text:s text:c="8"/>[1, "09:30:00", null],</text:p>
      <text:p text:style-name="Код"><text:s text:c="8"/>[3, "09:35:00", null],</text:p>
      <text:p text:style-name="Код"><text:s text:c="8"/>[2.5, "09:40:00", null],</text:p>
      <text:p text:style-name="Код"><text:s text:c="8"/>[5, "09:45:00", null],</text:p>
      <text:p text:style-name="Код"><text:s text:c="8"/>[4.5, "09:47:30", null]</text:p>
      <text:p text:style-name="Код"><text:s text:c="6"/>]</text:p>
      <text:p text:style-name="Код"><text:s text:c="4"/>}</text:p>
      <text:p text:style-name="Код"><text:s text:c="2"/>]</text:p>
      <text:p text:style-name="Код">}</text:p>
      <text:h text:style-name="Heading_20_3" text:outline-level="3"><text:bookmark-start text:name="__RefHeading___Toc929_3861748061"/>start и finish вне меток времени<text:bookmark-end text:name="__RefHeading___Toc929_3861748061"/></text:h>
      <text:p text:style-name="P9"><draw:frame draw:style-name="fr2" draw:name="Изображение15" text:anchor-type="as-char" svg:width="9.957cm" svg:height="5.743cm" draw:z-index="131"><draw:image xlink:href="Pictures/1000000100000328000001D29C343D5D.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start": "09:27:30",</text:p>
      <text:p text:style-name="Код"><text:s text:c="2"/>"finish": "09:55:00"</text:p>
      <text:p text:style-name="Код">}</text:p>
      <text:p text:style-name="Text_20_body">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null, "09:27:30", null],</text:p>
      <text:p text:style-name="Код"><text:s text:c="8"/>[1, "09:30:00", null],</text:p>
      <text:p text:style-name="Код"><text:s text:c="8"/>[3, "09:35:00", null],</text:p>
      <text:p text:style-name="Код"><text:s text:c="8"/>[2.5, "09:40:00", null],</text:p>
      <text:p text:style-name="Код"><text:s text:c="8"/>[5, "09:45:00", null],</text:p>
      <text:p text:style-name="Код"><text:s text:c="8"/>[4, "09:50:00", null],</text:p>
      <text:p text:style-name="Код"><text:s text:c="8"/>[4, "09:55:00", null]</text:p>
      <text:p text:style-name="Код"><text:s text:c="6"/>]</text:p>
      <text:p text:style-name="Код"><text:s text:c="4"/>}</text:p>
      <text:p text:style-name="Код"><text:s text:c="2"/>]</text:p>
      <text:p text:style-name="Код">}</text:p>
      <text:h text:style-name="Heading_20_2" text:outline-level="2"><text:bookmark-start text:name="__RefHeading___Toc931_3861748061"/>Ключ count<text:bookmark-end text:name="__RefHeading___Toc931_3861748061"/></text:h>
      <text:p text:style-name="Text_20_body">Ключ count определяет запрашиваемое количество данных.</text:p>
      <text:p text:style-name="Text_20_body">В соответствии с правилом 10 ключ finish равен текущей метке времени в случае, если установлен только ключ count.</text:p>
      <text:h text:style-name="Heading_20_2" text:outline-level="2"><text:bookmark-start text:name="__RefHeading___Toc933_3861748061"/>Ключи count и finish<text:bookmark-end text:name="__RefHeading___Toc933_3861748061"/></text:h>
      <text:p text:style-name="Text_20_body">Предположим, что мы установили ключ finish на момент времени, не существующий в базе данных:</text:p>
      <text:p text:style-name="P9"><draw:frame draw:style-name="fr2" draw:name="Изображение16" text:anchor-type="as-char" svg:width="9.805cm" svg:height="5.655cm" draw:z-index="128"><draw:image xlink:href="Pictures/1000000100000328000001D2A9D6B970.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finish": "09:47:30",</text:p>
      <text:p text:style-name="Код"><text:s text:c="2"/>"count": 3</text:p>
      <text:p text:style-name="Код">}</text:p>
      <text:p text:style-name="Text_20_body">Этот запрос вернёт два сохранённых значения и одно интерполированное.</text:p>
      <text:p text:style-name="Text_20_body"><text:soft-page-break/>Отве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2.5, "09:40:00", null],</text:p>
      <text:p text:style-name="Код"><text:s text:c="8"/>[5, "09:45:00", null],</text:p>
      <text:p text:style-name="Код"><text:s text:c="8"/>[4.5, "09:47:30", null]</text:p>
      <text:p text:style-name="Код"><text:s text:c="6"/>]</text:p>
      <text:p text:style-name="Код"><text:s text:c="4"/>}</text:p>
      <text:p text:style-name="Код"><text:s text:c="2"/>]</text:p>
      <text:p text:style-name="Код">}</text:p>
      <text:p text:style-name="Text_20_body">Следующий пример показывает, что мы получим в случае, если ключ finish равен существующей в базе метке времени:</text:p>
      <text:p text:style-name="P9"><draw:frame draw:style-name="fr2" draw:name="Изображение17" text:anchor-type="as-char" svg:width="9.693cm" svg:height="5.95cm" draw:z-index="127"><draw:image xlink:href="Pictures/1000000100000328000001F009EC30A1.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finish": "09:45:00",</text:p>
      <text:p text:style-name="Код"><text:s text:c="2"/>"count": 3</text:p>
      <text:p text:style-name="Код">}</text:p>
      <text:p text:style-name="Text_20_body">Запрос вернёт три сохранённых значения.</text:p>
      <text:p text:style-name="Text_20_body">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3, "09:35:00", null],</text:p>
      <text:p text:style-name="Код"><text:s text:c="8"/>[2.5, "09:40:00", null],</text:p>
      <text:p text:style-name="Код"><text:s text:c="8"/>[5, "09:45:00", null]</text:p>
      <text:p text:style-name="Код"><text:s text:c="6"/>]</text:p>
      <text:p text:style-name="Код"><text:s text:c="4"/>}</text:p>
      <text:p text:style-name="Код"><text:s text:c="2"/>]</text:p>
      <text:p text:style-name="Код">}</text:p>
      <text:p text:style-name="Text_20_body">Запрос:</text:p>
      <text:p text:style-name="Text_20_body">Ключ count превышает количество существующих значений (основываемся на предыдущей картинке).</text:p>
      <text:p text:style-name="Код">{</text:p>
      <text:p text:style-name="P25"><text:s text:c="2"/>"tagId": "1500c712-726a-103e-9264-a5021ec2dae1",</text:p>
      <text:p text:style-name="Код"><text:s text:c="2"/>"format": true,</text:p>
      <text:p text:style-name="Код"><text:s text:c="2"/>"finish": "09:45:00",</text:p>
      <text:p text:style-name="Код"><text:s text:c="2"/>"count": 5</text:p>
      <text:p text:style-name="Код">}</text:p>
      <text:p text:style-name="Text_20_body">Отве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1, "09:30:00", null],</text:p>
      <text:p text:style-name="Код"><text:s text:c="8"/>[3, "09:35:00", null],</text:p>
      <text:p text:style-name="Код"><text:s text:c="8"/>[2.5, "09:40:00", null],</text:p>
      <text:p text:style-name="Код"><text:s text:c="8"/>[5, "09:45:00", null]</text:p>
      <text:p text:style-name="Код"><text:s text:c="6"/>]</text:p>
      <text:p text:style-name="Код"><text:s text:c="4"/>}</text:p>
      <text:p text:style-name="Код"><text:s text:c="2"/>]</text:p>
      <text:p text:style-name="Код">}</text:p>
      <text:p text:style-name="Text_20_body">Ключ finish превышает последнюю существующую метку времени:</text:p>
      <text:p text:style-name="P9"><draw:frame draw:style-name="fr2" draw:name="Изображение18" text:anchor-type="as-char" svg:width="10.141cm" svg:height="6.225cm" draw:z-index="125"><draw:image xlink:href="Pictures/1000000100000328000001F0AC713E13.png" xlink:type="simple" xlink:show="embed" xlink:actuate="onLoad" draw:mime-type="image/png"/></draw:frame></text:p>
      <text:p text:style-name="Text_20_body"><text:soft-page-break/>Запрос:</text:p>
      <text:p text:style-name="Код">{</text:p>
      <text:p text:style-name="Код"><text:s text:c="2"/>"tagId": "1500c712-726a-103e-9264-a5021ec",</text:p>
      <text:p text:style-name="Код"><text:s text:c="2"/>"format": true,</text:p>
      <text:p text:style-name="Код"><text:s text:c="2"/>"finish": "09:52:30",</text:p>
      <text:p text:style-name="Код"><text:s text:c="2"/>"count": 3</text:p>
      <text:p text:style-name="Код">}</text:p>
      <text:p text:style-name="Text_20_body">Будут возвращены два сохранённых и последнее существующее значение на метку времени finish:</text:p>
      <text:p text:style-name="Text_20_body">Отве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5, "09:45:00", null],</text:p>
      <text:p text:style-name="Код"><text:s text:c="8"/>[4, "09:50:00", null],</text:p>
      <text:p text:style-name="Код"><text:s text:c="8"/>[4, "09:52:30", null]</text:p>
      <text:p text:style-name="Код"><text:s text:c="6"/>]</text:p>
      <text:p text:style-name="Код"><text:s text:c="4"/>}</text:p>
      <text:p text:style-name="Код"><text:s text:c="2"/>]</text:p>
      <text:p text:style-name="Код">}</text:p>
      <text:h text:style-name="Heading_20_2" text:outline-level="2"><text:bookmark-start text:name="__RefHeading___Toc935_3861748061"/>Ключи count и start<text:bookmark-end text:name="__RefHeading___Toc935_3861748061"/></text:h>
      <text:p text:style-name="Text_20_body">Совместное использование ключей count и start похоже на случай совместного использования ключей finish и count за исключением того, что мы ограничиваем не конец периода, а начало.</text:p>
      <text:p text:style-name="Text_20_body">Несколько следующих примеров основываются на следующей картинке:</text:p>
      <text:p text:style-name="P9"><draw:frame draw:style-name="fr2" draw:name="Изображение19" text:anchor-type="as-char" svg:width="10.151cm" svg:height="6.181cm" draw:z-index="124"><draw:image xlink:href="Pictures/1000000100000328000001EC4A26F9A0.png" xlink:type="simple" xlink:show="embed" xlink:actuate="onLoad" draw:mime-type="image/png"/></draw:frame></text:p>
      <text:p text:style-name="Text_20_body">Запрос count = 1:</text:p>
      <text:p text:style-name="Код"><text:soft-page-break/>{</text:p>
      <text:p text:style-name="Код"><text:s text:c="2"/>"tagId": "1500c712-726a-103e-9264-a5021ec",</text:p>
      <text:p text:style-name="Код"><text:s text:c="2"/>"format": true,</text:p>
      <text:p text:style-name="Код"><text:s text:c="2"/>"start": "09:42:30",</text:p>
      <text:p text:style-name="Код"><text:s text:c="2"/>"count": 1</text:p>
      <text:p text:style-name="Код">}</text:p>
      <text:p text:style-name="Text_20_body">Отве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3.3, "09:42:30", null]</text:p>
      <text:p text:style-name="Код"><text:s text:c="6"/>]</text:p>
      <text:p text:style-name="Код"><text:s text:c="4"/>}</text:p>
      <text:p text:style-name="Код"><text:s text:c="2"/>]</text:p>
      <text:p text:style-name="Код">}</text:p>
      <text:p text:style-name="Text_20_body">Запрос count = 2:</text:p>
      <text:p text:style-name="Код">{</text:p>
      <text:p text:style-name="Код"><text:s text:c="2"/>"tagId": "1500c712-726a-103e-9264-a5021ec",</text:p>
      <text:p text:style-name="Код"><text:s text:c="2"/>"format": true,</text:p>
      <text:p text:style-name="Код"><text:s text:c="2"/>"start": "09:42:30",</text:p>
      <text:p text:style-name="Код"><text:s text:c="2"/>"count": 2</text:p>
      <text:p text:style-name="Код">}</text:p>
      <text:p text:style-name="Text_20_body">Отве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3.3, "09:42:30", null],</text:p>
      <text:p text:style-name="Код"><text:s text:c="8"/>[5, "09:45:00", null]</text:p>
      <text:p text:style-name="Код"><text:s text:c="6"/>]</text:p>
      <text:p text:style-name="Код"><text:s text:c="4"/>}</text:p>
      <text:p text:style-name="Код"><text:s text:c="2"/>]</text:p>
      <text:p text:style-name="Код">}</text:p>
      <text:p text:style-name="Text_20_body">Запрос count = 3:</text:p>
      <text:p text:style-name="Код">{</text:p>
      <text:p text:style-name="Код"><text:s text:c="2"/>"tagId": "1500c712-726a-103e-9264-a5021ec",</text:p>
      <text:p text:style-name="Код"><text:s text:c="2"/>"format": true,</text:p>
      <text:p text:style-name="Код"><text:s text:c="2"/>"start": "09:42:30",</text:p>
      <text:p text:style-name="Код"><text:s text:c="2"/>"count": 3</text:p>
      <text:p text:style-name="Код">}</text:p>
      <text:p text:style-name="Text_20_body">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3.3, "09:42:30", null],</text:p>
      <text:p text:style-name="Код"><text:s text:c="8"/>[5, "09:45:00", null],</text:p>
      <text:p text:style-name="Код"><text:s text:c="8"/>[4, "09:50:00", null]</text:p>
      <text:p text:style-name="Код"><text:s text:c="6"/>]</text:p>
      <text:p text:style-name="Код"><text:s text:c="4"/>}</text:p>
      <text:p text:style-name="Код"><text:s text:c="2"/>]</text:p>
      <text:p text:style-name="Код">}</text:p>
      <text:p text:style-name="Text_20_body">Запрос count = 4:</text:p>
      <text:p text:style-name="Код">{</text:p>
      <text:p text:style-name="Код"><text:s text:c="2"/>"tagId": "1500c712-726a-103e-9264-a5021ec",</text:p>
      <text:p text:style-name="Код"><text:s text:c="2"/>"format": true,</text:p>
      <text:p text:style-name="Код"><text:s text:c="2"/>"start": "09:42:30",</text:p>
      <text:p text:style-name="Код"><text:s text:c="2"/>"count": 4</text:p>
      <text:p text:style-name="Код">}</text:p>
      <text:p text:style-name="Text_20_body">Отве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3.3, "09:42:30", null],</text:p>
      <text:p text:style-name="Код"><text:s text:c="8"/>[5, "09:45:00", null],</text:p>
      <text:p text:style-name="Код"><text:s text:c="8"/>[4, "09:50:00", null],</text:p>
      <text:p text:style-name="Код"><text:s text:c="8"/>[4, "09:52:30", null]</text:p>
      <text:p text:style-name="Код"><text:s text:c="6"/>]</text:p>
      <text:p text:style-name="Код"><text:s text:c="4"/>}</text:p>
      <text:p text:style-name="Код"><text:s text:c="2"/>]</text:p>
      <text:p text:style-name="Код">}</text:p>
      <text:p text:style-name="Text_20_body">Запрос count = 5: ответ будет в точности таким же, как предыдущий.</text:p>
      <text:p text:style-name="Text_20_body">Давайте переместим текущую метку времени:</text:p>
      <text:p text:style-name="P9"><draw:frame draw:style-name="fr2" draw:name="Изображение20" text:anchor-type="as-char" svg:width="10.172cm" svg:height="6.193cm" draw:z-index="120"><draw:image xlink:href="Pictures/1000000100000328000001EC8957E616.png" xlink:type="simple" xlink:show="embed" xlink:actuate="onLoad" draw:mime-type="image/png"/></draw:frame></text:p>
      <text:p text:style-name="Text_20_body"><text:soft-page-break/>Запрос count = 3:</text:p>
      <text:p text:style-name="Код">{</text:p>
      <text:p text:style-name="Код"><text:s text:c="2"/>"tagId": "1500c712-726a-103e-9264-a5021ec",</text:p>
      <text:p text:style-name="Код"><text:s text:c="2"/>"format": true,</text:p>
      <text:p text:style-name="Код"><text:s text:c="2"/>"start": "09:42:30",</text:p>
      <text:p text:style-name="Код"><text:s text:c="2"/>"count": 3</text:p>
      <text:p text:style-name="Код">}</text:p>
      <text:p text:style-name="Text_20_body">Отве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3.3, "09:42:30", null],</text:p>
      <text:p text:style-name="Код"><text:s text:c="8"/>[5, "09:45:00", null],</text:p>
      <text:p text:style-name="Код"><text:s text:c="8"/>[4.5, "09:47:30", null]</text:p>
      <text:p text:style-name="Код"><text:s text:c="6"/>]</text:p>
      <text:p text:style-name="Код"><text:s text:c="4"/>}</text:p>
      <text:p text:style-name="Код"><text:s text:c="2"/>]</text:p>
      <text:p text:style-name="Код">}</text:p>
      <text:p text:style-name="Text_20_body">Запрос count = 4: ответ будет таким же, как предыдущий в связи с правилом 10, вне зависимости от того, что существует значение с меткой времени в будущем (09:50:00).</text:p>
      <text:h text:style-name="Heading_20_2" text:outline-level="2"><text:bookmark-start text:name="__RefHeading___Toc937_3861748061"/>Ключ timeStep<text:bookmark-end text:name="__RefHeading___Toc937_3861748061"/></text:h>
      <text:p text:style-name="Text_20_body">Ключ timeStep устанавливает временнОй период между соседними возвращаемыми значениями. Используйте этот ключ совместно с ключом count.</text:p>
      <text:p text:style-name="Text_20_body">Значения ключа timeStep измеряется в микросекундах.</text:p>
      <text:h text:style-name="Heading_20_3" text:outline-level="3"><text:bookmark-start text:name="__RefHeading___Toc939_3861748061"/>timeStep и count<text:bookmark-end text:name="__RefHeading___Toc939_3861748061"/></text:h>
      <text:p text:style-name="Text_20_body">Как определено в правиле 2, значение по умолчанию ключа finish - текущая метка времени.</text:p>
      <text:p text:style-name="P9"><draw:frame draw:style-name="fr2" draw:name="Изображение21" text:anchor-type="as-char" svg:width="10.097cm" svg:height="6.147cm" draw:z-index="118"><draw:image xlink:href="Pictures/1000000100000328000001ECB3300B21.png" xlink:type="simple" xlink:show="embed" xlink:actuate="onLoad" draw:mime-type="image/png"/></draw:frame></text:p>
      <text:p text:style-name="Text_20_body">Запрос (timeStep равен 5 минутам):</text:p>
      <text:p text:style-name="Код"><text:soft-page-break/>{</text:p>
      <text:p text:style-name="Код"><text:s text:c="2"/>"tagId": "1500c712-726a-103e-9264-a5021ec",</text:p>
      <text:p text:style-name="Код"><text:s text:c="2"/>"format": true,</text:p>
      <text:p text:style-name="Код"><text:s text:c="2"/>"timeStep": 300000000,</text:p>
      <text:p text:style-name="Код"><text:s text:c="2"/>"count": 3</text:p>
      <text:p text:style-name="Код">}</text:p>
      <text:p text:style-name="Text_20_body">Отве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3.7, "09:42:30", null],</text:p>
      <text:p text:style-name="Код"><text:s text:c="8"/>[4.5, "09:47:30", null],</text:p>
      <text:p text:style-name="Код"><text:s text:c="8"/>[4, "09:52:30", null]</text:p>
      <text:p text:style-name="Код"><text:s text:c="6"/>]</text:p>
      <text:p text:style-name="Код"><text:s text:c="4"/>}</text:p>
      <text:p text:style-name="Код"><text:s text:c="2"/>]</text:p>
      <text:p text:style-name="Код">}</text:p>
      <text:p text:style-name="Text_20_body">Теперь рассмотрим тот же запрос, но выполненный в момент времени 10:05:</text:p>
      <text:p text:style-name="P9"><draw:frame draw:style-name="fr2" draw:name="Изображение22" text:anchor-type="as-char" svg:width="11.298cm" svg:height="5.779cm" draw:z-index="117"><draw:image xlink:href="Pictures/1000000100000412000002150B33B12B.png" xlink:type="simple" xlink:show="embed" xlink:actuate="onLoad" draw:mime-type="image/png"/></draw:frame></text:p>
      <text:p text:style-name="Text_20_body">Запрос (timeStep равен 5 минутам):</text:p>
      <text:p text:style-name="Код">{</text:p>
      <text:p text:style-name="Код"><text:s text:c="2"/>"tagId": "1500c712-726a-103e-9264-a5021ec",</text:p>
      <text:p text:style-name="Код"><text:s text:c="2"/>"format": true,</text:p>
      <text:p text:style-name="Код"><text:s text:c="2"/>"timeStep": 300000000,</text:p>
      <text:p text:style-name="Код"><text:s text:c="2"/>"count": 3</text:p>
      <text:p text:style-name="Код">}</text:p>
      <text:p text:style-name="Text_20_body">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4, "09:55:00", null],</text:p>
      <text:p text:style-name="Код"><text:s text:c="8"/>[4, "10:00:00", null],</text:p>
      <text:p text:style-name="Код"><text:s text:c="8"/>[4, "10:05:00", null]</text:p>
      <text:p text:style-name="Код"><text:s text:c="6"/>]</text:p>
      <text:p text:style-name="Код"><text:s text:c="4"/>}</text:p>
      <text:p text:style-name="Код"><text:s text:c="2"/>]</text:p>
      <text:p text:style-name="Код">}</text:p>
      <text:p text:style-name="Text_20_body">Запрос (count = 6):</text:p>
      <text:p text:style-name="Код">{</text:p>
      <text:p text:style-name="Код"><text:s text:c="2"/>"tagId": "1500c712-726a-103e-9264-a5021ec",</text:p>
      <text:p text:style-name="Код"><text:s text:c="2"/>"format": true,</text:p>
      <text:p text:style-name="Код"><text:s text:c="2"/>"timeStep": 300000000,</text:p>
      <text:p text:style-name="Код"><text:s text:c="2"/>"count": 6</text:p>
      <text:p text:style-name="Код">}</text:p>
      <text:p text:style-name="Text_20_body">Отве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null, "09:27:30", null],</text:p>
      <text:p text:style-name="Код"><text:s text:c="8"/>[2, "09:32:30", null],</text:p>
      <text:p text:style-name="Код"><text:s text:c="8"/>[2.725, "09:37:30", null],</text:p>
      <text:p text:style-name="Код"><text:s text:c="8"/>[3.3, "09:42:30", null],</text:p>
      <text:p text:style-name="Код"><text:s text:c="8"/>[4.5, "09:47:30", null],</text:p>
      <text:p text:style-name="Код"><text:s text:c="8"/>[4, "09:52:30", null]</text:p>
      <text:p text:style-name="Код"><text:s text:c="6"/>]</text:p>
      <text:p text:style-name="Код"><text:s text:c="4"/>}</text:p>
      <text:p text:style-name="Код"><text:s text:c="2"/>]</text:p>
      <text:p text:style-name="Код">}</text:p>
      <text:h text:style-name="Heading_20_3" text:outline-level="3"><text:bookmark-start text:name="__RefHeading___Toc941_3861748061"/>timeStep, count и finish<text:bookmark-end text:name="__RefHeading___Toc941_3861748061"/></text:h>
      <text:p text:style-name="Text_20_body">Поведение запросов с ключами timeStep, count и finish такое же, как в предыдущих примерх, за исключением того, что ключ finish явно задаёт окончание периода.</text:p>
      <text:h text:style-name="Heading_20_3" text:outline-level="3"><text:bookmark-start text:name="__RefHeading___Toc943_3861748061"/>timeStep, count и start<text:bookmark-end text:name="__RefHeading___Toc943_3861748061"/></text:h>
      <text:p text:style-name="Text_20_body">В этом случае ключ finish вычисляется в соответствии с правилом 12.</text:p>
      <text:p text:style-name="P9"><text:soft-page-break/><draw:frame draw:style-name="fr2" draw:name="Изображение23" text:anchor-type="as-char" svg:width="10.195cm" svg:height="6.207cm" draw:z-index="115"><draw:image xlink:href="Pictures/1000000100000328000001EC25E0DB1E.png" xlink:type="simple" xlink:show="embed" xlink:actuate="onLoad" draw:mime-type="image/png"/></draw:frame></text:p>
      <text:p text:style-name="Text_20_body">Запрос (timeStep равен 5 минутам):</text:p>
      <text:p text:style-name="Код">{</text:p>
      <text:p text:style-name="Код"><text:s text:c="2"/>"tagId": "1500c712-726a-103e-9264-a5021ec",</text:p>
      <text:p text:style-name="Код"><text:s text:c="2"/>"format": true,</text:p>
      <text:p text:style-name="Код"><text:s text:c="2"/>"start": "09:35:00",</text:p>
      <text:p text:style-name="Код"><text:s text:c="2"/>"timeStep": 300000000,</text:p>
      <text:p text:style-name="Код"><text:s text:c="2"/>"count": 4</text:p>
      <text:p text:style-name="Код">}</text:p>
      <text:p text:style-name="Text_20_body">Отве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3, "09:35:00", null],</text:p>
      <text:p text:style-name="Код"><text:s text:c="8"/>[2.5, "09:40:00", null],</text:p>
      <text:p text:style-name="Код"><text:s text:c="8"/>[4.5, "09:45:00", null]</text:p>
      <text:p text:style-name="Код"><text:s text:c="6"/>]</text:p>
      <text:p text:style-name="Код"><text:s text:c="4"/>}</text:p>
      <text:p text:style-name="Код"><text:s text:c="2"/>]</text:p>
      <text:p text:style-name="Код">}</text:p>
      <text:p text:style-name="Text_20_body">Несмотря на то, что ключ count равен 4, возвращено только 3 значения, т.к. еще одно значение, имеющееся в базе, относится к будущему.</text:p>
      <text:h text:style-name="Heading_20_3" text:outline-level="3"><text:bookmark-start text:name="__RefHeading___Toc945_3861748061"/><text:soft-page-break/>timeStep, start и finish<text:bookmark-end text:name="__RefHeading___Toc945_3861748061"/></text:h>
      <text:p text:style-name="P9"><draw:frame draw:style-name="fr2" draw:name="Изображение24" text:anchor-type="as-char" svg:width="10.472cm" svg:height="6.376cm" draw:z-index="114"><draw:image xlink:href="Pictures/1000000100000328000001EC0C4671AE.png" xlink:type="simple" xlink:show="embed" xlink:actuate="onLoad" draw:mime-type="image/png"/></draw:frame></text:p>
      <text:p text:style-name="Text_20_body">Запрос (timeStep равен 5 минутам):</text:p>
      <text:p text:style-name="Код">{</text:p>
      <text:p text:style-name="Код"><text:s text:c="2"/>"tagId": "1500c712-726a-103e-9264-a5021ec",</text:p>
      <text:p text:style-name="Код"><text:s text:c="2"/>"format": true,</text:p>
      <text:p text:style-name="Код"><text:s text:c="2"/>"start": "09:35:00",</text:p>
      <text:p text:style-name="Код"><text:s text:c="2"/>"finish": "09:42:30",</text:p>
      <text:p text:style-name="Код"><text:s text:c="2"/>"timeStep": 300000000</text:p>
      <text:p text:style-name="Код">}</text:p>
      <text:p text:style-name="Text_20_body">Отве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3, "09:35:00", null],</text:p>
      <text:p text:style-name="Код"><text:s text:c="8"/>[2.5, "09:40:00", null]</text:p>
      <text:p text:style-name="Код"><text:s text:c="6"/>]</text:p>
      <text:p text:style-name="Код"><text:s text:c="4"/>}</text:p>
      <text:p text:style-name="Код"><text:s text:c="2"/>]</text:p>
      <text:p text:style-name="Код">}</text:p>
      <text:p text:style-name="Text_20_body">Запрос (timeStep равен 10 минутам):</text:p>
      <text:p text:style-name="Код">{</text:p>
      <text:p text:style-name="Код"><text:s text:c="2"/>"tagId": "1500c712-726a-103e-9264-a5021ec",</text:p>
      <text:p text:style-name="Код"><text:s text:c="2"/>"format": true,</text:p>
      <text:p text:style-name="Код"><text:s text:c="2"/>"start": "09:35:00",</text:p>
      <text:p text:style-name="Код"><text:s text:c="2"/>"finish": "09:42:30",</text:p>
      <text:p text:style-name="Код"><text:s text:c="2"/>"timeStep": 600000000</text:p>
      <text:p text:style-name="Код">}</text:p>
      <text:p text:style-name="Text_20_body">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3, "09:35:00", null]</text:p>
      <text:p text:style-name="Код"><text:s text:c="6"/>]</text:p>
      <text:p text:style-name="Код"><text:s text:c="4"/>}</text:p>
      <text:p text:style-name="Код"><text:s text:c="2"/>]</text:p>
      <text:p text:style-name="Код">}</text:p>
      <text:h text:style-name="Heading_20_2" text:outline-level="2"><text:bookmark-start text:name="__RefHeading___Toc947_3861748061"/>Ключ maxCount<text:bookmark-end text:name="__RefHeading___Toc947_3861748061"/></text:h>
      <text:p text:style-name="Text_20_body">Этот ключ используется клиентами для того, чтобы информировать платформу, какое максимальное количество значений тэга должно быть возвращено.</text:p>
      <text:p text:style-name="Text_20_body">Представим тренд на экране. Его ширина - 800 пикселей. Это значит, что тренд может отрисовать не более 800 значений по оси x.</text:p>
      <text:p text:style-name="Text_20_body">Тренд устанавливает ключ maxCount в 800, при любом запросе на получение данных. Если в хранилище больше, чем 800 значений за выбранный период, платформа установит в ответе ключ excess в true и вернёт только 800 значений.</text:p>
      <text:p text:style-name="Attention">maxCount имеет приоритет над count.</text:p>
      <text:p text:style-name="Text_20_body"/>
      <text:p text:style-name="Attention">Использование ключа maxCount предотвращает крах платформы и повышает скорость работы. Установка этого ключа не обязательна, но рекомендуется.</text:p>
      <text:h text:style-name="Heading_20_2" text:outline-level="2"><text:bookmark-start text:name="__RefHeading___Toc949_3861748061"/>Ключ actual<text:bookmark-end text:name="__RefHeading___Toc949_3861748061"/></text:h>
      <text:p text:style-name="Text_20_body">Если ключ actual установлен в true, выводятся только данные, находящиеся в базе данных без интерполяции/присвоения на границах диапазона. По умолчанию ключ actual установлен в false. Если ключ actual установлен в true, ключ timeStep не учитывается.</text:p>
      <text:p text:style-name="Text_20_body">Ниже представлены случаи использования ключа actual с различными комбинациями других ключей.</text:p>
      <text:h text:style-name="Heading_20_3" text:outline-level="3"><text:bookmark-start text:name="__RefHeading___Toc951_3861748061"/>start и actual<text:bookmark-end text:name="__RefHeading___Toc951_3861748061"/></text:h>
      <text:p text:style-name="Text_20_body">В этом случае возвращаются данные от метки времени, заданной start, до текущего момента времени. Если на метку start и/или на текущий момент времени данных нет, на эти метки времени ничего не возвращается.</text:p>
      <text:p text:style-name="P9"><text:soft-page-break/><draw:frame draw:style-name="fr2" draw:name="Изображение25" text:anchor-type="as-char" svg:width="10.271cm" svg:height="6.253cm" draw:z-index="111"><draw:image xlink:href="Pictures/1000000000000328000001EC89AB257F.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start": "09:32:00",</text:p>
      <text:p text:style-name="Код"><text:s text:c="2"/>"actual": true</text:p>
      <text:p text:style-name="Код">}</text:p>
      <text:p text:style-name="Text_20_body">Отве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3, "09:35:00", null],</text:p>
      <text:p text:style-name="Код"><text:s text:c="8"/>[2.5, "09:40:00", null],</text:p>
      <text:p text:style-name="Код"><text:s text:c="8"/>[5, "09:45:00", null],</text:p>
      <text:p text:style-name="Код"><text:s text:c="8"/>[4, "09:50:00", null]</text:p>
      <text:p text:style-name="Код"><text:s text:c="6"/>]</text:p>
      <text:p text:style-name="Код"><text:s text:c="4"/>}</text:p>
      <text:p text:style-name="Код"><text:s text:c="2"/>]</text:p>
      <text:p text:style-name="Код">}</text:p>
      <text:h text:style-name="Heading_20_3" text:outline-level="3"><text:bookmark-start text:name="__RefHeading___Toc953_3861748061"/>start, count, actual<text:bookmark-end text:name="__RefHeading___Toc953_3861748061"/></text:h>
      <text:p text:style-name="Text_20_body">Возвращаются данные в количестве, заданном в count. Если данных в базе меньше, чем задано в count, возвращаются только имеющиеся данные.</text:p>
      <text:p text:style-name="P9"><text:soft-page-break/><draw:frame draw:style-name="fr2" draw:name="Изображение26" text:anchor-type="as-char" svg:width="10.206cm" svg:height="6.214cm" draw:z-index="110"><draw:image xlink:href="Pictures/1000000000000328000001EC89AB257F.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start": "09:32:00",</text:p>
      <text:p text:style-name="Код"><text:s text:c="2"/>"count": 3,</text:p>
      <text:p text:style-name="Код"><text:s text:c="2"/>"actual": true</text:p>
      <text:p text:style-name="Код">}</text:p>
      <text:p text:style-name="Text_20_body">Отве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3, "09:35:00", null],</text:p>
      <text:p text:style-name="Код"><text:s text:c="8"/>[2.5, "09:40:00", null],</text:p>
      <text:p text:style-name="Код"><text:s text:c="8"/>[5, "09:45:00", null]</text:p>
      <text:p text:style-name="Код"><text:s text:c="6"/>]</text:p>
      <text:p text:style-name="Код"><text:s text:c="4"/>}</text:p>
      <text:p text:style-name="Код"><text:s text:c="2"/>]</text:p>
      <text:p text:style-name="Код">}</text:p>
      <text:p text:style-name="Text_20_body">Запрос:</text:p>
      <text:p text:style-name="Код">{</text:p>
      <text:p text:style-name="Код"><text:s text:c="2"/>"tagId": "1500c712-726a-103e-9264-a5021ec",</text:p>
      <text:p text:style-name="Код"><text:s text:c="2"/>"format": true,</text:p>
      <text:p text:style-name="Код"><text:s text:c="2"/>"start": "09:32:00",</text:p>
      <text:p text:style-name="Код"><text:s text:c="2"/>"count": 10,</text:p>
      <text:p text:style-name="Код"><text:s text:c="2"/>"actual": true</text:p>
      <text:p text:style-name="Код">}</text:p>
      <text:p text:style-name="Text_20_body">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3, "09:35:00", null],</text:p>
      <text:p text:style-name="Код"><text:s text:c="8"/>[2.5, "09:40:00", null],</text:p>
      <text:p text:style-name="Код"><text:s text:c="8"/>[5, "09:45:00", null],</text:p>
      <text:p text:style-name="Код"><text:s text:c="8"/>[4, "09:50:00", null]</text:p>
      <text:p text:style-name="Код"><text:s text:c="6"/>]</text:p>
      <text:p text:style-name="Код"><text:s text:c="4"/>}</text:p>
      <text:p text:style-name="Код"><text:s text:c="2"/>]</text:p>
      <text:p text:style-name="Код">}</text:p>
      <text:h text:style-name="Heading_20_3" text:outline-level="3"><text:bookmark-start text:name="__RefHeading___Toc955_3861748061"/>actual и finish<text:bookmark-end text:name="__RefHeading___Toc955_3861748061"/></text:h>
      <text:p text:style-name="Text_20_body">В этом случае возвращается значение на метку времени finish или последнее имеющееся значение перед меткой времени finish с соответствующей меткой времени, если значения на метку времени finish нет.</text:p>
      <text:p text:style-name="P9"><draw:frame draw:style-name="fr2" draw:name="Изображение27" text:anchor-type="as-char" svg:width="10.305cm" svg:height="5.943cm" draw:z-index="108"><draw:image xlink:href="Pictures/1000000000000328000001D2C7CC8A50.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finish": "09:47:30",</text:p>
      <text:p text:style-name="Код"><text:s text:c="2"/>"actual": true</text:p>
      <text:p text:style-name="Код">}</text:p>
      <text:p text:style-name="Text_20_body">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5, "09:45:00", null]</text:p>
      <text:p text:style-name="Код"><text:s text:c="6"/>]</text:p>
      <text:p text:style-name="Код"><text:s text:c="4"/>}</text:p>
      <text:p text:style-name="Код"><text:s text:c="2"/>]</text:p>
      <text:p text:style-name="Код">}</text:p>
      <text:h text:style-name="Heading_20_3" text:outline-level="3"><text:bookmark-start text:name="__RefHeading___Toc957_3861748061"/>finish, count, actual<text:bookmark-end text:name="__RefHeading___Toc957_3861748061"/></text:h>
      <text:p text:style-name="Text_20_body">Возвращаются данные в количестве, заданном в count, от метки времени finish. Если данных в базе меньше, чем задано в count, возвращаются только имеющиеся данные.</text:p>
      <text:p text:style-name="P9"><draw:frame draw:style-name="fr2" draw:name="Изображение28" text:anchor-type="as-char" svg:width="10.437cm" svg:height="6.018cm" draw:z-index="106"><draw:image xlink:href="Pictures/1000000000000328000001D2C7CC8A50.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finish": "09:47:30",</text:p>
      <text:p text:style-name="Код"><text:s text:c="2"/>"count": 3,</text:p>
      <text:p text:style-name="Код"><text:s text:c="2"/>"actual": true</text:p>
      <text:p text:style-name="Код">}</text:p>
      <text:p text:style-name="Text_20_body">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3, "09:35:00", null],</text:p>
      <text:p text:style-name="Код"><text:s text:c="8"/>[2.5, "09:40:00", null],</text:p>
      <text:p text:style-name="Код"><text:s text:c="8"/>[5, "09:45:00", null]</text:p>
      <text:p text:style-name="Код"><text:s text:c="6"/>]</text:p>
      <text:p text:style-name="Код"><text:s text:c="4"/>}</text:p>
      <text:p text:style-name="Код"><text:s text:c="2"/>]</text:p>
      <text:p text:style-name="Код">}</text:p>
      <text:h text:style-name="Heading_20_3" text:outline-level="3"><text:bookmark-start text:name="__RefHeading___Toc959_3861748061"/>start, finish, actual<text:bookmark-end text:name="__RefHeading___Toc959_3861748061"/></text:h>
      <text:p text:style-name="Text_20_body">В этом случае возвращаются имеющиеся в базе данные от метки времени start до метки времени finish.</text:p>
      <text:p text:style-name="P9"><draw:frame draw:style-name="fr2" draw:name="Изображение29" text:anchor-type="as-char" svg:width="10.259cm" svg:height="5.916cm" draw:z-index="105"><draw:image xlink:href="Pictures/1000000000000328000001D2A52CCC1F.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start": "09:32:30",</text:p>
      <text:p text:style-name="Код"><text:s text:c="2"/>"finish": "09:47:30",</text:p>
      <text:p text:style-name="Код"><text:s text:c="2"/>"actual": true</text:p>
      <text:p text:style-name="Код">}</text:p>
      <text:p text:style-name="Text_20_body">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3, "09:35:00", null],</text:p>
      <text:p text:style-name="Код"><text:s text:c="8"/>[2.5, "09:40:00", null],</text:p>
      <text:p text:style-name="Код"><text:s text:c="8"/>[5, "09:45:00", null]</text:p>
      <text:p text:style-name="Код"><text:s text:c="6"/>]</text:p>
      <text:p text:style-name="Код"><text:s text:c="4"/>}</text:p>
      <text:p text:style-name="Код"><text:s text:c="2"/>]</text:p>
      <text:p text:style-name="Код">}</text:p>
      <text:h text:style-name="Heading_20_3" text:outline-level="3"><text:bookmark-start text:name="__RefHeading___Toc961_3861748061"/>start, finish, count, actual<text:bookmark-end text:name="__RefHeading___Toc961_3861748061"/></text:h>
      <text:p text:style-name="Text_20_body">Возвращаются данные в количестве, заданном в count. Если данных в базе меньше, чем задано в count, возвращаются только имеющиеся данные.</text:p>
      <text:p text:style-name="P9"><draw:frame draw:style-name="fr2" draw:name="Изображение30" text:anchor-type="as-char" svg:width="10.331cm" svg:height="5.958cm" draw:z-index="104"><draw:image xlink:href="Pictures/1000000000000328000001D2A52CCC1F.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start": "09:32:30",</text:p>
      <text:p text:style-name="Код"><text:s text:c="2"/>"finish": "09:47:30",</text:p>
      <text:p text:style-name="Код"><text:s text:c="2"/>"count":2,</text:p>
      <text:p text:style-name="Код"><text:s text:c="2"/>"actual": true</text:p>
      <text:p text:style-name="Код">}</text:p>
      <text:p text:style-name="Text_20_body">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3, "09:35:00", null],</text:p>
      <text:p text:style-name="Код"><text:s text:c="8"/>[2.5, "09:40:00", null]</text:p>
      <text:p text:style-name="Код"><text:s text:c="6"/>]</text:p>
      <text:p text:style-name="Код"><text:s text:c="4"/>}</text:p>
      <text:p text:style-name="Код"><text:s text:c="2"/>]</text:p>
      <text:p text:style-name="Код">}</text:p>
      <text:p text:style-name="Text_20_body">Запрос:</text:p>
      <text:p text:style-name="Код">{</text:p>
      <text:p text:style-name="Код"><text:s text:c="2"/>"tagId": "1500c712-726a-103e-9264-a5021ec",</text:p>
      <text:p text:style-name="Код"><text:s text:c="2"/>"format": true,</text:p>
      <text:p text:style-name="Код"><text:s text:c="2"/>"start": "09:32:30",</text:p>
      <text:p text:style-name="Код"><text:s text:c="2"/>"finish": "09:47:30",</text:p>
      <text:p text:style-name="Код"><text:s text:c="2"/>"count":10,</text:p>
      <text:p text:style-name="Код"><text:s text:c="2"/>"actual": true</text:p>
      <text:p text:style-name="Код">}</text:p>
      <text:p text:style-name="Text_20_body">Отве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3, "09:35:00", null],</text:p>
      <text:p text:style-name="Код"><text:s text:c="8"/>[2.5, "09:40:00", null],</text:p>
      <text:p text:style-name="Код"><text:s text:c="8"/>[5, "09:45:00", null]</text:p>
      <text:p text:style-name="Код"><text:s text:c="6"/>]</text:p>
      <text:p text:style-name="Код"><text:s text:c="4"/>}</text:p>
      <text:p text:style-name="Код"><text:s text:c="2"/>]</text:p>
      <text:p text:style-name="Код">}</text:p>
      <text:h text:style-name="Heading_20_3" text:outline-level="3"><text:bookmark-start text:name="__RefHeading___Toc963_3861748061"/>start, finish, maxCount, actual<text:bookmark-end text:name="__RefHeading___Toc963_3861748061"/></text:h>
      <text:p text:style-name="Text_20_body">Возвращаются данные в количестве, заданном в maxCount. Если данных в базе меньше, чем задано в maxCount, возвращаются все данные из базы и флаг excess устанавливается в false. Если данных в базе больше, чем задано в maxCount, интервал времени разбивается на отрезки в соответствии с maxCount. Данные интерполируются/заполняются. Если на метку start нет данных, возвращается null. Если на метку finish нет данных, возвращается последнее имеющееся значение перед меткой времени finish.</text:p>
      <text:p text:style-name="P9"><text:soft-page-break/><draw:frame draw:style-name="fr2" draw:name="Изображение31" text:anchor-type="as-char" svg:width="10.206cm" svg:height="5.886cm" draw:z-index="102"><draw:image xlink:href="Pictures/1000000000000328000001D2A52CCC1F.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start": "09:32:30",</text:p>
      <text:p text:style-name="Код"><text:s text:c="2"/>"finish": "09:47:30",</text:p>
      <text:p text:style-name="Код"><text:s text:c="2"/>"maxCount": 10,</text:p>
      <text:p text:style-name="Код"><text:s text:c="2"/>"actual": true</text:p>
      <text:p text:style-name="Код">}</text:p>
      <text:p text:style-name="Text_20_body">Отве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3, "09:35:00", null],</text:p>
      <text:p text:style-name="Код"><text:s text:c="8"/>[2.5, "09:40:00", null],</text:p>
      <text:p text:style-name="Код"><text:s text:c="8"/>[5, "09:45:00", null],</text:p>
      <text:p text:style-name="Код"><text:s text:c="6"/>]</text:p>
      <text:p text:style-name="Код"><text:s text:c="4"/>}</text:p>
      <text:p text:style-name="Код"><text:s text:c="2"/>]</text:p>
      <text:p text:style-name="Код">}</text:p>
      <text:p text:style-name="Text_20_body">Запрос:</text:p>
      <text:p text:style-name="Код">{</text:p>
      <text:p text:style-name="Код"><text:s text:c="2"/>"tagId": "1500c712-726a-103e-9264-a5021ec",</text:p>
      <text:p text:style-name="Код"><text:s text:c="2"/>"format": true,</text:p>
      <text:p text:style-name="Код"><text:s text:c="2"/>"start": "09:32:30",</text:p>
      <text:p text:style-name="Код"><text:s text:c="2"/>"finish": "09:47:30",</text:p>
      <text:p text:style-name="Код"><text:s text:c="2"/>"maxCount": 2,</text:p>
      <text:p text:style-name="Код"><text:s text:c="2"/>"actual": true</text:p>
      <text:p text:style-name="Код">}</text:p>
      <text:p text:style-name="Text_20_body">Ответ:</text:p>
      <text:p text:style-name="Код"><text:soft-page-break/>{</text:p>
      <text:p text:style-name="Код"><text:s text:c="2"/>"data": [</text:p>
      <text:p text:style-name="Код"><text:s text:c="4"/>{</text:p>
      <text:p text:style-name="Код"><text:s text:c="6"/>"excess": true,</text:p>
      <text:p text:style-name="Код"><text:s text:c="6"/>"tagId": "1500c712-726a-103e-9264-a5021ec2dae1",</text:p>
      <text:p text:style-name="Код"><text:s text:c="6"/>"data": [</text:p>
      <text:p text:style-name="Код"><text:s text:c="8"/>[null, "09:32:30", null],</text:p>
      <text:p text:style-name="Код"><text:s text:c="8"/>[5, "09:47:30", null]</text:p>
      <text:p text:style-name="Код"><text:s text:c="6"/>]</text:p>
      <text:p text:style-name="Код"><text:s text:c="4"/>}</text:p>
      <text:p text:style-name="Код"><text:s text:c="2"/>]</text:p>
      <text:p text:style-name="Код">}</text:p>
      <text:h text:style-name="Heading_20_2" text:outline-level="2"><text:bookmark-start text:name="__RefHeading___Toc965_3861748061"/>Ключ value<text:bookmark-end text:name="__RefHeading___Toc965_3861748061"/></text:h>
      <text:p text:style-name="Text_20_body">Ключ value используется для фильтрации запрошенных данных. Применяется в том случае, когда необходимо получить конкретные значения тэга.</text:p>
      <text:p text:style-name="P9"><draw:frame draw:style-name="fr2" draw:name="Изображение32" text:anchor-type="as-char" svg:width="10.437cm" svg:height="6.018cm" draw:z-index="99"><draw:image xlink:href="Pictures/1000000100000328000001D254657DA7.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start": "09:32:30",</text:p>
      <text:p text:style-name="Код"><text:s text:c="2"/>"value": [3]</text:p>
      <text:p text:style-name="Код">}</text:p>
      <text:p text:style-name="Text_20_body">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3, "09:35:00", null],</text:p>
      <text:p text:style-name="Код"><text:s text:c="8"/>[3, "09:42:00", null]</text:p>
      <text:p text:style-name="Код"><text:s text:c="6"/>]</text:p>
      <text:p text:style-name="Код"><text:s text:c="4"/>}</text:p>
      <text:p text:style-name="Код"><text:s text:c="2"/>]</text:p>
      <text:p text:style-name="Код">}</text:p>
      <text:p text:style-name="Text_20_body">Запрос:</text:p>
      <text:p text:style-name="Код">{</text:p>
      <text:p text:style-name="Код"><text:s text:c="2"/>"tagId": "1500c712-726a-103e-9264-a5021ec",</text:p>
      <text:p text:style-name="Код"><text:s text:c="2"/>"format": true,</text:p>
      <text:p text:style-name="Код"><text:s text:c="2"/>"start": "09:32:30",</text:p>
      <text:p text:style-name="Код"><text:s text:c="2"/>"value": [3, 4]</text:p>
      <text:p text:style-name="Код">}</text:p>
      <text:p text:style-name="Text_20_body">Ответ:</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3, "09:35:00", null],</text:p>
      <text:p text:style-name="Код"><text:s text:c="8"/>[3, "09:41:00", null],</text:p>
      <text:p text:style-name="Код"><text:s text:c="8"/>[4, "09:43:00", null],</text:p>
      <text:p text:style-name="Код"><text:s text:c="8"/>[4, "09:50:00", null],</text:p>
      <text:p text:style-name="Код"><text:s text:c="8"/>[4, "09:53:00", null]</text:p>
      <text:p text:style-name="Код"><text:s text:c="6"/>]</text:p>
      <text:p text:style-name="Код"><text:s text:c="4"/>}</text:p>
      <text:p text:style-name="Код"><text:s text:c="2"/>]</text:p>
      <text:p text:style-name="Код">}</text:p>
      <text:h text:style-name="Heading_20_3" text:outline-level="3"><text:bookmark-start text:name="__RefHeading___Toc967_3861748061"/>value и actual<text:bookmark-end text:name="__RefHeading___Toc967_3861748061"/></text:h>
      <text:p text:style-name="Text_20_body">В этом случае запрос при фильтрации данных будет учитывать только реальные данные, не интерполируя промежуточные значения.</text:p>
      <text:p text:style-name="Text_20_body">Запрос:</text:p>
      <text:p text:style-name="Код">{</text:p>
      <text:p text:style-name="Код"><text:s text:c="2"/>"tagId": "1500c712-726a-103e-9264-a5021ec",</text:p>
      <text:p text:style-name="Код"><text:s text:c="2"/>"format": true,</text:p>
      <text:p text:style-name="Код"><text:s text:c="2"/>"start": "09:32:30",</text:p>
      <text:p text:style-name="Код"><text:s text:c="2"/>"value": [3, 4],</text:p>
      <text:p text:style-name="Код"><text:s text:c="2"/>"actual": true</text:p>
      <text:p text:style-name="Код">}</text:p>
      <text:p text:style-name="Text_20_body">Ответ:</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3, "09:35:00", null],</text:p>
      <text:p text:style-name="Код"><text:s text:c="8"/>[4, "09:50:00", null]</text:p>
      <text:p text:style-name="Код"><text:s text:c="6"/>]</text:p>
      <text:p text:style-name="Код"><text:s text:c="4"/>}</text:p>
      <text:p text:style-name="Код"><text:s text:c="2"/>]</text:p>
      <text:p text:style-name="Код">}</text:p>
      <text:h text:style-name="Heading_20_2" text:outline-level="2"><text:bookmark-start text:name="__RefHeading___Toc969_3861748061"/>null в истории данных<text:bookmark-end text:name="__RefHeading___Toc969_3861748061"/></text:h>
      <text:p text:style-name="Text_20_body">Важным моментом при работе с данными является случай, когда значением тэга является null.</text:p>
      <text:p text:style-name="Text_20_body">Получение значения null в качестве данных тэга возможно, в первую очередь, тогда, когда тэг создан и в его историю ещё ничего не записано (для этого атрибут тэга <text:span text:style-name="T8">prs</text:span>TagDefaultValue должен быть пустым).</text:p>
      <text:p text:style-name="Text_20_body">Кроме того, значение null записывается в тэг, когда:</text:p>
      <text:list text:style-name="L3">
        <text:list-item>
          <text:p text:style-name="P38">Тэг привязан к источнику данных и с коннектором, записывающим данные в тэг, рвётся связь. В этом случае Платформа запишет в тэг значение null, код качества значения q = 100.</text:p>
        </text:list-item>
        <text:list-item>
          <text:p text:style-name="P38">Платформа завершает работу. В этом случае во все тэги записывается значение null, код качества значения q = 101.</text:p>
        </text:list-item>
        <text:list-item>
          <text:p text:style-name="P38">Тэг привязан к источнику данных и у коннектора рвётся связь с поставщиком данных. В этом случае коннектор запишет в тэг значение null с кодом качества значения q = 102.</text:p>
        </text:list-item>
        <text:list-item>
          <text:p text:style-name="P38">Тэг привязан к источнику данных и коннектор получает от поставщика данных значение null.</text:p>
        </text:list-item>
        <text:list-item>
          <text:p text:style-name="P38">В тэг было записано значение null командой data/set.</text:p>
        </text:list-item>
      </text:list>
      <text:p text:style-name="Text_20_body">Считается, что с момента записи в тэг значения null до записи следующего значения мы ничего не знаем о данных тэга, в них как бы образовывается дыра. Поэтому значения тэга не интерполируются на этом промежутке.</text:p>
      <text:p text:style-name="Text_20_body">При запросе данных за период null возвращается клиенту, если попадает в этот промежуток.</text:p>
      <text:p text:style-name="Text_20_body">На картинке ниже показывается, как интерпретируются данные в случае, если в истории есть null.</text:p>
      <text:p text:style-name="P9"><text:soft-page-break/><draw:frame draw:style-name="fr2" draw:name="Изображение33" text:anchor-type="as-char" svg:width="15.547cm" svg:height="4.685cm" draw:z-index="95"><draw:image xlink:href="Pictures/10000001000003FE000001340502AB11.png" xlink:type="simple" xlink:show="embed" xlink:actuate="onLoad" draw:mime-type="image/png"/></draw:frame></text:p>
      <text:p text:style-name="Text_20_body">Далее - несколько примеров запросов к данным, показанным на картинке выше с ответами.</text:p>
      <text:p text:style-name="P9"><draw:frame draw:style-name="fr2" draw:name="Изображение34" text:anchor-type="as-char" svg:width="15.298cm" svg:height="6.421cm" draw:z-index="96"><draw:image xlink:href="Pictures/10000001000003FE000001AD2240C8E0.png" xlink:type="simple" xlink:show="embed" xlink:actuate="onLoad" draw:mime-type="image/png"/></draw:frame></text:p>
      <text:p text:style-name="P24">Запрос:</text:p>
      <text:p text:style-name="Код">{</text:p>
      <text:p text:style-name="Код"><text:s text:c="2"/>"tagId": "1500c712-726a-103e-9264-a5021ec",</text:p>
      <text:p text:style-name="Код"><text:s text:c="2"/>"format": true,</text:p>
      <text:p text:style-name="Код"><text:s text:c="2"/>"start": "09:30:00",</text:p>
      <text:p text:style-name="Код"><text:s text:c="2"/>"finish": "09:50:00"</text:p>
      <text:p text:style-name="Код">}</text:p>
      <text:p text:style-name="Text_20_body">Ответ без ``null``:</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1, "09:30:00", null],</text:p>
      <text:p text:style-name="Код"><text:s text:c="8"/>[3, "09:35:00", null],</text:p>
      <text:p text:style-name="Код"><text:s text:c="8"/>[2.5, "09:40:00", null],</text:p>
      <text:p text:style-name="Код"><text:s text:c="8"/>[5, "09:45:00", null],</text:p>
      <text:p text:style-name="Код"><text:s text:c="8"/>[4, "09:50:00", null]</text:p>
      <text:p text:style-name="Код"><text:s text:c="6"/>]</text:p>
      <text:p text:style-name="Код"><text:s text:c="4"/>}</text:p>
      <text:p text:style-name="Код"><text:s text:c="2"/>]</text:p>
      <text:p text:style-name="Код">}</text:p>
      <text:p text:style-name="Text_20_body">Ответ с ``null``:</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1, "09:30:00", null],</text:p>
      <text:p text:style-name="Код"><text:s text:c="8"/>[3, "09:35:00", null],</text:p>
      <text:p text:style-name="Код"><text:s text:c="8"/>[null, "09:37:00", null],</text:p>
      <text:p text:style-name="Код"><text:s text:c="8"/>[2.5, "09:40:00", null],</text:p>
      <text:p text:style-name="Код"><text:s text:c="8"/>[5, "09:45:00", null],</text:p>
      <text:p text:style-name="Код"><text:s text:c="8"/>[4, "09:50:00", null]</text:p>
      <text:p text:style-name="Код"><text:s text:c="6"/>]</text:p>
      <text:p text:style-name="Код"><text:s text:c="4"/>}</text:p>
      <text:p text:style-name="Код"><text:s text:c="2"/>]</text:p>
      <text:p text:style-name="Код">}</text:p>
      <text:p text:style-name="P9"><draw:frame draw:style-name="fr2" draw:name="Изображение35" text:anchor-type="as-char" svg:width="15.926cm" svg:height="6.653cm" draw:z-index="94"><draw:image xlink:href="Pictures/10000001000003FE000001ABD50B13F3.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start": "09:32:30",</text:p>
      <text:p text:style-name="Код"><text:s text:c="2"/>"finish": "09:39:00"</text:p>
      <text:p text:style-name="Код">}</text:p>
      <text:p text:style-name="Text_20_body">Ответ без ``null``:</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2, "09:32:30", null],</text:p>
      <text:p text:style-name="Код"><text:s text:c="8"/>[3, "09:35:00", null],</text:p>
      <text:p text:style-name="Код"><text:s text:c="8"/>[2.6, "09:39:00", null]</text:p>
      <text:p text:style-name="Код"><text:s text:c="6"/>]</text:p>
      <text:p text:style-name="Код"><text:s text:c="4"/>}</text:p>
      <text:p text:style-name="Код"><text:s text:c="2"/>]</text:p>
      <text:p text:style-name="Код">}</text:p>
      <text:p text:style-name="Text_20_body">Ответ с ``null``:</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2, "09:32:30", null],</text:p>
      <text:p text:style-name="Код"><text:s text:c="8"/>[3, "09:35:00", null],</text:p>
      <text:p text:style-name="Код"><text:s text:c="8"/>[null, "09:37:00", null],</text:p>
      <text:p text:style-name="Код"><text:s text:c="8"/>[null, "09:39:00", null]</text:p>
      <text:p text:style-name="Код"><text:s text:c="6"/>]</text:p>
      <text:p text:style-name="Код"><text:s text:c="4"/>}</text:p>
      <text:p text:style-name="Код"><text:s text:c="2"/>]</text:p>
      <text:p text:style-name="Код">}</text:p>
      <text:p text:style-name="P9"><draw:frame draw:style-name="fr2" draw:name="Изображение36" text:anchor-type="as-char" svg:width="15.612cm" svg:height="6.521cm" draw:z-index="92"><draw:image xlink:href="Pictures/10000001000003FE000001AB16AF5DBC.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start": "09:38:00",</text:p>
      <text:p text:style-name="Код"><text:s text:c="2"/>"finish": "09:39:00"</text:p>
      <text:p text:style-name="Код">}</text:p>
      <text:p text:style-name="Text_20_body">Ответ без ``null``:</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2.7, "09:38:00", null],</text:p>
      <text:p text:style-name="Код"><text:s text:c="8"/>[2.6, "09:39:00", null]</text:p>
      <text:p text:style-name="Код"><text:s text:c="6"/>]</text:p>
      <text:p text:style-name="Код"><text:s text:c="4"/>}</text:p>
      <text:p text:style-name="Код"><text:s text:c="2"/>]</text:p>
      <text:p text:style-name="Код">}</text:p>
      <text:p text:style-name="Text_20_body">Ответ с ``null``:</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null, "09:38:00", null],</text:p>
      <text:p text:style-name="Код"><text:s text:c="8"/>[null, "09:39:00", null]</text:p>
      <text:p text:style-name="Код"><text:s text:c="6"/>]</text:p>
      <text:p text:style-name="Код"><text:s text:c="4"/>}</text:p>
      <text:p text:style-name="Код"><text:s text:c="2"/>]</text:p>
      <text:p text:style-name="Код">}</text:p>
      <text:p text:style-name="Text_20_body">Сделаем запрос с флагом timeStep в 4 минуты:</text:p>
      <text:p text:style-name="P9"><draw:frame draw:style-name="fr2" draw:name="Изображение37" text:anchor-type="as-char" svg:width="16.388cm" svg:height="5.547cm" draw:z-index="90"><draw:image xlink:href="Pictures/10000001000003FE0000015A8AB2332C.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start": "09:32:00",</text:p>
      <text:p text:style-name="Код"><text:s text:c="2"/>"finish": "09:43:00",</text:p>
      <text:p text:style-name="Код"><text:s text:c="2"/>"timeStep": 240000000</text:p>
      <text:p text:style-name="Код">}</text:p>
      <text:p text:style-name="Text_20_body">Ответ без ``null``:</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1.8, "09:32:00", null],</text:p>
      <text:p text:style-name="Код"><text:s text:c="8"/>[2.9, "09:36:00", null],</text:p>
      <text:p text:style-name="Код"><text:s text:c="8"/>[2.5, "09:40:00", null]</text:p>
      <text:p text:style-name="Код"><text:s text:c="6"/>]</text:p>
      <text:p text:style-name="Код"><text:s text:c="4"/>}</text:p>
      <text:p text:style-name="Код"><text:s text:c="2"/>]</text:p>
      <text:p text:style-name="Код">}</text:p>
      <text:p text:style-name="Text_20_body">Ответ с ``null``:</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1.8, "09:32:00", null],</text:p>
      <text:p text:style-name="Код"><text:s text:c="8"/>[3, "09:36:00", null],</text:p>
      <text:p text:style-name="Код"><text:s text:c="8"/>[2.5, "09:40:00", null]</text:p>
      <text:p text:style-name="Код"><text:s text:c="6"/>]</text:p>
      <text:p text:style-name="Код"><text:s text:c="4"/>}</text:p>
      <text:p text:style-name="Код"><text:s text:c="2"/>]</text:p>
      <text:p text:style-name="Код">}</text:p>
      <text:p text:style-name="Text_20_body">Теперь сделаем запрос с флагом timeStep в 2 минуты:</text:p>
      <text:p text:style-name="P9"><draw:frame draw:style-name="fr2" draw:name="Изображение38" text:anchor-type="as-char" svg:width="16.489cm" svg:height="5.581cm" draw:z-index="88"><draw:image xlink:href="Pictures/10000001000003FE0000015AE3AA8DB3.png" xlink:type="simple" xlink:show="embed" xlink:actuate="onLoad" draw:mime-type="image/png"/></draw:frame></text:p>
      <text:p text:style-name="Text_20_body">Запрос:</text:p>
      <text:p text:style-name="Код">{</text:p>
      <text:p text:style-name="Код"><text:s text:c="2"/>"tagId": "1500c712-726a-103e-9264-a5021ec",</text:p>
      <text:p text:style-name="Код"><text:s text:c="2"/>"format": true,</text:p>
      <text:p text:style-name="Код"><text:s text:c="2"/>"start": "09:32:00",</text:p>
      <text:p text:style-name="Код"><text:s text:c="2"/>"finish": "09:43:00",</text:p>
      <text:p text:style-name="Код"><text:s text:c="2"/>"timeStep": 120000000</text:p>
      <text:p text:style-name="Код">}</text:p>
      <text:p text:style-name="Text_20_body">Ответ без ``null``:</text:p>
      <text:p text:style-name="Код">{</text:p>
      <text:p text:style-name="Код"><text:s text:c="2"/>"data": [</text:p>
      <text:p text:style-name="Код"><text:s text:c="4"/>{</text:p>
      <text:p text:style-name="Код"><text:s text:c="6"/>"tagId": "1500c712-726a-103e-9264-a5021ec2dae1",</text:p>
      <text:p text:style-name="Код"><text:s text:c="6"/>"data": [</text:p>
      <text:p text:style-name="Код"><text:s text:c="8"/>[1.8, "09:32:00", null],</text:p>
      <text:p text:style-name="Код"><text:s text:c="8"/>[2.6, "09:34:00", null],</text:p>
      <text:p text:style-name="Код"><text:s text:c="8"/>[2.9, "09:36:00", null],</text:p>
      <text:p text:style-name="Код"><text:s text:c="8"/>[2.7, "09:38:00", null],</text:p>
      <text:p text:style-name="Код"><text:s text:c="8"/>[2.5, "09:40:00", null],</text:p>
      <text:p text:style-name="Код"><text:s text:c="8"/>[3.5, "09:42:00", null]</text:p>
      <text:p text:style-name="Код"><text:s text:c="6"/>]</text:p>
      <text:p text:style-name="Код"><text:s text:c="4"/>}</text:p>
      <text:p text:style-name="Код"><text:s text:c="2"/>]</text:p>
      <text:p text:style-name="Код">}</text:p>
      <text:p text:style-name="Text_20_body">Ответ с ``null``:</text:p>
      <text:p text:style-name="Код"><text:soft-page-break/>{</text:p>
      <text:p text:style-name="Код"><text:s text:c="2"/>"data": [</text:p>
      <text:p text:style-name="Код"><text:s text:c="4"/>{</text:p>
      <text:p text:style-name="Код"><text:s text:c="6"/>"tagId": "1500c712-726a-103e-9264-a5021ec2dae1",</text:p>
      <text:p text:style-name="Код"><text:s text:c="6"/>"data": [</text:p>
      <text:p text:style-name="Код"><text:s text:c="8"/>[1.8, "09:32:00", null],</text:p>
      <text:p text:style-name="Код"><text:s text:c="8"/>[2.6, "09:34:00", null],</text:p>
      <text:p text:style-name="Код"><text:s text:c="8"/>[3, "09:36:00", null],</text:p>
      <text:p text:style-name="Код"><text:s text:c="8"/>[null, "09:38:00", null],</text:p>
      <text:p text:style-name="Код"><text:s text:c="8"/>[2.5, "09:40:00", null],</text:p>
      <text:p text:style-name="Код"><text:s text:c="8"/>[3.5, "09:42:00", null]</text:p>
      <text:p text:style-name="Код"><text:s text:c="6"/>]</text:p>
      <text:p text:style-name="Код"><text:s text:c="4"/>}</text:p>
      <text:p text:style-name="Код"><text:s text:c="2"/>]</text:p>
      <text:p text:style-name="Код">}</text:p>
      <text:h text:style-name="Heading_20_1" text:outline-level="1"><text:bookmark-start text:name="__RefHeading___Toc6486_1607204571"/>Примеры работы с МПК-Пересвет<text:bookmark-end text:name="__RefHeading___Toc6486_1607204571"/></text:h>
      <text:p text:style-name="P16">Рассмотрим самый простой пример.</text:p>
      <text:h text:style-name="P34" text:outline-level="2"><text:bookmark-start text:name="__RefHeading___Toc6488_1607204571"/>Простой пример с одним объектом<text:bookmark-end text:name="__RefHeading___Toc6488_1607204571"/></text:h>
      <text:p text:style-name="P16">Для демонстрации работы с объектами, тегами, методами и экранами Grafana сделаем следующий пример.</text:p>
      <text:p text:style-name="P16">Допустим, у нас есть лампочка и мы можем тем или иным способом получить данные по току и напряжению (работу с коннекторами рассмотрим в следующих примерах).</text:p>
      <text:p text:style-name="P16">Кроме тока и напряжения у лампочки есть третий, расчётный тег - мощность.</text:p>
      <text:p text:style-name="P16">При изменении силы тока или напряжения мощность должна перерасчитываться.</text:p>
      <text:h text:style-name="Heading_20_3" text:outline-level="3"><text:bookmark-start text:name="__RefHeading___Toc6490_1607204571"/>Объект<text:bookmark-end text:name="__RefHeading___Toc6490_1607204571"/></text:h>
      <text:p text:style-name="P16">Открываем конфигуратор, выбираем папку «Объекты» и нажимаем кнопку «Новый объект»:</text:p>
      <text:p text:style-name="P16"><text:soft-page-break/><draw:frame draw:style-name="fr2" draw:name="Изображение2" text:anchor-type="as-char" svg:width="15.785cm" svg:height="10.594cm" draw:z-index="49"><draw:image xlink:href="../../../../peresvet/docs/build/html/_images/01.start.png" xlink:type="simple" xlink:show="embed" xlink:actuate="onLoad" draw:mime-type="image/png"/><svg:title>../_images/01.start.png</svg:title></draw:frame><text:s/></text:p>
      <text:p text:style-name="P16">В появившемся окне свойств меняем имя объекта на «Лампочка»…</text:p>
      <text:p text:style-name="P16"><draw:frame draw:style-name="fr2" draw:name="Изображение3 Копия 1" text:anchor-type="as-char" svg:width="15.718cm" svg:height="10.552cm" draw:z-index="50"><draw:image xlink:href="../../../../peresvet/docs/build/html/_images/02.before_save.png" xlink:type="simple" xlink:show="embed" xlink:actuate="onLoad" draw:mime-type="image/png"/><svg:title>../_images/02.before_save.png</svg:title></draw:frame><text:s/></text:p>
      <text:p text:style-name="P16"><text:soft-page-break/>…и, нажав кнопку «Записать», сохраняем изменения:</text:p>
      <text:p text:style-name="P16"><draw:frame draw:style-name="fr2" draw:name="Изображение4 Копия 1" text:anchor-type="as-char" svg:width="16.36cm" svg:height="10.984cm" draw:z-index="51"><draw:image xlink:href="../../../../peresvet/docs/build/html/_images/03.after_save.png" xlink:type="simple" xlink:show="embed" xlink:actuate="onLoad" draw:mime-type="image/png"/><svg:title>../_images/03.after_save.png</svg:title></draw:frame><text:s/></text:p>
      <text:h text:style-name="P35" text:outline-level="3"><text:bookmark-start text:name="__RefHeading___Toc6492_1607204571"/>Теги<text:bookmark-end text:name="__RefHeading___Toc6492_1607204571"/></text:h>
      <text:p text:style-name="P16">Оставляя текущим объектом «Лампочку», нажимаем кнопку «Новый тег»:</text:p>
      <text:p text:style-name="P16"><text:soft-page-break/><draw:frame draw:style-name="fr2" draw:name="Изображение5 Копия 1" text:anchor-type="as-char" svg:width="15.639cm" svg:height="10.448cm" draw:z-index="86"><draw:image xlink:href="../../../../peresvet/docs/build/html/_images/04.new_tag.png" xlink:type="simple" xlink:show="embed" xlink:actuate="onLoad" draw:mime-type="image/png"/><svg:title>../_images/04.new_tag.png</svg:title></draw:frame><text:s/></text:p>
      <text:p text:style-name="P16">Меняем имя тега и единицы измерения…</text:p>
      <text:p text:style-name="P16"><draw:frame draw:style-name="fr2" draw:name="Изображение6 Копия 1" text:anchor-type="as-char" svg:width="16.708cm" svg:height="11.217cm" draw:z-index="52"><draw:image xlink:href="../../../../peresvet/docs/build/html/_images/05.tag_props.png" xlink:type="simple" xlink:show="embed" xlink:actuate="onLoad" draw:mime-type="image/png"/><svg:title>../_images/05.tag_props.png</svg:title></draw:frame><text:s/></text:p>
      <text:p text:style-name="P16"><text:soft-page-break/>…и, нажав кнопку «Записать», сохраняем изменения:</text:p>
      <text:p text:style-name="P16"><text:s/><draw:frame draw:style-name="fr5" draw:name="Изображение41" text:anchor-type="char" svg:width="16.341cm" svg:height="10.97cm" draw:z-index="151"><draw:image xlink:href="Pictures/10000000000004BE0000032FCBB7F498.png" xlink:type="simple" xlink:show="embed" xlink:actuate="onLoad" draw:mime-type="image/png"/></draw:frame></text:p>
      <text:p text:style-name="P16">Аналогичным образом создаём ещё два тега, U и P:</text:p>
      <text:p text:style-name="P16"><text:soft-page-break/><draw:frame draw:style-name="fr2" draw:name="Изображение8 Копия 1" text:anchor-type="as-char" svg:width="16.796cm" svg:height="11.277cm" draw:z-index="53"><draw:image xlink:href="../../../../peresvet/docs/build/html/_images/07.IUP.png" xlink:type="simple" xlink:show="embed" xlink:actuate="onLoad" draw:mime-type="image/png"/><svg:title>../_images/07.IUP.png</svg:title></draw:frame><text:s/></text:p>
      <text:h text:style-name="P35" text:outline-level="3"><text:bookmark-start text:name="__RefHeading___Toc6494_1607204571"/>Запись/чтение данных<text:bookmark-end text:name="__RefHeading___Toc6494_1607204571"/></text:h>
      <text:p text:style-name="P16">Проверим, что данные в теги записываются и читаются.</text:p>
      <text:p text:style-name="P16">Выберем тег «I» и откроем панель «Данные тега»:</text:p>
      <text:p text:style-name="P16"><text:soft-page-break/><draw:frame draw:style-name="fr2" draw:name="Изображение9 Копия 1" text:anchor-type="as-char" svg:width="16.357cm" svg:height="10.98cm" draw:z-index="54"><draw:image xlink:href="../../../../peresvet/docs/build/html/_images/08.open_read_save.png" xlink:type="simple" xlink:show="embed" xlink:actuate="onLoad" draw:mime-type="image/png"/><svg:title>../_images/08.open_read_save.png</svg:title></draw:frame><text:s/></text:p>
      <text:list text:style-name="L4">
        <text:list-item>
          <text:p text:style-name="P41">В поле «Значение» впишем 0.</text:p>
        </text:list-item>
        <text:list-item>
          <text:p text:style-name="P41">В поле «body» можно посмотреть сформированное тело запроса на запись.</text:p>
        </text:list-item>
      </text:list>
      <text:p text:style-name="P16"><text:soft-page-break/><draw:frame draw:style-name="fr2" draw:name="Изображение10 Копия 1" text:anchor-type="as-char" svg:width="16.87cm" svg:height="11.326cm" draw:z-index="55"><draw:image xlink:href="../../../../peresvet/docs/build/html/_images/09.set_data.png" xlink:type="simple" xlink:show="embed" xlink:actuate="onLoad" draw:mime-type="image/png"/><svg:title>../_images/09.set_data.png</svg:title></draw:frame><text:s/></text:p>
      <text:p text:style-name="P16">Нажимаем кнопку «Записать», затем «Получить данные».</text:p>
      <text:p text:style-name="P16">В таблице «Значение-время-качество» появится текущее значение тега «I»:</text:p>
      <text:p text:style-name="P16"><text:soft-page-break/><draw:frame draw:style-name="fr2" draw:name="Изображение11 Копия 1" text:anchor-type="as-char" svg:width="16.893cm" svg:height="11.342cm" draw:z-index="56"><draw:image xlink:href="../../../../peresvet/docs/build/html/_images/10.get_data.png" xlink:type="simple" xlink:show="embed" xlink:actuate="onLoad" draw:mime-type="image/png"/><svg:title>../_images/10.get_data.png</svg:title></draw:frame><text:s/></text:p>
      <text:h text:style-name="P35" text:outline-level="3"><text:bookmark-start text:name="__RefHeading___Toc6496_1607204571"/>Расчётный метод<text:bookmark-end text:name="__RefHeading___Toc6496_1607204571"/></text:h>
      <text:p text:style-name="P16">Создадим метод для расчёта мощности лампочки.</text:p>
      <text:p text:style-name="P16">Для этого выберем тег «P» и нажмём кнопку «Новый метод»:</text:p>
      <text:p text:style-name="P16"><text:soft-page-break/><draw:frame draw:style-name="fr2" draw:name="Изображение12 Копия 1" text:anchor-type="as-char" svg:width="16.796cm" svg:height="11.254cm" draw:z-index="85"><draw:image xlink:href="../../../../peresvet/docs/build/html/_images/11.new_method.png" xlink:type="simple" xlink:show="embed" xlink:actuate="onLoad" draw:mime-type="image/png"/><svg:title>../_images/11.new_method.png</svg:title></draw:frame><text:s/></text:p>
      <text:p text:style-name="P16">Затем:</text:p>
      <text:list text:style-name="L5">
        <text:list-item>
          <text:p text:style-name="P42">Изменим имя метода</text:p>
        </text:list-item>
        <text:list-item>
          <text:p text:style-name="P42">В поле «Адрес» введём название метода, под которым он будет зарегистрирован в системе для вызовов. Запомним это имя - <text:span text:style-name="Source_20_Text">power</text:span>:</text:p>
          <text:p text:style-name="P43"><text:soft-page-break/><draw:frame draw:style-name="fr4" draw:name="Изображение13 Копия 1" text:anchor-type="as-char" svg:y="-9.726cm" svg:width="15.635cm" svg:height="8.862cm" draw:z-index="57"><draw:image xlink:href="../../../../peresvet/docs/build/html/_images/12.method_name_address.png" xlink:type="simple" xlink:show="embed" xlink:actuate="onLoad" draw:mime-type="image/png"/><svg:title>../_images/12.method_name_address.png</svg:title></draw:frame><text:s/></text:p>
        </text:list-item>
        <text:list-item>
          <text:p text:style-name="P42">Блок «Инициаторы». Очень важный блок, в котором мы выбираем, какие события могут инициировать выполнение расчётного метода.</text:p>
          <text:p text:style-name="P42">Здесь выберем оба предложенных тега: I и U, то есть изменения обоих этих тегов будут приводить к перерасчёту мощности.</text:p>
          <text:p text:style-name="P27">Обратите внимание, что в списке возможных инициаторов расчёта нет самого тега «P»: изменение тега не может приводить к перерасчёту его самого, так как это вызовет бесконечный цикл расчётов.</text:p>
          <text:p text:style-name="P43"><text:soft-page-break/><draw:frame draw:style-name="fr2" draw:name="Изображение14 Копия 1" text:anchor-type="as-char" svg:width="15.577cm" svg:height="8.828cm" draw:z-index="58"><draw:image xlink:href="../../../../peresvet/docs/build/html/_images/13.method_initiators.png" xlink:type="simple" xlink:show="embed" xlink:actuate="onLoad" draw:mime-type="image/png"/><svg:title>../_images/13.method_initiators.png</svg:title></draw:frame><text:s/></text:p>
        </text:list-item>
        <text:list-item>
          <text:p text:style-name="P42">Укажем, какие данные необходимо передать методу для расчёта.</text:p>
          <text:p text:style-name="P42">Данные, передаваемые в метод в каждом параметре - это результат запроса <text:a xlink:type="simple" xlink:href="../../../../peresvet/docs/build/html/data_api.html#tags_app_api_svc.data_get" text:style-name="Internet_20_link" text:visited-style-name="Visited_20_Internet_20_Link"><text:span text:style-name="Source_20_Text">получения данных</text:span></text:a>.</text:p>
          <text:p text:style-name="P42">Для расчёта мощности нужны текущие значения двух тегов: силы тока и напряжения. Поэтому создаём два параметра, дважды нажав на синюю кнопку с плюсом. Заполняем данные параметров как показано на картинке:</text:p>
          <text:p text:style-name="P42"><draw:frame draw:style-name="fr2" draw:name="Изображение15 Копия 1" text:anchor-type="as-char" svg:width="15.575cm" svg:height="9.319cm" draw:z-index="59"><draw:image xlink:href="../../../../peresvet/docs/build/html/_images/14.method_parameters.png" xlink:type="simple" xlink:show="embed" xlink:actuate="onLoad" draw:mime-type="image/png"/><svg:title>../_images/14.method_parameters.png</svg:title></draw:frame><text:s/></text:p>
          <text:p text:style-name="P42"><text:soft-page-break/>Здесь мы указали, что в метод передаются два параметра: первым (индекс = 1) - сила тока.</text:p>
          <text:p text:style-name="P42">Вторым (индекс = 2) - напряжение.</text:p>
          <text:p text:style-name="P42">Поле «Конфигурация» заполняется автоматически после выбора тега в поле «Тег».</text:p>
          <text:p text:style-name="P42">Внимание</text:p>
          <text:p text:style-name="P42">После изучения документации на запрос <text:a xlink:type="simple" xlink:href="../../../../peresvet/docs/build/html/data_api.html#tags_app_api_svc.data_get" text:style-name="Internet_20_link" text:visited-style-name="Visited_20_Internet_20_Link"><text:span text:style-name="Source_20_Text">получения данных</text:span></text:a> можно вручную править поле «Конфигурация», составляя сколь угодно сложные запросы получения данных. Поле «Конфигурация» можно расширять для удобства ввода текста.</text:p>
          <text:p text:style-name="P42"><draw:frame draw:style-name="fr2" draw:name="Изображение16 Копия 1" text:anchor-type="as-char" svg:width="16.166cm" svg:height="3.965cm" draw:z-index="84"><draw:image xlink:href="../../../../peresvet/docs/build/html/_images/15.extend_config.png" xlink:type="simple" xlink:show="embed" xlink:actuate="onLoad" draw:mime-type="image/png"/><svg:title>../_images/15.extend_config.png</svg:title></draw:frame><text:s/></text:p>
          <text:p text:style-name="P27">Очень важный момент, относящийся к расчётам значений тегов: тег мощности рассчитывается, когда изменяется значение тегов «I» и «U». Допустим, расчёт инициируется изменением тега «I» и метка времени нового значения «I» - «2024-10-27 10:00:00+03:00». В этом случае запрос данных в параметрах будет производиться также на метку времени «2024-10-27 10:00:00+03:00» и новое рассчитанное значение тега мощности также будет записано с этой меткой времени, не смотря на то, что сам расчёт, возможно, будет производиться в другое время.</text:p>
        </text:list-item>
        <text:list-item>
          <text:p text:style-name="P42">Нажимаем кнопку «Записать» для сохранения изменений:</text:p>
          <text:p text:style-name="P42"><text:soft-page-break/><draw:frame draw:style-name="fr2" draw:name="Изображение17 Копия 1" text:anchor-type="as-char" svg:width="15.565cm" svg:height="9.312cm" draw:z-index="83"><draw:image xlink:href="../../../../peresvet/docs/build/html/_images/16.save_method.png" xlink:type="simple" xlink:show="embed" xlink:actuate="onLoad" draw:mime-type="image/png"/><svg:title>../_images/16.save_method.png</svg:title></draw:frame><text:s/></text:p>
        </text:list-item>
      </text:list>
      <text:p text:style-name="P16">Теперь напишем код метода.</text:p>
      <text:p text:style-name="P16">В папке <text:span text:style-name="Source_20_Text">methods</text:span> уже написан метод для этого примера.</text:p>
      <text:p text:style-name="P16">Откроем файл <text:span text:style-name="Source_20_Text">methods/test_method.py</text:span> и рассмотрим метод <text:span text:style-name="Source_20_Text">calc_power</text:span>:</text:p>
      <text:p text:style-name="Код">@rpc("power")</text:p>
      <text:p text:style-name="Код">async def calc_power(I: dict, U: dict) -&gt; float:</text:p>
      <text:p text:style-name="Код"><text:s text:c="4"/>"""Метод возвращает произведение двух параметров.</text:p>
      <text:p text:style-name="Код"><text:s text:c="4"/>"""</text:p>
      <text:p text:style-name="Код"><text:s text:c="4"/>print(f"I: {json.dumps(I, indent=4)}")</text:p>
      <text:p text:style-name="Код"><text:s text:c="4"/>print(f"U: {json.dumps(U, indent=4)}")</text:p>
      <text:p text:style-name="Код"/>
      <text:p text:style-name="Код"><text:s text:c="4"/>cur_I = I["data"][0]["data"][0][0]</text:p>
      <text:p text:style-name="Код"><text:s text:c="4"/>cur_U = U["data"][0]["data"][0][0]</text:p>
      <text:p text:style-name="Код"/>
      <text:p text:style-name="Код"><text:s text:c="4"/>if cur_I == None or cur_U == None:</text:p>
      <text:p text:style-name="Код"><text:s text:c="8"/>return 0</text:p>
      <text:p text:style-name="Код"/>
      <text:p text:style-name="Код"><text:s text:c="4"/>return cur_I * cur_U</text:p>
      <text:p text:style-name="Attention">Первая строка: <text:span text:style-name="Source_20_Text">@rpc("power")</text:span>: именно «power» мы вводили в поле «Адрес» при создании метода!</text:p>
      <text:p text:style-name="P16">Далее - строка объявления метода: <text:span text:style-name="Source_20_Text">async def calc_power(I: dict, U: dict) -&gt; float:</text:span>. Первым параметром указана сила тока, вторым - напряжение. Точно так же, как мы указывали индексы у параметров.</text:p>
      <text:p text:style-name="P16">Далее метод просто для удобства выводит в консоль пришедшие данные, затем рассчитывает мощность как произведение двух параметров.</text:p>
      <text:h text:style-name="P35" text:outline-level="3"><text:bookmark-start text:name="__RefHeading___Toc6498_1607204571"/><text:soft-page-break/>Запуск расчётного метода<text:bookmark-end text:name="__RefHeading___Toc6498_1607204571"/></text:h>
      <text:p text:style-name="P16">Для запуска метода необходимо установить пакеты, указанные в файле <text:span text:style-name="Source_20_Text">methods/requirements.txt</text:span> либо для всех пользователей:</text:p>
      <text:p text:style-name="Код">$ pip3 install -r requirements.txt</text:p>
      <text:p text:style-name="P16">Либо создав виртуальную среду проекта.</text:p>
      <text:p text:style-name="P16">После установки пакетов запускаем в терминале скрипт в папке <text:span text:style-name="Source_20_Text">methods</text:span>:</text:p>
      <text:p text:style-name="Код">$ python3 test_method.py</text:p>
      <text:p text:style-name="P16">Результат должен быть примерно таким:</text:p>
      <text:p text:style-name="P16"><draw:frame draw:style-name="fr2" draw:name="Изображение18 Копия 1" text:anchor-type="as-char" svg:width="14.769cm" svg:height="6.588cm" draw:z-index="60"><draw:image xlink:href="../../../../peresvet/docs/build/html/_images/17.run_method.png" xlink:type="simple" xlink:show="embed" xlink:actuate="onLoad" draw:mime-type="image/png"/><svg:title>../_images/17.run_method.png</svg:title></draw:frame><text:s/></text:p>
      <text:h text:style-name="P35" text:outline-level="3"><text:bookmark-start text:name="__RefHeading___Toc6500_1607204571"/>Проверим расчёт<text:bookmark-end text:name="__RefHeading___Toc6500_1607204571"/></text:h>
      <text:p text:style-name="P16">Помним, что расчёт мощности инициируется изменениями значений тока и напряжения.</text:p>
      <text:p text:style-name="P16">Запишем в тег «U» значение 230.</text:p>
      <text:p text:style-name="P16">Для этого выберем в иерархии тег «U» и запишем в него требуемое значение:</text:p>
      <text:p text:style-name="P16"><text:soft-page-break/><draw:frame draw:style-name="fr2" draw:name="Изображение19 Копия 1" text:anchor-type="as-char" svg:width="16.522cm" svg:height="9.883cm" draw:z-index="61"><draw:image xlink:href="../../../../peresvet/docs/build/html/_images/18.set_u.png" xlink:type="simple" xlink:show="embed" xlink:actuate="onLoad" draw:mime-type="image/png"/><svg:title>../_images/18.set_u.png</svg:title></draw:frame><text:s/></text:p>
      <text:p text:style-name="P16">В консоли, в которой мы запустили метод, появится вывод:</text:p>
      <text:p text:style-name="P16"><draw:frame draw:style-name="fr4" draw:name="Изображение20 Копия 1" text:anchor-type="as-char" svg:y="-8.338cm" svg:width="17.602cm" svg:height="10.934cm" draw:z-index="62"><draw:image xlink:href="../../../../peresvet/docs/build/html/_images/19.print_calc.png" xlink:type="simple" xlink:show="embed" xlink:actuate="onLoad" draw:mime-type="image/png"/><svg:title>../_images/19.print_calc.png</svg:title></draw:frame><text:s/></text:p>
      <text:p text:style-name="P16"><text:soft-page-break/>Проверим значение тега мощности «P». Оно должно быть равно 0, так как перед этим в тег «I» мы записали 0:</text:p>
      <text:p text:style-name="P16"><draw:frame draw:style-name="fr2" draw:name="Изображение21 Копия 1" text:anchor-type="as-char" svg:width="16.738cm" svg:height="10.014cm" draw:z-index="63"><draw:image xlink:href="../../../../peresvet/docs/build/html/_images/20.P_is_0.png" xlink:type="simple" xlink:show="embed" xlink:actuate="onLoad" draw:mime-type="image/png"/><svg:title>../_images/20.P_is_0.png</svg:title></draw:frame><text:s/></text:p>
      <text:p text:style-name="P16">Теперь запишем в тег «I» значение 1:</text:p>
      <text:p text:style-name="P16"><draw:frame draw:style-name="fr2" draw:name="Изображение22 Копия 1" text:anchor-type="as-char" svg:width="16.568cm" svg:height="9.911cm" draw:z-index="82"><draw:image xlink:href="../../../../peresvet/docs/build/html/_images/21.I_is_1.png" xlink:type="simple" xlink:show="embed" xlink:actuate="onLoad" draw:mime-type="image/png"/><svg:title>../_images/21.I_is_1.png</svg:title></draw:frame><text:s/></text:p>
      <text:p text:style-name="P16"><text:soft-page-break/>И проверим значение мощности, которое должно быть равно 230 Вт:</text:p>
      <text:p text:style-name="P16"><draw:frame draw:style-name="fr2" draw:name="Изображение23 Копия 1" text:anchor-type="as-char" svg:width="16.769cm" svg:height="10.031cm" draw:z-index="64"><draw:image xlink:href="../../../../peresvet/docs/build/html/_images/22.P_is_230.png" xlink:type="simple" xlink:show="embed" xlink:actuate="onLoad" draw:mime-type="image/png"/><svg:title>../_images/22.P_is_230.png</svg:title></draw:frame><text:s/></text:p>
      <text:h text:style-name="P35" text:outline-level="3"><text:bookmark-start text:name="__RefHeading___Toc6502_1607204571"/>Отображение данных в Grafana<text:bookmark-end text:name="__RefHeading___Toc6502_1607204571"/></text:h>
      <text:p text:style-name="P16">Данные из платформы можно получать запросами, описанными в разделе «Исторические данные».</text:p>
      <text:p text:style-name="P16">Данные тегов (как, впрочем, и всё общение с платформой) приходят в виде json и для манипулирования этими данными в Grafan’е рекомендуется изучить языки манипулирования json-данными <text:a xlink:type="simple" xlink:href="https://docs.jsonata.org/overview.html" text:style-name="Internet_20_link" text:visited-style-name="Visited_20_Internet_20_Link">JSONata</text:a> или <text:a xlink:type="simple" xlink:href="https://jsonpath.com/" text:style-name="Internet_20_link" text:visited-style-name="Visited_20_Internet_20_Link">JSONPath</text:a>.</text:p>
      <text:p text:style-name="P16">Предпочтительнее JSONata, так как обладает большими возможностями.</text:p>
      <text:p text:style-name="P16">Настроим отображение:</text:p>
      <text:list text:style-name="L6">
        <text:list-item>
          <text:p text:style-name="P39">текущих значений тегов «I», «U» и «P»;</text:p>
        </text:list-item>
        <text:list-item>
          <text:p text:style-name="P39">трендов значений этих тегов;</text:p>
        </text:list-item>
      </text:list>
      <text:list text:style-name="L7">
        <text:list-item>
          <text:p text:style-name="P44">Создадим новую доску данных.</text:p>
          <text:p text:style-name="P44">Для этого заходим в меню «Home –&gt; Dashboards» и нажимаем кнопку «New»</text:p>
          <text:p text:style-name="P44"><text:soft-page-break/><draw:frame draw:style-name="fr2" draw:name="Изображение24 Копия 1" text:anchor-type="as-char" svg:width="15.593cm" svg:height="10.821cm" draw:z-index="65"><draw:image xlink:href="../../../../peresvet/docs/build/html/_images/23.new_dashboard.png" xlink:type="simple" xlink:show="embed" xlink:actuate="onLoad" draw:mime-type="image/png"/><svg:title>../_images/23.new_dashboard.png</svg:title></draw:frame><text:s/></text:p>
          <text:p text:style-name="P44">Выбрав в выпадающем меню команду «New dashboard», попадаем на экран создания новой панели:</text:p>
          <text:p text:style-name="P44"><text:soft-page-break/><draw:frame draw:style-name="fr2" draw:name="Изображение25 Копия 1" text:anchor-type="as-char" svg:width="15.536cm" svg:height="10.781cm" draw:z-index="66"><draw:image xlink:href="../../../../peresvet/docs/build/html/_images/24.new_panel.png" xlink:type="simple" xlink:show="embed" xlink:actuate="onLoad" draw:mime-type="image/png"/><svg:title>../_images/24.new_panel.png</svg:title></draw:frame><text:s/></text:p>
          <text:p text:style-name="P44">…и выбираем источник данных «peresvet»:</text:p>
          <text:p text:style-name="P45"><draw:frame draw:style-name="fr2" draw:name="Изображение26 Копия 1" text:anchor-type="as-char" svg:width="15.436cm" svg:height="8.442cm" draw:z-index="67"><draw:image xlink:href="../../../../peresvet/docs/build/html/_images/25.ds.png" xlink:type="simple" xlink:show="embed" xlink:actuate="onLoad" draw:mime-type="image/png"/><svg:title>../_images/25.ds.png</svg:title></draw:frame><text:s/></text:p>
        </text:list-item>
        <text:list-item>
          <text:p text:style-name="P44">В появившемся окне настройки панели выберем тип панели «Stat».</text:p>
          <text:p text:style-name="P45"><text:soft-page-break/><draw:frame draw:style-name="fr2" draw:name="Изображение27 Копия 1" text:anchor-type="as-char" svg:width="15.55cm" svg:height="9.024cm" draw:z-index="81"><draw:image xlink:href="../../../../peresvet/docs/build/html/_images/26.stat.png" xlink:type="simple" xlink:show="embed" xlink:actuate="onLoad" draw:mime-type="image/png"/><svg:title>../_images/26.stat.png</svg:title></draw:frame><text:s/></text:p>
        </text:list-item>
        <text:list-item>
          <text:p text:style-name="P44">Настроим путь для получения данных, вписав <text:span text:style-name="Source_20_Text">/data/</text:span> на закладке <text:span text:style-name="Source_20_Text">Path</text:span>.</text:p>
          <text:p text:style-name="P28">По умолчанию в источнике данных «peresvet» настроен путь к платформе: <text:span text:style-name="Source_20_Text">http://&lt;server&gt;/v1/</text:span>. Добавляя к этому пути расширения <text:span text:style-name="Source_20_Text">data</text:span>, <text:span text:style-name="Source_20_Text">objects</text:span>, <text:span text:style-name="Source_20_Text">tags</text:span> и т.д., мы получаем возможность работать не только с данными, но и вообще со всеми сущностями платформы.</text:p>
          <text:p text:style-name="P45"><draw:frame draw:style-name="fr2" draw:name="Изображение28 Копия 1" text:anchor-type="as-char" svg:width="15.734cm" svg:height="8.29cm" draw:z-index="68"><draw:image xlink:href="../../../../peresvet/docs/build/html/_images/27.path.png" xlink:type="simple" xlink:show="embed" xlink:actuate="onLoad" draw:mime-type="image/png"/><svg:title>../_images/27.path.png</svg:title></draw:frame><text:s/></text:p>
        </text:list-item>
        <text:list-item>
          <text:p text:style-name="P44">Настроим запросы получения данных.</text:p>
          <text:p text:style-name="P44">Для того, чтобы не писать запрос вручную, его можно скопировать из конфигуратора.</text:p>
          <text:p text:style-name="P44"><text:soft-page-break/>Открываем конфигуратор, выбираем тег «I» и копируем запрос получения текущего значения тега.</text:p>
          <text:p text:style-name="P44"><draw:frame draw:style-name="fr2" draw:name="Изображение29 Копия 1" text:anchor-type="as-char" svg:width="15.685cm" svg:height="8.767cm" draw:z-index="69"><draw:image xlink:href="../../../../peresvet/docs/build/html/_images/28.q.png" xlink:type="simple" xlink:show="embed" xlink:actuate="onLoad" draw:mime-type="image/png"/><svg:title>../_images/28.q.png</svg:title></draw:frame><text:s/></text:p>
          <text:p text:style-name="P44">В окне настройки панели выбираем закладку «Params» и добавляем новый ключ «q». Значение ключа - скопированный нами запрос:</text:p>
          <text:p text:style-name="P44"><draw:frame draw:style-name="fr2" draw:name="Изображение30 Копия 1" text:anchor-type="as-char" svg:width="15.737cm" svg:height="9.559cm" draw:z-index="70"><draw:image xlink:href="../../../../peresvet/docs/build/html/_images/29.params.png" xlink:type="simple" xlink:show="embed" xlink:actuate="onLoad" draw:mime-type="image/png"/><svg:title>../_images/29.params.png</svg:title></draw:frame><text:s/></text:p>
          <text:p text:style-name="P44">Далее:</text:p>
          <text:list>
            <text:list-item>
              <text:p text:style-name="P40">Переходим на закладку «Fields»;</text:p>
            </text:list-item>
            <text:list-item>
              <text:p text:style-name="P40"><text:soft-page-break/>Меняем имя очереди на «I»;</text:p>
            </text:list-item>
            <text:list-item>
              <text:p text:style-name="P40">Вводим выражение на языке JSONPath, разбирающее ответ от платформы с текущим значением тега</text:p>
            </text:list-item>
            <text:list-item>
              <text:p text:style-name="P40">На экране появится «1» - текущее, введённое нами на предыдущих шагах значение тока.</text:p>
            </text:list-item>
          </text:list>
          <text:p text:style-name="P44"><draw:frame draw:style-name="fr2" draw:name="Изображение31 Копия 1" text:anchor-type="as-char" svg:width="15.868cm" svg:height="9.638cm" draw:z-index="71"><draw:image xlink:href="../../../../peresvet/docs/build/html/_images/30.data.png" xlink:type="simple" xlink:show="embed" xlink:actuate="onLoad" draw:mime-type="image/png"/><svg:title>../_images/30.data.png</svg:title></draw:frame><text:s/></text:p>
          <text:p text:style-name="P44">Повторим предыдущие шаги для оставшихся двух тегов напряжения и мощности, добавляя новые запросы нажатием кнопки «Add query»:</text:p>
          <text:p text:style-name="P44"><text:soft-page-break/><draw:frame draw:style-name="fr2" draw:name="Изображение32 Копия 1" text:anchor-type="as-char" svg:width="15.635cm" svg:height="8.781cm" draw:z-index="72"><draw:image xlink:href="../../../../peresvet/docs/build/html/_images/31.add_query.png" xlink:type="simple" xlink:show="embed" xlink:actuate="onLoad" draw:mime-type="image/png"/><svg:title>../_images/31.add_query.png</svg:title></draw:frame><text:s/></text:p>
          <text:p text:style-name="P44">Предупреждение:</text:p>
          <text:p text:style-name="P44">У каждого поля отменим кэширование данных:</text:p>
          <text:p text:style-name="P45"><draw:frame draw:style-name="fr2" draw:name="Изображение33 Копия 1" text:anchor-type="as-char" svg:width="15.558cm" svg:height="7.927cm" draw:z-index="80"><draw:image xlink:href="../../../../peresvet/docs/build/html/_images/39.cache.png" xlink:type="simple" xlink:show="embed" xlink:actuate="onLoad" draw:mime-type="image/png"/><svg:title>../_images/39.cache.png</svg:title></draw:frame><text:s/></text:p>
        </text:list-item>
        <text:list-item>
          <text:p text:style-name="P44">Окончательная настройка панели.</text:p>
          <text:p text:style-name="P44">После настройки данных значения напряжения и мощности отображаются красным цветом. Так выставлены настройки по умолчанию.</text:p>
          <text:list>
            <text:list-item>
              <text:p text:style-name="P44">Чтобы все значения отражались зелёным цветом, уберём порог значения «80»;</text:p>
              <text:p text:style-name="P45"><text:soft-page-break/><draw:frame draw:style-name="fr2" draw:name="Изображение34 Копия 1" text:anchor-type="as-char" svg:width="14.286cm" svg:height="8.675cm" draw:z-index="73"><draw:image xlink:href="../../../../peresvet/docs/build/html/_images/32.remove_threshold.png" xlink:type="simple" xlink:show="embed" xlink:actuate="onLoad" draw:mime-type="image/png"/><svg:title>../_images/32.remove_threshold.png</svg:title></draw:frame><text:s/></text:p>
            </text:list-item>
            <text:list-item>
              <text:p text:style-name="P44">Переименуем панель и нажмем кнопку «Save»:</text:p>
              <text:p text:style-name="P44"><draw:frame draw:style-name="fr2" draw:name="Изображение35 Копия 1" text:anchor-type="as-char" svg:width="14.289cm" svg:height="8.678cm" draw:z-index="74"><draw:image xlink:href="../../../../peresvet/docs/build/html/_images/33.save.png" xlink:type="simple" xlink:show="embed" xlink:actuate="onLoad" draw:mime-type="image/png"/><svg:title>../_images/33.save.png</svg:title></draw:frame><text:s/></text:p>
              <text:p text:style-name="P44">Появится окно, в котором нужно задать имя доски данных.</text:p>
            </text:list-item>
          </text:list>
          <text:p text:style-name="P44">Предупреждение:</text:p>
          <text:p text:style-name="P44">Чтобы на панели рядом с именем тега не отображался 0, введите в поля <text:span text:style-name="Source_20_Text">Alias</text:span> пробел:</text:p>
          <text:p text:style-name="P45"><text:soft-page-break/><draw:frame draw:style-name="fr3" draw:name="Изображение36 Копия 1" text:anchor-type="as-char" svg:width="9.897cm" svg:height="2.565cm" draw:z-index="79"><draw:image xlink:href="../../../../peresvet/docs/build/html/_images/35.space.png" xlink:type="simple" xlink:show="embed" xlink:actuate="onLoad" draw:mime-type="image/png"/><svg:title>../_images/35.space.png</svg:title></draw:frame><text:s/></text:p>
        </text:list-item>
        <text:list-item>
          <text:p text:style-name="P44">Выровняем новую панель на экране и создадим новую панель, с трендом, для чего выберем команду «Add –&gt; Visualization»:</text:p>
          <text:p text:style-name="P45"><draw:frame draw:style-name="fr2" draw:name="Изображение37 Копия 1" text:anchor-type="as-char" svg:width="15.863cm" svg:height="9.135cm" draw:z-index="75"><draw:image xlink:href="../../../../peresvet/docs/build/html/_images/34.trend.png" xlink:type="simple" xlink:show="embed" xlink:actuate="onLoad" draw:mime-type="image/png"/><svg:title>../_images/34.trend.png</svg:title></draw:frame><text:s/></text:p>
        </text:list-item>
        <text:list-item>
          <text:p text:style-name="P44">Настройка панели с трендом.</text:p>
          <text:p text:style-name="P44">Тип панели оставим по умолчанию - «Time series».</text:p>
          <text:p text:style-name="P44">Получение данных настроим похоже предыдущей панели, за исключением того, что ключ запроса «q» будет включать функции Grafan’ы <text:span text:style-name="Source_20_Text">$__isoFrom()</text:span> и <text:span text:style-name="Source_20_Text">$__isoTo()</text:span>, обозначающие начало и конец запрашиваемого временного периода:</text:p>
          <text:p text:style-name="P44"><text:span text:style-name="Source_20_Text">q={"tagId":"2d95d0a6-28c7-103f-9c49-d763ac5895e8","format":true,"start":"$__isoFrom()","finish":"$__isoTo()"}</text:span>.</text:p>
          <text:p text:style-name="P44">Закладки «Fields» у всех трёх запросов должны быть такого вида:</text:p>
          <text:p text:style-name="P45"><text:soft-page-break/><draw:frame draw:style-name="fr2" draw:name="Изображение38 Копия 1" text:anchor-type="as-char" svg:width="15.685cm" svg:height="9.527cm" draw:z-index="78"><draw:image xlink:href="../../../../peresvet/docs/build/html/_images/36.trend_fields.png" xlink:type="simple" xlink:show="embed" xlink:actuate="onLoad" draw:mime-type="image/png"/><svg:title>../_images/36.trend_fields.png</svg:title></draw:frame><text:s/></text:p>
        </text:list-item>
        <text:list-item>
          <text:p text:style-name="P44">Выбор временных периодов.</text:p>
          <text:p text:style-name="P44">Настроив панель с трендом для отображения трёх тегов, приведём доску данных приблизительно к такому виду и выберем диапазон времени для отображения на экране, а также периодичность обновления данных:</text:p>
          <text:p text:style-name="P45"><text:soft-page-break/><draw:frame draw:style-name="fr2" draw:name="Изображение39" text:anchor-type="as-char" svg:width="15.406cm" svg:height="12.026cm" draw:z-index="77"><draw:image xlink:href="../../../../peresvet/docs/build/html/_images/37.periods.png" xlink:type="simple" xlink:show="embed" xlink:actuate="onLoad" draw:mime-type="image/png"/><svg:title>../_images/37.periods.png</svg:title></draw:frame><text:s/></text:p>
        </text:list-item>
        <text:list-item>
          <text:p text:style-name="P44">Проверим работу модели. Для чего записываем новые значения в теги «I» и «U» и наблюдаем изменение данных на панели с электрическими параметрами:</text:p>
          <text:p text:style-name="P44"><draw:frame draw:style-name="fr2" draw:name="Изображение40" text:anchor-type="as-char" svg:width="15.697cm" svg:height="7.251cm" draw:z-index="76"><draw:image xlink:href="../../../../peresvet/docs/build/html/_images/38.check.png" xlink:type="simple" xlink:show="embed" xlink:actuate="onLoad" draw:mime-type="image/png"/><svg:title>../_images/38.check.png</svg:title></draw:frame><text:s/></text:p>
        </text:list-item>
      </text:list>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Обычный" style:font-family-generic="swiss" style:font-pitch="variable"/>
    <style:font-face style:name="Courier New" svg:font-family="'Courier New'" style:font-adornments="Обычный" style:font-family-generic="modern" style:font-pitch="fixed"/>
    <style:font-face style:name="CyrillicOld" svg:font-family="CyrillicOld" style:font-adornments="Жирный"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Mono-Regular" svg:font-family="SFMono-Regular, Menlo, Monaco, Consolas, 'Liberation Mono', 'Courier New', Courier, monospace"/>
    <style:font-face style:name="Times New Roman" svg:font-family="'Times New Roman'" style:font-adornments="Обычный" style:font-family-generic="roman" style:font-pitch="variable"/>
    <style:font-face style:name="courier new" svg:font-family="'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 fo:font-family="'Times New Roman'" style:font-style-name="Обычный" style:font-family-generic="roman" style:font-pitch="variable" style:text-scale="9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hyphenation-ladder-count="no-limit" style:page-number="auto"/>
      <style:text-properties fo:hyphenate="true" fo:hyphenation-remain-char-count="2" fo:hyphenation-push-char-count="2" loext:hyphenation-no-caps="true" loext:hyphenation-no-last-word="true" loext:hyphenation-word-char-count="5" loext:hyphenation-zone="no-limit"/>
    </style:style>
    <style:style style:name="List" style:family="paragraph" style:parent-style-name="Text_20_body" style:class="list">
      <style:paragraph-properties fo:margin-top="0cm" fo:margin-bottom="0.25cm" style:contextual-spacing="true">
        <style:tab-stops/>
      </style:paragraph-properties>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master-page-name="">
      <style:paragraph-properties fo:text-align="center" style:justify-single-word="false" style:page-number="auto"/>
      <style:text-properties fo:font-size="22pt" fo:font-weight="bold" style:font-size-asian="28pt" style:font-weight-asian="bold" style:font-size-complex="28pt" style:font-weight-complex="bold" style:text-scale="90%"/>
    </style:style>
    <style:style style:name="Heading_20_1" style:display-name="Heading 1" style:family="paragraph" style:parent-style-name="Heading" style:next-style-name="Text_20_body" style:default-outline-level="1" style:class="text">
      <style:paragraph-properties fo:margin-top="0.63cm" fo:margin-bottom="0.21cm" style:contextual-spacing="true"/>
      <style:text-properties fo:font-size="20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padding="0.049cm" fo:border-left="none" fo:border-right="none" fo:border-top="none" fo:border-bottom="0.06pt solid #000000" text:number-lines="false" text:line-number="0">
        <style:tab-stops>
          <style:tab-stop style:position="17cm" style:type="right"/>
        </style:tab-stops>
      </style:paragraph-properties>
      <style:text-properties style:font-name="Arial" fo:font-family="Arial" style:font-style-name="Обычный" style:font-family-generic="swiss" style:font-pitch="variable" fo:font-size="9pt"/>
    </style:style>
    <style:style style:name="Footer" style:family="paragraph" style:parent-style-name="Header_20_and_20_Footer" style:class="extra">
      <style:paragraph-properties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text-properties style:font-name="Arial" fo:font-family="Arial" style:font-style-name="Обычный" style:font-family-generic="swiss" style:font-pitch="variable" fo:font-size="9pt"/>
    </style:style>
    <style:style style:name="Глоссарий._20_Заголовок" style:display-name="Глоссарий. Заголовок" style:family="paragraph" style:parent-style-name="Text_20_body" style:master-page-name="">
      <style:paragraph-properties fo:text-align="center" style:justify-single-word="false" style:page-number="auto">
        <style:tab-stops/>
      </style:paragraph-properties>
      <style:text-properties fo:font-weight="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_20_1"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Код" style:family="paragraph" style:parent-style-name="Text_20_body" style:master-page-name="">
      <loext:graphic-properties draw:fill="solid" draw:fill-color="#eeeeee"/>
      <style:paragraph-properties fo:margin-top="0cm" fo:margin-bottom="0.25cm" style:contextual-spacing="true" fo:line-height="100%" fo:keep-together="always" fo:orphans="3" fo:widows="3" style:page-number="auto" fo:background-color="#eeeeee" fo:keep-with-next="always">
        <style:tab-stops/>
      </style:paragraph-properties>
      <style:text-properties style:font-name="Courier New" fo:font-family="'Courier New'" style:font-style-name="Обычный" style:font-family-generic="modern" style:font-pitch="fixed" fo:font-size="10pt" officeooo:rsid="002c7d4f"/>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Drawing" style:family="paragraph" style:parent-style-name="Caption" style:class="extra">
      <style:paragraph-properties fo:text-align="center" style:justify-single-word="false"/>
    </style:style>
    <style:style style:name="Attention" style:family="paragraph" style:parent-style-name="Text_20_body">
      <style:paragraph-properties fo:padding="0.049cm" fo:border-left="none" fo:border-right="none" fo:border-top="0.06pt solid #000000" fo:border-bottom="0.06pt solid #000000"/>
      <style:text-properties fo:font-style="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fo:line-height="125%"/>
      <style:text-properties style:font-name="courier new" fo:font-family="'courier new', monospace" fo:font-size="10pt" style:font-name-asian="courier new" style:font-family-asian="'courier new', monospace" style:font-size-asian="10pt" style:font-name-complex="courier new" style:font-family-complex="'courier new', monospace"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Изображение2 Копия 1" text:anchor-type="as-char" svg:y="-0.418cm" svg:width="0.542cm" svg:height="0.542cm" draw:z-index="147"><draw:image xlink:href="Pictures/1000000100000064000000646E675ECB.png" xlink:type="simple" xlink:show="embed" xlink:actuate="onLoad" draw:mime-type="image/png"/></draw:frame><text:s/>МПК-Пересвет<text:tab/>Краткое описание функциональности</text:p>
      </style:header>
      <style:footer>
        <text:p text:style-name="MP1">Стр. <text:bookmark-start text:name="PageNumWizard_FOOTER_Базовый2"/><text:page-number text:select-page="current">77</text:page-number><text:s/>из <text:page-count>77</text:page-count><text:bookmark-end text:name="PageNumWizard_FOOTER_Базовый2"/></text:p>
        <text:p text:style-name="Footer"><text:tab/></text:p>
      </style:foot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1T16:19:15.504979986</meta:creation-date>
    <meta:generator>LibreOffice/24.2.7.2$Linux_X86_64 LibreOffice_project/420$Build-2</meta:generator>
    <dc:date>2025-12-01T15:41:27.530071814</dc:date>
    <meta:editing-duration>P1DT11H12M43S</meta:editing-duration>
    <meta:editing-cycles>70</meta:editing-cycles>
    <meta:print-date>2025-11-21T21:36:42.904763757</meta:print-date>
    <meta:printed-by>Файлы PDF</meta:printed-by>
    <meta:document-statistic meta:table-count="2" meta:image-count="77" meta:object-count="0" meta:page-count="77" meta:paragraph-count="1473" meta:word-count="5967" meta:character-count="45636" meta:non-whitespace-character-count="37695"/>
  </office:meta>
</office:document-meta>
</file>