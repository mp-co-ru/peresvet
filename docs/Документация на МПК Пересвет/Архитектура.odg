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2A0000022A2A21BA2D.png" manifest:media-type="image/png"/>
  <manifest:file-entry manifest:full-path="Pictures/10002C2E00003942000039423A687464.svg" manifest:media-type="image/svg+xml"/>
  <manifest:file-entry manifest:full-path="Pictures/1000000100000B40000003C2E5B9A7B4.png" manifest:media-type="image/png"/>
  <manifest:file-entry manifest:full-path="Pictures/10000000000002D50000010E9783307B.png" manifest:media-type="image/png"/>
  <manifest:file-entry manifest:full-path="Pictures/10000001000003CC00000120D2BE988E.png" manifest:media-type="image/png"/>
  <manifest:file-entry manifest:full-path="Pictures/1000000100000270000000B4211248FB.png" manifest:media-type="image/png"/>
  <manifest:file-entry manifest:full-path="Pictures/1000000100000C73000005D8C1DECDAA.png" manifest:media-type="image/png"/>
  <manifest:file-entry manifest:full-path="Pictures/1000C6E50000408A0000128F114571F0.svg" manifest:media-type="image/svg+xml"/>
  <manifest:file-entry manifest:full-path="Pictures/100000010000013100000078C0986EE3.gif" manifest:media-type="image/gif"/>
  <manifest:file-entry manifest:full-path="Pictures/1000000100000B5B000002C10C448E7F.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stroke="dash" draw:stroke-dash="Long_20_Dash" svg:stroke-width="0.03cm" svg:stroke-color="#158466" draw:marker-start-width="0.25cm" draw:marker-end-width="0.25cm" draw:fill="solid" draw:fill-color="#eeeeee" loext:fill-use-slide-background="false" draw:textarea-horizontal-align="justify" draw:textarea-vertical-align="middle" draw:auto-grow-height="false" fo:min-height="9.97cm" fo:min-width="16.72cm" fo:padding-top="0.14cm" fo:padding-bottom="0.14cm" fo:padding-left="0.265cm" fo:padding-right="0.265cm" loext:decorative="false"/>
    </style:style>
    <style:style style:name="gr2" style:family="graphic" style:parent-style-name="standard">
      <style:graphic-properties svg:stroke-width="0.03cm" draw:marker-start-width="0.25cm" draw:marker-end-width="0.25cm" draw:fill="solid" draw:fill-color="#b4c7dc" draw:textarea-horizontal-align="justify" draw:textarea-vertical-align="middle" draw:auto-grow-height="false" fo:min-height="2.412cm" fo:min-width="4.47cm" fo:padding-top="0.14cm" fo:padding-bottom="0.14cm" fo:padding-left="0.265cm" fo:padding-right="0.265cm" style:writing-mode="lr-tb" loext:decorative="false"/>
      <style:paragraph-properties style:writing-mode="lr-tb"/>
    </style:style>
    <style:style style:name="gr3" style:family="graphic" style:parent-style-name="standard">
      <style:graphic-properties svg:stroke-width="0.03cm" draw:marker-start-width="0.25cm" draw:marker-end-width="0.25cm" draw:fill="solid" draw:fill-color="#b4c7dc" draw:textarea-horizontal-align="justify" draw:textarea-vertical-align="middle" draw:auto-grow-height="false" fo:min-height="2.413cm" fo:min-width="4.47cm" fo:padding-top="0.14cm" fo:padding-bottom="0.14cm" fo:padding-left="0.265cm" fo:padding-right="0.265cm" style:writing-mode="lr-tb" loext:decorative="false"/>
      <style:paragraph-properties style:writing-mode="lr-tb"/>
    </style:style>
    <style:style style:name="gr4" style:family="graphic">
      <style:graphic-properties style:writing-mode="lr-tb" loext:decorative="false"/>
    </style:style>
    <style:style style:name="gr5" style:family="graphic" style:parent-style-name="standard">
      <style:graphic-properties svg:stroke-width="0.03cm" svg:stroke-color="#ff8000" draw:marker-start-width="0.25cm" draw:marker-end-width="0.25cm" draw:fill="solid" draw:fill-color="#ffffff" draw:textarea-horizontal-align="justify" draw:textarea-vertical-align="middle" draw:auto-grow-height="false" fo:min-height="1.22cm" fo:min-width="2.47cm" fo:padding-top="0.14cm" fo:padding-bottom="0.14cm" fo:padding-left="0.265cm" fo:padding-right="0.265cm" style:writing-mode="lr-tb" loext:decorative="false"/>
      <style:paragraph-properties style:writing-mode="lr-tb"/>
    </style:style>
    <style:style style:name="gr6" style:family="graphic" style:parent-style-name="Object_20_with_20_no_20_fill_20_and_20_no_20_line">
      <style:graphic-properties draw:stroke="none" svg:stroke-color="#ff8000"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standard">
      <style:graphic-properties svg:stroke-width="0.03cm" svg:stroke-color="#ff8000" draw:marker-start-width="0.25cm" draw:marker-end-width="0.25cm" draw:fill="solid" draw:fill-color="#ffffff" draw:textarea-horizontal-align="justify" draw:textarea-vertical-align="middle" draw:auto-grow-height="false" fo:min-height="1.21cm" fo:min-width="2.446cm" fo:padding-top="0.14cm" fo:padding-bottom="0.14cm" fo:padding-left="0.265cm" fo:padding-right="0.265cm" style:writing-mode="lr-tb" loext:decorative="false"/>
      <style:paragraph-properties style:writing-mode="lr-tb"/>
    </style:style>
    <style:style style:name="gr8" style:family="graphic" style:parent-style-name="Object_20_with_20_no_20_fill_20_and_20_no_20_line">
      <style:graphic-properties draw:stroke="none" draw:fill="solid" draw:fill-color="#b4c7dc"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graphic-properties loext:decorative="false"/>
    </style:style>
    <style:style style:name="gr10" style:family="graphic" style:parent-style-name="standard" style:list-style-name="L2">
      <style:graphic-properties draw:stroke="solid" draw:stroke-dash="Dashed_20__28_var_29__20_2" svg:stroke-width="0.03cm" svg:stroke-color="#000000" draw:marker-start="" draw:marker-start-width="0.26cm" draw:marker-start-center="false" draw:marker-end="" draw:marker-end-width="0.26cm" draw:marker-end-center="false" draw:stroke-linejoin="miter" svg:stroke-linecap="butt" draw:fill="solid" draw:fill-color="#ffffff" draw:textarea-horizontal-align="justify" fo:padding-top="0.125cm" fo:padding-bottom="0.125cm" fo:padding-left="0.25cm" fo:padding-right="0.25cm" fo:wrap-option="wrap" draw:shadow="hidden" draw:shadow-offset-x="0.05cm" draw:shadow-offset-y="0.05cm" draw:shadow-color="#3465a4" loext:decorative="false"/>
    </style:style>
    <style:style style:name="gr11" style:family="graphic" style:parent-style-name="standard" style:list-style-name="L2">
      <style:graphic-properties draw:stroke="solid" draw:stroke-dash="Dashed_20__28_var_29__20_2" svg:stroke-width="0.03cm" svg:stroke-color="#000000" draw:marker-start="" draw:marker-start-width="0.26cm" draw:marker-start-center="false" draw:marker-end="" draw:marker-end-width="0.26cm" draw:marker-end-center="false" draw:stroke-linejoin="miter" svg:stroke-linecap="butt" draw:fill="solid" draw:fill-color="#ffffff" draw:textarea-horizontal-align="justify" fo:padding-top="0.125cm" fo:padding-bottom="0.125cm" fo:padding-left="0.25cm" fo:padding-right="0.25cm" fo:wrap-option="wrap" draw:shadow="hidden" draw:shadow-offset-x="0.05cm" draw:shadow-offset-y="0.05cm" draw:shadow-color="#3465a4" loext:decorative="false"/>
    </style:style>
    <style:style style:name="gr12" style:family="graphic" style:parent-style-name="standard" style:list-style-name="L2">
      <style:graphic-properties draw:stroke="solid" draw:stroke-dash="Dashed_20__28_var_29__20_2" svg:stroke-width="0.03cm" svg:stroke-color="#000000" draw:marker-start="" draw:marker-start-width="0.26cm" draw:marker-start-center="false" draw:marker-end="" draw:marker-end-width="0.26cm" draw:marker-end-center="false" draw:stroke-linejoin="miter" svg:stroke-linecap="butt" draw:fill="solid" draw:fill-color="#ffffff" draw:textarea-horizontal-align="justify" fo:padding-top="0.125cm" fo:padding-bottom="0.125cm" fo:padding-left="0.25cm" fo:padding-right="0.25cm" fo:wrap-option="wrap" draw:shadow="hidden" draw:shadow-offset-x="0.05cm" draw:shadow-offset-y="0.05cm" draw:shadow-color="#3465a4" loext:decorative="false"/>
    </style:style>
    <style:style style:name="gr13" style:family="graphic" style:parent-style-name="standard" style:list-style-name="L2">
      <style:graphic-properties draw:stroke="solid" draw:stroke-dash="Dashed_20__28_var_29__20_2" svg:stroke-width="0.03cm" svg:stroke-color="#000000" draw:marker-start="" draw:marker-start-width="0.26cm" draw:marker-start-center="false" draw:marker-end="" draw:marker-end-width="0.26cm" draw:marker-end-center="false" draw:stroke-linejoin="miter" svg:stroke-linecap="butt" draw:fill="solid" draw:fill-color="#ffffff" draw:textarea-horizontal-align="justify" fo:padding-top="0.125cm" fo:padding-bottom="0.125cm" fo:padding-left="0.25cm" fo:padding-right="0.25cm" fo:wrap-option="wrap" draw:shadow="hidden" draw:shadow-offset-x="0.05cm" draw:shadow-offset-y="0.05cm" draw:shadow-color="#3465a4" loext:decorative="false"/>
    </style:style>
    <style:style style:name="gr14" style:family="graphic" style:parent-style-name="standard" style:list-style-name="L2">
      <style:graphic-properties draw:stroke="solid" draw:stroke-dash="Dashed_20__28_var_29__20_2" svg:stroke-width="0.03cm" svg:stroke-color="#000000" draw:marker-start="" draw:marker-start-width="0.26cm" draw:marker-start-center="false" draw:marker-end="" draw:marker-end-width="0.26cm" draw:marker-end-center="false" draw:stroke-linejoin="miter" svg:stroke-linecap="butt" draw:fill="solid" draw:fill-color="#ffffff" draw:textarea-horizontal-align="justify" fo:padding-top="0.125cm" fo:padding-bottom="0.125cm" fo:padding-left="0.25cm" fo:padding-right="0.25cm" fo:wrap-option="wrap" draw:shadow="hidden" draw:shadow-offset-x="0.05cm" draw:shadow-offset-y="0.05cm" draw:shadow-color="#3465a4" loext:decorative="false"/>
    </style:style>
    <style:style style:name="gr15" style:family="graphic" style:parent-style-name="standard">
      <style:graphic-properties svg:stroke-width="0.03cm" draw:marker-start-width="0.25cm" draw:marker-end-width="0.25cm" draw:fill="solid" draw:fill-color="#ffffff" draw:textarea-horizontal-align="justify" draw:textarea-vertical-align="middle" draw:auto-grow-height="false" fo:min-height="2.47cm" fo:min-width="4.47cm" fo:padding-top="0.14cm" fo:padding-bottom="0.14cm" fo:padding-left="0.265cm" fo:padding-right="0.265cm" style:writing-mode="lr-tb" loext:decorative="false"/>
      <style:paragraph-properties style:writing-mode="lr-tb"/>
    </style:style>
    <style:style style:name="gr16" style:family="graphic" style:parent-style-name="standard">
      <style:graphic-properties svg:stroke-width="0.03cm" draw:marker-start-width="0.25cm" draw:marker-end-width="0.25cm" draw:fill="solid" draw:fill-color="#b4c7dc" draw:textarea-horizontal-align="justify" draw:textarea-vertical-align="middle" draw:auto-grow-height="false" fo:min-height="1.22cm" fo:min-width="3.22cm" fo:padding-top="0.14cm" fo:padding-bottom="0.14cm" fo:padding-left="0.265cm" fo:padding-right="0.265cm" style:writing-mode="lr-tb" loext:decorative="false"/>
      <style:paragraph-properties style:writing-mode="lr-tb"/>
    </style:style>
    <style:style style:name="gr17" style:family="graphic" style:parent-style-name="standard">
      <style:graphic-properties draw:stroke="solid" svg:stroke-width="0.01cm" svg:stroke-color="#666666" draw:marker-start-width="0.22cm" draw:marker-end-width="0.22cm" svg:stroke-opacity="100%" draw:stroke-linejoin="bevel" draw:fill="solid" draw:fill-color="#eeeeee" draw:textarea-horizontal-align="left" draw:textarea-vertical-align="middle" draw:auto-grow-height="false" fo:min-height="0.139cm" fo:min-width="0.579cm" fo:padding-top="0.11cm" fo:padding-bottom="0.11cm" fo:padding-left="0.23cm" fo:padding-right="0.23cm" fo:wrap-option="no-wrap" draw:shadow-color="#808080" loext:decorative="false"/>
    </style:style>
    <style:style style:name="gr18" style:family="graphic" style:parent-style-name="standard">
      <style:graphic-properties draw:stroke="solid" svg:stroke-width="0.01cm" svg:stroke-color="#666666" draw:marker-start-width="0.22cm" draw:marker-end-width="0.22cm" svg:stroke-opacity="100%" draw:stroke-linejoin="bevel" draw:fill="solid" draw:fill-color="#eeeeee" draw:textarea-horizontal-align="left" draw:textarea-vertical-align="middle" draw:auto-grow-height="false" fo:min-height="0.016cm" fo:min-width="0.276cm" fo:padding-top="0.11cm" fo:padding-bottom="0.11cm" fo:padding-left="0.23cm" fo:padding-right="0.23cm" fo:wrap-option="no-wrap" draw:shadow-color="#808080" loext:decorative="false"/>
    </style:style>
    <style:style style:name="gr19" style:family="graphic" style:parent-style-name="standard">
      <style:graphic-properties draw:stroke="solid" svg:stroke-width="0.01cm" svg:stroke-color="#666666" draw:marker-start-width="0.22cm" draw:marker-end-width="0.22cm" svg:stroke-opacity="100%" draw:stroke-linejoin="bevel" draw:fill="solid" draw:fill-color="#eeeeee" draw:textarea-horizontal-align="left" draw:textarea-vertical-align="middle" draw:auto-grow-height="false" fo:min-height="0.519cm" fo:min-width="0.04cm" fo:padding-top="0.11cm" fo:padding-bottom="0.11cm" fo:padding-left="0.23cm" fo:padding-right="0.23cm" fo:wrap-option="no-wrap" draw:shadow-color="#808080" loext:decorative="false"/>
    </style:style>
    <style:style style:name="gr20" style:family="graphic" style:parent-style-name="standard">
      <style:graphic-properties draw:stroke="solid" svg:stroke-width="0.01cm" svg:stroke-color="#666666" draw:marker-start-width="0.22cm" draw:marker-end-width="0.22cm" svg:stroke-opacity="100%" draw:stroke-linejoin="bevel" draw:fill="solid" draw:fill-color="#eeeeee" draw:textarea-horizontal-align="left" draw:textarea-vertical-align="middle" draw:auto-grow-height="false" fo:min-height="0cm" fo:min-width="0cm" fo:padding-top="0.11cm" fo:padding-bottom="0.11cm" fo:padding-left="0.23cm" fo:padding-right="0.23cm" fo:wrap-option="no-wrap" draw:shadow-color="#808080" loext:decorative="false"/>
    </style:style>
    <style:style style:name="gr21" style:family="graphic" style:parent-style-name="standard">
      <style:graphic-properties draw:stroke="solid" svg:stroke-width="0.01cm" svg:stroke-color="#666666" draw:marker-start-width="0.22cm" draw:marker-end-width="0.22cm" svg:stroke-opacity="100%" draw:stroke-linejoin="bevel" draw:fill="solid" draw:fill-color="#eeeeee" draw:textarea-horizontal-align="left" draw:textarea-vertical-align="middle" draw:auto-grow-height="false" fo:min-height="0.125cm" fo:min-width="0cm" fo:padding-top="0.11cm" fo:padding-bottom="0.11cm" fo:padding-left="0.23cm" fo:padding-right="0.23cm" fo:wrap-option="no-wrap" draw:shadow-color="#808080" loext:decorative="false"/>
    </style:style>
    <style:style style:name="gr22" style:family="graphic" style:parent-style-name="standard">
      <style:graphic-properties draw:stroke="solid" svg:stroke-width="0.01cm" svg:stroke-color="#666666" draw:marker-start-width="0.22cm" draw:marker-end-width="0.22cm" svg:stroke-opacity="100%" draw:stroke-linejoin="bevel" draw:fill="solid" draw:fill-color="#eeeeee" draw:textarea-horizontal-align="left" draw:textarea-vertical-align="middle" draw:auto-grow-height="false" fo:min-height="0.145cm" fo:min-width="0.587cm" fo:padding-top="0.11cm" fo:padding-bottom="0.11cm" fo:padding-left="0.23cm" fo:padding-right="0.23cm" fo:wrap-option="no-wrap" draw:shadow-color="#808080" loext:decorative="false"/>
    </style:style>
    <style:style style:name="gr23" style:family="graphic" style:parent-style-name="standard">
      <style:graphic-properties draw:stroke="solid" svg:stroke-width="0.01cm" svg:stroke-color="#666666" draw:marker-start-width="0.22cm" draw:marker-end-width="0.22cm" svg:stroke-opacity="100%" draw:stroke-linejoin="bevel" draw:fill="solid" draw:fill-color="#eeeeee" draw:textarea-horizontal-align="left" draw:textarea-vertical-align="middle" draw:auto-grow-height="false" fo:min-height="0.096cm" fo:min-width="0.579cm" fo:padding-top="0.11cm" fo:padding-bottom="0.11cm" fo:padding-left="0.23cm" fo:padding-right="0.23cm" fo:wrap-option="no-wrap" draw:shadow-color="#808080" loext:decorative="false"/>
    </style:style>
    <style:style style:name="gr24" style:family="graphic" style:parent-style-name="standard">
      <style:graphic-properties draw:stroke="solid" svg:stroke-width="0.01cm" svg:stroke-color="#666666" draw:marker-start-width="0.22cm" draw:marker-end-width="0.22cm" svg:stroke-opacity="100%" draw:stroke-linejoin="bevel" draw:fill="solid" draw:fill-color="#eeeeee" draw:textarea-horizontal-align="left" draw:textarea-vertical-align="middle" draw:auto-grow-height="false" fo:min-height="0.106cm" fo:min-width="0.587cm" fo:padding-top="0.11cm" fo:padding-bottom="0.11cm" fo:padding-left="0.23cm" fo:padding-right="0.23cm" fo:wrap-option="no-wrap" draw:shadow-color="#808080" loext:decorative="false"/>
    </style:style>
    <style:style style:name="gr25" style:family="graphic" style:parent-style-name="standard">
      <style:graphic-properties draw:stroke="solid" svg:stroke-width="0.01cm" svg:stroke-color="#666666" draw:marker-start-width="0.22cm" draw:marker-end-width="0.22cm" svg:stroke-opacity="100%" draw:stroke-linejoin="bevel" draw:fill="solid" draw:fill-color="#eeeeee" draw:textarea-horizontal-align="left" draw:textarea-vertical-align="middle" draw:auto-grow-height="false" fo:min-height="0.015cm" fo:min-width="0.972cm" fo:padding-top="0.11cm" fo:padding-bottom="0.11cm" fo:padding-left="0.23cm" fo:padding-right="0.23cm" fo:wrap-option="no-wrap" draw:shadow-color="#808080" loext:decorative="false"/>
    </style:style>
    <style:style style:name="gr26" style:family="graphic" style:parent-style-name="standard">
      <style:graphic-properties draw:stroke="solid" svg:stroke-width="0.01cm" svg:stroke-color="#666666" draw:marker-start-width="0.22cm" draw:marker-end-width="0.22cm" svg:stroke-opacity="100%" draw:stroke-linejoin="bevel" draw:fill="solid" draw:fill-color="#eeeeee" draw:textarea-horizontal-align="left" draw:textarea-vertical-align="middle" draw:auto-grow-height="false" fo:min-height="0.136cm" fo:min-width="0cm" fo:padding-top="0.11cm" fo:padding-bottom="0.11cm" fo:padding-left="0.23cm" fo:padding-right="0.23cm" fo:wrap-option="no-wrap" draw:shadow-color="#808080" loext:decorative="false"/>
    </style:style>
    <style:style style:name="gr27" style:family="graphic" style:parent-style-name="standard">
      <style:graphic-properties draw:stroke="solid" svg:stroke-width="0.01cm" svg:stroke-color="#666666" draw:marker-start-width="0.22cm" draw:marker-end-width="0.22cm" svg:stroke-opacity="100%" draw:stroke-linejoin="bevel" draw:fill="solid" draw:fill-color="#eeeeee" draw:textarea-horizontal-align="left" draw:textarea-vertical-align="middle" draw:auto-grow-height="false" fo:min-height="0.025cm" fo:min-width="0cm" fo:padding-top="0.11cm" fo:padding-bottom="0.11cm" fo:padding-left="0.23cm" fo:padding-right="0.23cm" fo:wrap-option="no-wrap" draw:shadow-color="#808080" loext:decorative="false"/>
    </style:style>
    <style:style style:name="gr28" style:family="graphic" style:parent-style-name="standard">
      <style:graphic-properties draw:stroke="solid" svg:stroke-width="0.01cm" svg:stroke-color="#666666" draw:marker-start-width="0.22cm" draw:marker-end-width="0.22cm" svg:stroke-opacity="100%" draw:stroke-linejoin="bevel" draw:fill="solid" draw:fill-color="#eeeeee" draw:textarea-horizontal-align="left" draw:textarea-vertical-align="middle" draw:auto-grow-height="false" fo:min-height="0.054cm" fo:min-width="0cm" fo:padding-top="0.11cm" fo:padding-bottom="0.11cm" fo:padding-left="0.23cm" fo:padding-right="0.23cm" fo:wrap-option="no-wrap" draw:shadow-color="#808080" loext:decorative="false"/>
    </style:style>
    <style:style style:name="gr29" style:family="graphic" style:parent-style-name="standard">
      <style:graphic-properties draw:stroke="solid" svg:stroke-width="0.01cm" svg:stroke-color="#666666" draw:marker-start-width="0.22cm" draw:marker-end-width="0.22cm" svg:stroke-opacity="100%" draw:stroke-linejoin="bevel" draw:fill="solid" draw:fill-color="#eeeeee" draw:textarea-horizontal-align="left" draw:textarea-vertical-align="middle" draw:auto-grow-height="false" fo:min-height="0.232cm" fo:min-width="0cm" fo:padding-top="0.11cm" fo:padding-bottom="0.11cm" fo:padding-left="0.23cm" fo:padding-right="0.23cm" fo:wrap-option="no-wrap" draw:shadow-color="#808080" loext:decorative="false"/>
    </style:style>
    <style:style style:name="gr30" style:family="graphic" style:parent-style-name="standard">
      <style:graphic-properties draw:stroke="solid" svg:stroke-width="0.01cm" svg:stroke-color="#666666" draw:marker-start-width="0.22cm" draw:marker-end-width="0.22cm" svg:stroke-opacity="100%" draw:stroke-linejoin="bevel" draw:fill="solid" draw:fill-color="#eeeeee" draw:textarea-horizontal-align="left" draw:textarea-vertical-align="middle" draw:auto-grow-height="false" fo:min-height="0.003cm" fo:min-width="0cm" fo:padding-top="0.11cm" fo:padding-bottom="0.11cm" fo:padding-left="0.23cm" fo:padding-right="0.23cm" fo:wrap-option="no-wrap" draw:shadow-color="#808080" loext:decorative="false"/>
    </style:style>
    <style:style style:name="gr31" style:family="graphic" style:parent-style-name="standard">
      <style:graphic-properties draw:stroke="solid" svg:stroke-width="0.01cm" svg:stroke-color="#666666" draw:marker-start-width="0.22cm" draw:marker-end-width="0.22cm" svg:stroke-opacity="100%" draw:stroke-linejoin="bevel" draw:fill="solid" draw:fill-color="#eeeeee" draw:textarea-horizontal-align="left" draw:textarea-vertical-align="middle" draw:auto-grow-height="false" fo:min-height="0.003cm" fo:min-width="0.083cm" fo:padding-top="0.11cm" fo:padding-bottom="0.11cm" fo:padding-left="0.23cm" fo:padding-right="0.23cm" fo:wrap-option="no-wrap" draw:shadow-color="#808080" loext:decorative="false"/>
    </style:style>
    <style:style style:name="gr32" style:family="graphic" style:parent-style-name="standard">
      <style:graphic-properties draw:stroke="solid" svg:stroke-width="0.01cm" svg:stroke-color="#666666" draw:marker-start-width="0.22cm" draw:marker-end-width="0.22cm" svg:stroke-opacity="100%" draw:stroke-linejoin="bevel" draw:fill="solid" draw:fill-color="#eeeeee" draw:textarea-horizontal-align="left" draw:textarea-vertical-align="middle" draw:auto-grow-height="false" fo:min-height="0.442cm" fo:min-width="1.226cm" fo:padding-top="0.11cm" fo:padding-bottom="0.11cm" fo:padding-left="0.23cm" fo:padding-right="0.23cm" fo:wrap-option="no-wrap" draw:shadow-color="#808080" loext:decorative="false"/>
    </style:style>
    <style:style style:name="gr33" style:family="graphic" style:parent-style-name="standard">
      <style:graphic-properties draw:stroke="solid" svg:stroke-width="0.01cm" svg:stroke-color="#666666" draw:marker-start-width="0.22cm" draw:marker-end-width="0.22cm" draw:fill="solid" draw:fill-color="#eeeeee" loext:fill-use-slide-background="false" draw:textarea-horizontal-align="left" draw:textarea-vertical-align="middle" draw:auto-grow-height="false" fo:min-height="0.319cm" fo:min-width="0cm" fo:padding-top="0.135cm" fo:padding-bottom="0.135cm" fo:padding-left="0.255cm" fo:padding-right="0.255cm" fo:wrap-option="no-wrap" draw:shadow-color="#808080" loext:decorative="false"/>
    </style:style>
    <style:style style:name="gr34" style:family="graphic" style:parent-style-name="standard">
      <style:graphic-properties draw:stroke="solid" svg:stroke-width="0.01cm" svg:stroke-color="#666666" draw:marker-start-width="0.22cm" draw:marker-end-width="0.22cm" draw:fill="solid" draw:fill-color="#eeeeee" loext:fill-use-slide-background="false" draw:textarea-horizontal-align="left" draw:textarea-vertical-align="middle" draw:auto-grow-height="false" fo:min-height="0.078cm" fo:min-width="0cm" fo:padding-top="0.135cm" fo:padding-bottom="0.135cm" fo:padding-left="0.255cm" fo:padding-right="0.255cm" fo:wrap-option="no-wrap" draw:shadow-color="#808080" loext:decorative="false"/>
    </style:style>
    <style:style style:name="gr35" style:family="graphic" style:parent-style-name="standard">
      <style:graphic-properties draw:stroke="solid" svg:stroke-width="0.01cm" svg:stroke-color="#666666" draw:marker-start-width="0.22cm" draw:marker-end-width="0.22cm" draw:fill="solid" draw:fill-color="#eeeeee" loext:fill-use-slide-background="false" draw:textarea-horizontal-align="left" draw:textarea-vertical-align="middle" draw:auto-grow-height="false" fo:min-height="0.054cm" fo:min-width="0cm" fo:padding-top="0.135cm" fo:padding-bottom="0.135cm" fo:padding-left="0.255cm" fo:padding-right="0.255cm" fo:wrap-option="no-wrap" draw:shadow-color="#808080" loext:decorative="false"/>
    </style:style>
    <style:style style:name="gr36" style:family="graphic" style:parent-style-name="standard">
      <style:graphic-properties draw:stroke="solid" svg:stroke-width="0.01cm" svg:stroke-color="#666666" draw:marker-start-width="0.22cm" draw:marker-end-width="0.22cm" draw:fill="solid" draw:fill-color="#eeeeee" loext:fill-use-slide-background="false" draw:textarea-horizontal-align="left" draw:textarea-vertical-align="middle" draw:auto-grow-height="false" fo:min-height="0cm" fo:min-width="0cm" fo:padding-top="0.135cm" fo:padding-bottom="0.135cm" fo:padding-left="0.255cm" fo:padding-right="0.255cm" fo:wrap-option="no-wrap" draw:shadow-color="#808080" loext:decorative="false"/>
    </style:style>
    <style:style style:name="gr37" style:family="graphic" style:parent-style-name="standard">
      <style:graphic-properties draw:stroke="solid" svg:stroke-width="0.01cm" svg:stroke-color="#666666" draw:marker-start-width="0.22cm" draw:marker-end-width="0.22cm" svg:stroke-opacity="100%" draw:stroke-linejoin="bevel" draw:fill="solid" draw:fill-color="#eeeeee" draw:textarea-horizontal-align="left" draw:textarea-vertical-align="middle" draw:auto-grow-height="false" fo:min-height="0.155cm" fo:min-width="0.025cm" fo:padding-top="0.12cm" fo:padding-bottom="0.12cm" fo:padding-left="0.24cm" fo:padding-right="0.24cm" fo:wrap-option="no-wrap" draw:shadow-color="#808080" loext:decorative="false"/>
    </style:style>
    <style:style style:name="gr38" style:family="graphic" style:parent-style-name="standard">
      <style:graphic-properties draw:stroke="solid" svg:stroke-width="0.01cm" svg:stroke-color="#666666" draw:marker-start-width="0.22cm" draw:marker-end-width="0.22cm" svg:stroke-opacity="100%" draw:stroke-linejoin="bevel" draw:fill="solid" draw:fill-color="#eeeeee" draw:textarea-horizontal-align="left" draw:textarea-vertical-align="middle" draw:auto-grow-height="false" fo:min-height="0cm" fo:min-width="0cm" fo:padding-top="0.12cm" fo:padding-bottom="0.12cm" fo:padding-left="0.24cm" fo:padding-right="0.24cm" fo:wrap-option="no-wrap" draw:shadow-color="#808080" loext:decorative="false"/>
    </style:style>
    <style:style style:name="gr39" style:family="graphic" style:parent-style-name="standard">
      <style:graphic-properties draw:stroke="solid" svg:stroke-width="0.01cm" svg:stroke-color="#666666" draw:marker-start-width="0.22cm" draw:marker-end-width="0.22cm" svg:stroke-opacity="100%" draw:stroke-linejoin="bevel" draw:fill="solid" draw:fill-color="#eeeeee" draw:textarea-horizontal-align="left" draw:textarea-vertical-align="middle" draw:auto-grow-height="false" fo:min-height="0.365cm" fo:min-width="0.27cm" fo:padding-top="0.12cm" fo:padding-bottom="0.12cm" fo:padding-left="0.24cm" fo:padding-right="0.24cm" fo:wrap-option="no-wrap" draw:shadow-color="#808080" loext:decorative="false"/>
    </style:style>
    <style:style style:name="gr40" style:family="graphic" style:parent-style-name="standard">
      <style:graphic-properties draw:stroke="solid" svg:stroke-width="0.01cm" svg:stroke-color="#666666" draw:marker-start-width="0.22cm" draw:marker-end-width="0.22cm" svg:stroke-opacity="100%" draw:stroke-linejoin="bevel" draw:fill="solid" draw:fill-color="#eeeeee" draw:textarea-horizontal-align="left" draw:textarea-vertical-align="middle" draw:auto-grow-height="false" fo:min-height="0.335cm" fo:min-width="0.238cm" fo:padding-top="0.12cm" fo:padding-bottom="0.12cm" fo:padding-left="0.24cm" fo:padding-right="0.24cm" fo:wrap-option="no-wrap" draw:shadow-color="#808080" loext:decorative="false"/>
    </style:style>
    <style:style style:name="gr41" style:family="graphic" style:parent-style-name="standard">
      <style:graphic-properties draw:stroke="solid" svg:stroke-width="0.01cm" svg:stroke-color="#666666" draw:marker-start-width="0.22cm" draw:marker-end-width="0.22cm" svg:stroke-opacity="100%" draw:stroke-linejoin="bevel" draw:fill="solid" draw:fill-color="#eeeeee" draw:textarea-horizontal-align="left" draw:textarea-vertical-align="middle" draw:auto-grow-height="false" fo:min-height="0cm" fo:min-width="0.117cm" fo:padding-top="0.12cm" fo:padding-bottom="0.12cm" fo:padding-left="0.24cm" fo:padding-right="0.24cm" fo:wrap-option="no-wrap" draw:shadow-color="#808080" loext:decorative="false"/>
    </style:style>
    <style:style style:name="gr42" style:family="graphic" style:parent-style-name="standard">
      <style:graphic-properties draw:stroke="solid" svg:stroke-width="0.01cm" svg:stroke-color="#666666" draw:marker-start-width="0.22cm" draw:marker-end-width="0.22cm" svg:stroke-opacity="100%" draw:stroke-linejoin="bevel" draw:fill="solid" draw:fill-color="#eeeeee" draw:textarea-horizontal-align="left" draw:textarea-vertical-align="middle" draw:auto-grow-height="false" fo:min-height="0cm" fo:min-width="0.173cm" fo:padding-top="0.12cm" fo:padding-bottom="0.12cm" fo:padding-left="0.24cm" fo:padding-right="0.24cm" fo:wrap-option="no-wrap" draw:shadow-color="#808080" loext:decorative="false"/>
    </style:style>
    <style:style style:name="gr43" style:family="graphic" style:parent-style-name="standard">
      <style:graphic-properties draw:stroke="solid" svg:stroke-width="0.01cm" svg:stroke-color="#666666" draw:marker-start-width="0.22cm" draw:marker-end-width="0.22cm" svg:stroke-opacity="100%" draw:stroke-linejoin="bevel" draw:fill="solid" draw:fill-color="#eeeeee" draw:textarea-horizontal-align="left" draw:textarea-vertical-align="middle" draw:auto-grow-height="false" fo:min-height="0.239cm" fo:min-width="0cm" fo:padding-top="0.12cm" fo:padding-bottom="0.12cm" fo:padding-left="0.24cm" fo:padding-right="0.24cm" fo:wrap-option="no-wrap" draw:shadow-color="#808080" loext:decorative="false"/>
    </style:style>
    <style:style style:name="gr44" style:family="graphic" style:parent-style-name="standard">
      <style:graphic-properties draw:stroke="solid" svg:stroke-width="0.01cm" svg:stroke-color="#666666" draw:marker-start-width="0.22cm" draw:marker-end-width="0.22cm" svg:stroke-opacity="100%" draw:stroke-linejoin="bevel" draw:fill="solid" draw:fill-color="#eeeeee" draw:textarea-horizontal-align="left" draw:textarea-vertical-align="middle" draw:auto-grow-height="false" fo:min-height="0.308cm" fo:min-width="0.189cm" fo:padding-top="0.12cm" fo:padding-bottom="0.12cm" fo:padding-left="0.24cm" fo:padding-right="0.24cm" fo:wrap-option="no-wrap" draw:shadow-color="#808080" loext:decorative="false"/>
    </style:style>
    <style:style style:name="gr45" style:family="graphic" style:parent-style-name="standard">
      <style:graphic-properties draw:stroke="solid" svg:stroke-width="0.01cm" svg:stroke-color="#666666" draw:marker-start-width="0.22cm" draw:marker-end-width="0.22cm" svg:stroke-opacity="100%" draw:stroke-linejoin="bevel" draw:fill="solid" draw:fill-color="#eeeeee" draw:textarea-horizontal-align="left" draw:textarea-vertical-align="middle" draw:auto-grow-height="false" fo:min-height="0cm" fo:min-width="0.166cm" fo:padding-top="0.12cm" fo:padding-bottom="0.12cm" fo:padding-left="0.24cm" fo:padding-right="0.24cm" fo:wrap-option="no-wrap" draw:shadow-color="#808080" loext:decorative="false"/>
    </style:style>
    <style:style style:name="gr46" style:family="graphic" style:parent-style-name="standard">
      <style:graphic-properties draw:stroke="solid" svg:stroke-width="0.01cm" svg:stroke-color="#666666" draw:marker-start-width="0.22cm" draw:marker-end-width="0.22cm" svg:stroke-opacity="100%" draw:stroke-linejoin="bevel" draw:fill="solid" draw:fill-color="#eeeeee" draw:textarea-horizontal-align="left" draw:textarea-vertical-align="middle" draw:auto-grow-height="false" fo:min-height="0cm" fo:min-width="0.16cm" fo:padding-top="0.12cm" fo:padding-bottom="0.12cm" fo:padding-left="0.24cm" fo:padding-right="0.24cm" fo:wrap-option="no-wrap" draw:shadow-color="#808080" loext:decorative="false"/>
    </style:style>
    <style:style style:name="gr47" style:family="graphic" style:parent-style-name="standard">
      <style:graphic-properties draw:stroke="solid" svg:stroke-width="0.01cm" svg:stroke-color="#666666" draw:marker-start-width="0.22cm" draw:marker-end-width="0.22cm" svg:stroke-opacity="100%" draw:stroke-linejoin="bevel" draw:fill="solid" draw:fill-color="#eeeeee" draw:textarea-horizontal-align="left" draw:textarea-vertical-align="middle" draw:auto-grow-height="false" fo:min-height="0.22cm" fo:min-width="0cm" fo:padding-top="0.12cm" fo:padding-bottom="0.12cm" fo:padding-left="0.24cm" fo:padding-right="0.24cm" fo:wrap-option="no-wrap" draw:shadow-color="#808080" loext:decorative="false"/>
    </style:style>
    <style:style style:name="gr48" style:family="graphic" style:parent-style-name="standard">
      <style:graphic-properties draw:stroke="solid" svg:stroke-width="0.01cm" svg:stroke-color="#666666" draw:marker-start-width="0.22cm" draw:marker-end-width="0.22cm" svg:stroke-opacity="100%" draw:stroke-linejoin="bevel" draw:fill="solid" draw:fill-color="#eeeeee" draw:textarea-horizontal-align="left" draw:textarea-vertical-align="middle" draw:auto-grow-height="false" fo:min-height="0cm" fo:min-width="0.106cm" fo:padding-top="0.12cm" fo:padding-bottom="0.12cm" fo:padding-left="0.24cm" fo:padding-right="0.24cm" fo:wrap-option="no-wrap" draw:shadow-color="#808080" loext:decorative="false"/>
    </style:style>
    <style:style style:name="gr49" style:family="graphic" style:parent-style-name="standard">
      <style:graphic-properties draw:stroke="solid" svg:stroke-width="0.01cm" svg:stroke-color="#666666" draw:marker-start-width="0.22cm" draw:marker-end-width="0.22cm" svg:stroke-opacity="100%" draw:stroke-linejoin="bevel" draw:fill="solid" draw:fill-color="#eeeeee" draw:textarea-horizontal-align="left" draw:textarea-vertical-align="middle" draw:auto-grow-height="false" fo:min-height="0.096cm" fo:min-width="0cm" fo:padding-top="0.12cm" fo:padding-bottom="0.12cm" fo:padding-left="0.24cm" fo:padding-right="0.24cm" fo:wrap-option="no-wrap" draw:shadow-color="#808080" loext:decorative="false"/>
    </style:style>
    <style:style style:name="gr50" style:family="graphic" style:parent-style-name="standard">
      <style:graphic-properties draw:stroke="solid" svg:stroke-width="0.01cm" svg:stroke-color="#666666" draw:marker-start-width="0.22cm" draw:marker-end-width="0.22cm" svg:stroke-opacity="100%" draw:stroke-linejoin="bevel" draw:fill="solid" draw:fill-color="#eeeeee" draw:textarea-horizontal-align="left" draw:textarea-vertical-align="middle" draw:auto-grow-height="false" fo:min-height="0.161cm" fo:min-width="0.085cm" fo:padding-top="0.12cm" fo:padding-bottom="0.12cm" fo:padding-left="0.24cm" fo:padding-right="0.24cm" fo:wrap-option="no-wrap" draw:shadow-color="#808080" loext:decorative="false"/>
    </style:style>
    <style:style style:name="gr51" style:family="graphic" style:parent-style-name="standard">
      <style:graphic-properties draw:stroke="solid" svg:stroke-width="0.01cm" svg:stroke-color="#666666" draw:marker-start-width="0.22cm" draw:marker-end-width="0.22cm" svg:stroke-opacity="100%" draw:stroke-linejoin="bevel" draw:fill="solid" draw:fill-color="#eeeeee" draw:textarea-horizontal-align="left" draw:textarea-vertical-align="middle" draw:auto-grow-height="false" fo:min-height="0.241cm" fo:min-width="0cm" fo:padding-top="0.12cm" fo:padding-bottom="0.12cm" fo:padding-left="0.24cm" fo:padding-right="0.24cm" fo:wrap-option="no-wrap" draw:shadow-color="#808080" loext:decorative="false"/>
    </style:style>
    <style:style style:name="gr52" style:family="graphic" style:parent-style-name="standard">
      <style:graphic-properties draw:stroke="solid" svg:stroke-width="0.01cm" svg:stroke-color="#666666" draw:marker-start-width="0.22cm" draw:marker-end-width="0.22cm" svg:stroke-opacity="100%" draw:stroke-linejoin="bevel" draw:fill="solid" draw:fill-color="#eeeeee" draw:textarea-horizontal-align="left" draw:textarea-vertical-align="middle" draw:auto-grow-height="false" fo:min-height="0.225cm" fo:min-width="0cm" fo:padding-top="0.12cm" fo:padding-bottom="0.12cm" fo:padding-left="0.24cm" fo:padding-right="0.24cm" fo:wrap-option="no-wrap" draw:shadow-color="#808080" loext:decorative="false"/>
    </style:style>
    <style:style style:name="gr53" style:family="graphic" style:parent-style-name="standard">
      <style:graphic-properties draw:stroke="solid" svg:stroke-width="0.01cm" svg:stroke-color="#666666" draw:marker-start-width="0.22cm" draw:marker-end-width="0.22cm" svg:stroke-opacity="100%" draw:stroke-linejoin="bevel" draw:fill="solid" draw:fill-color="#eeeeee" draw:textarea-horizontal-align="left" draw:textarea-vertical-align="middle" draw:auto-grow-height="false" fo:min-height="0cm" fo:min-width="0.058cm" fo:padding-top="0.12cm" fo:padding-bottom="0.12cm" fo:padding-left="0.24cm" fo:padding-right="0.24cm" fo:wrap-option="no-wrap" draw:shadow-color="#808080" loext:decorative="false"/>
    </style:style>
    <style:style style:name="gr54" style:family="graphic" style:parent-style-name="standard">
      <style:graphic-properties draw:stroke="solid" svg:stroke-width="0.01cm" svg:stroke-color="#666666" draw:marker-start-width="0.22cm" draw:marker-end-width="0.22cm" svg:stroke-opacity="100%" draw:stroke-linejoin="bevel" draw:fill="solid" draw:fill-color="#eeeeee" draw:textarea-horizontal-align="left" draw:textarea-vertical-align="middle" draw:auto-grow-height="false" fo:min-height="0.09cm" fo:min-width="0cm" fo:padding-top="0.12cm" fo:padding-bottom="0.12cm" fo:padding-left="0.24cm" fo:padding-right="0.24cm" fo:wrap-option="no-wrap" draw:shadow-color="#808080" loext:decorative="false"/>
    </style:style>
    <style:style style:name="gr55" style:family="graphic" style:parent-style-name="standard">
      <style:graphic-properties draw:stroke="solid" svg:stroke-width="0.01cm" svg:stroke-color="#666666" draw:marker-start-width="0.22cm" draw:marker-end-width="0.22cm" svg:stroke-opacity="100%" draw:stroke-linejoin="bevel" draw:fill="solid" draw:fill-color="#eeeeee" draw:textarea-horizontal-align="left" draw:textarea-vertical-align="middle" draw:auto-grow-height="false" fo:min-height="0.093cm" fo:min-width="0cm" fo:padding-top="0.12cm" fo:padding-bottom="0.12cm" fo:padding-left="0.24cm" fo:padding-right="0.24cm" fo:wrap-option="no-wrap" draw:shadow-color="#808080" loext:decorative="false"/>
    </style:style>
    <style:style style:name="gr56" style:family="graphic" style:parent-style-name="standard">
      <style:graphic-properties draw:stroke="solid" svg:stroke-width="0.01cm" svg:stroke-color="#666666" draw:marker-start-width="0.22cm" draw:marker-end-width="0.22cm" svg:stroke-opacity="100%" draw:stroke-linejoin="bevel" draw:fill="solid" draw:fill-color="#eeeeee" draw:textarea-horizontal-align="left" draw:textarea-vertical-align="middle" draw:auto-grow-height="false" fo:min-height="0.096cm" fo:min-width="0.093cm" fo:padding-top="0.12cm" fo:padding-bottom="0.12cm" fo:padding-left="0.24cm" fo:padding-right="0.24cm" fo:wrap-option="no-wrap" draw:shadow-color="#808080" loext:decorative="false"/>
    </style:style>
    <style:style style:name="gr57" style:family="graphic" style:parent-style-name="standard">
      <style:graphic-properties draw:stroke="solid" svg:stroke-width="0.01cm" svg:stroke-color="#666666" draw:marker-start-width="0.22cm" draw:marker-end-width="0.22cm" svg:stroke-opacity="100%" draw:stroke-linejoin="bevel" draw:fill="solid" draw:fill-color="#eeeeee" draw:textarea-horizontal-align="left" draw:textarea-vertical-align="middle" draw:auto-grow-height="false" fo:min-height="0.314cm" fo:min-width="0.195cm" fo:padding-top="0.12cm" fo:padding-bottom="0.12cm" fo:padding-left="0.24cm" fo:padding-right="0.24cm" fo:wrap-option="no-wrap" draw:shadow-color="#808080" loext:decorative="false"/>
    </style:style>
    <style:style style:name="gr58" style:family="graphic" style:parent-style-name="standard">
      <style:graphic-properties draw:stroke="dash" draw:stroke-dash="Long_20_Dash" svg:stroke-width="0.03cm" draw:marker-start-width="0.25cm" draw:marker-end-width="0.25cm" draw:fill="none" loext:fill-use-slide-background="false" draw:textarea-horizontal-align="justify" draw:textarea-vertical-align="middle" draw:auto-grow-height="false" fo:min-height="2.47cm" fo:min-width="6.47cm" fo:padding-top="0.14cm" fo:padding-bottom="0.14cm" fo:padding-left="0.265cm" fo:padding-right="0.265cm" loext:decorative="false"/>
    </style:style>
    <style:style style:name="gr59" style:family="graphic" style:parent-style-name="standard">
      <style:graphic-properties draw:stroke="none" svg:stroke-color="#000000" draw:fill="none" draw:fill-color="#ffffff" draw:textarea-horizontal-align="left" draw:auto-grow-height="true" draw:auto-grow-width="true" fo:min-height="0.475cm" fo:min-width="5.476cm" loext:decorative="false"/>
      <style:paragraph-properties style:writing-mode="lr-tb"/>
    </style:style>
    <style:style style:name="gr60" style:family="graphic" style:parent-style-name="standard">
      <style:graphic-properties draw:marker-start="Arrow" draw:marker-start-width="0.3cm" draw:marker-end="Arrow" draw:marker-end-width="0.3cm" draw:textarea-vertical-align="middle" loext:decorative="false"/>
    </style:style>
    <style:style style:name="gr61" style:family="graphic" style:parent-style-name="standard">
      <style:graphic-properties draw:stroke="dash" draw:stroke-dash="Long_20_Dash" svg:stroke-width="0.03cm" svg:stroke-color="#158466" draw:marker-start-width="0.25cm" draw:marker-end-width="0.25cm" draw:fill="solid" draw:fill-color="#eeeeee" loext:fill-use-slide-background="false" draw:textarea-horizontal-align="justify" draw:textarea-vertical-align="middle" draw:auto-grow-height="false" fo:min-height="0.72cm" fo:min-width="1.72cm" fo:padding-top="0.14cm" fo:padding-bottom="0.14cm" fo:padding-left="0.265cm" fo:padding-right="0.265cm" loext:decorative="false"/>
    </style:style>
    <style:style style:name="gr62" style:family="graphic" style:parent-style-name="standard">
      <style:graphic-properties svg:stroke-width="0.03cm" draw:marker-start-width="0.25cm" draw:marker-end-width="0.25cm" draw:fill="solid" draw:fill-color="#b4c7dc" draw:textarea-horizontal-align="justify" draw:textarea-vertical-align="middle" draw:auto-grow-height="false" fo:min-height="0.72cm" fo:min-width="1.72cm" fo:padding-top="0.14cm" fo:padding-bottom="0.14cm" fo:padding-left="0.265cm" fo:padding-right="0.265cm" style:writing-mode="lr-tb" loext:decorative="false"/>
      <style:paragraph-properties style:writing-mode="lr-tb"/>
    </style:style>
    <style:style style:name="gr63" style:family="graphic" style:parent-style-name="standard">
      <style:graphic-properties svg:stroke-width="0.03cm" svg:stroke-color="#ff8000" draw:marker-start-width="0.25cm" draw:marker-end-width="0.25cm" draw:fill="solid" draw:fill-color="#ffffff" draw:textarea-horizontal-align="justify" draw:textarea-vertical-align="middle" draw:auto-grow-height="false" fo:min-height="0.72cm" fo:min-width="1.72cm" fo:padding-top="0.14cm" fo:padding-bottom="0.14cm" fo:padding-left="0.265cm" fo:padding-right="0.265cm" style:writing-mode="lr-tb" loext:decorative="false"/>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true" fo:min-height="0.475cm" fo:min-width="9.811cm" loext:decorative="false"/>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true" fo:min-height="0.475cm" fo:min-width="4.913cm" loext:decorative="false"/>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true" fo:min-height="0.475cm" fo:min-width="8.35cm" loext:decorative="false"/>
      <style:paragraph-properties style:writing-mode="lr-tb"/>
    </style:style>
    <style:style style:name="gr6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1" style:family="paragraph">
      <loext:graphic-properties draw:fill="solid" draw:fill-color="#eeeeee"/>
      <style:paragraph-properties fo:text-align="center"/>
    </style:style>
    <style:style style:name="P2" style:family="paragraph">
      <style:paragraph-properties fo:text-align="center"/>
      <style:text-properties fo:font-size="12pt"/>
    </style:style>
    <style:style style:name="P3" style:family="paragraph">
      <loext:graphic-properties draw:fill="solid" draw:fill-color="#b4c7dc"/>
      <style:paragraph-properties fo:text-align="center" style:writing-mode="lr-tb"/>
      <style:text-properties fo:font-size="12pt"/>
    </style:style>
    <style:style style:name="P4" style:family="paragraph">
      <style:paragraph-properties fo:text-align="center"/>
      <style:text-properties fo:font-size="16pt"/>
    </style:style>
    <style:style style:name="P5" style:family="paragraph">
      <loext:graphic-properties draw:fill="solid" draw:fill-color="#b4c7dc"/>
      <style:paragraph-properties fo:text-align="center" style:writing-mode="lr-tb"/>
      <style:text-properties fo:font-size="16pt"/>
    </style:style>
    <style:style style:name="P6" style:family="paragraph">
      <loext:graphic-properties draw:fill="solid" draw:fill-color="#ffffff"/>
      <style:paragraph-properties fo:text-align="center" style:writing-mode="lr-tb"/>
      <style:text-properties fo:font-size="12pt"/>
    </style:style>
    <style:style style:name="P7" style:family="paragraph">
      <loext:graphic-properties draw:fill="none"/>
      <style:paragraph-properties fo:text-align="center"/>
    </style:style>
    <style:style style:name="P8" style:family="paragraph">
      <loext:graphic-properties draw:fill="solid" draw:fill-color="#b4c7dc"/>
      <style:paragraph-properties fo:text-align="center"/>
    </style:style>
    <style:style style:name="P9"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 style:family="paragraph">
      <loext:graphic-properties draw:fill="solid" draw:fill-color="#ffffff"/>
      <style:paragraph-properties fo:text-align="center" style:writing-mode="lr-tb"/>
      <style:text-properties fo:font-size="16pt"/>
    </style:style>
    <style:style style:name="P11" style:family="paragraph">
      <style:paragraph-properties fo:text-align="start"/>
      <style:text-properties fo:font-size="12pt"/>
    </style:style>
    <style:style style:name="P12" style:family="paragraph">
      <loext:graphic-properties draw:fill="solid" draw:fill-color="#b4c7dc"/>
      <style:paragraph-properties fo:text-align="start" style:writing-mode="lr-tb"/>
      <style:text-properties fo:font-size="12pt"/>
    </style:style>
    <style:style style:name="P13" style:family="paragraph">
      <loext:graphic-properties draw:fill="solid" draw:fill-color="#eeeeee"/>
      <style:paragraph-properties style:font-independent-line-spacing="true"/>
    </style:style>
    <style:style style:name="P14" style:family="paragraph">
      <loext:graphic-properties draw:fill="none" draw:fill-color="#ffffff"/>
      <style:text-properties fo:font-size="12pt"/>
    </style:style>
    <style:style style:name="P15" style:family="paragraph">
      <style:paragraph-properties fo:text-align="center"/>
    </style:style>
    <style:style style:name="T1" style:family="text">
      <style:text-properties fo:font-size="12pt"/>
    </style:style>
    <style:style style:name="T2" style:family="text">
      <style:text-properties fo:font-size="16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style-name="gr1" draw:text-style-name="P1" draw:layer="layout" svg:width="17.25cm" svg:height="10.25cm" svg:x="1.25cm" svg:y="2.75cm">
          <text:p/>
          <draw:enhanced-geometry svg:viewBox="0 0 21600 21600" draw:type="rectangle" draw:enhanced-path="M 0 0 L 21600 0 21600 21600 0 21600 0 0 Z N"/>
        </draw:custom-shape>
        <draw:custom-shape draw:style-name="gr2" draw:text-style-name="P3" draw:layer="layout" svg:width="5cm" svg:height="2.692cm" svg:x="9cm" svg:y="4.808cm">
          <text:p text:style-name="P2"><text:span text:style-name="T1">Микросервис</text:span></text:p>
          <draw:enhanced-geometry svg:viewBox="0 0 21600 21600" draw:type="rectangle" draw:enhanced-path="M 0 0 L 21600 0 21600 21600 0 21600 0 0 Z N"/>
        </draw:custom-shape>
        <draw:custom-shape draw:style-name="gr3" draw:text-style-name="P3" draw:layer="layout" svg:width="5cm" svg:height="2.693cm" svg:x="8.75cm" svg:y="4.538cm">
          <text:p text:style-name="P2"><text:span text:style-name="T1">Микросервис</text:span></text:p>
          <draw:enhanced-geometry svg:viewBox="0 0 21600 21600" draw:type="rectangle" draw:enhanced-path="M 0 0 L 21600 0 21600 21600 0 21600 0 0 Z N"/>
        </draw:custom-shape>
        <draw:custom-shape draw:style-name="gr3" draw:text-style-name="P3" draw:layer="layout" svg:width="5cm" svg:height="2.693cm" svg:x="8.5cm" svg:y="4.269cm">
          <text:p text:style-name="P2"><text:span text:style-name="T1">Микросервис</text:span></text:p>
          <draw:enhanced-geometry svg:viewBox="0 0 21600 21600" draw:type="rectangle" draw:enhanced-path="M 0 0 L 21600 0 21600 21600 0 21600 0 0 Z N"/>
        </draw:custom-shape>
        <draw:custom-shape draw:style-name="gr2" draw:text-style-name="P5" draw:layer="layout" svg:width="5cm" svg:height="2.692cm" svg:x="8.25cm" svg:y="4cm">
          <text:p text:style-name="P4"><text:span text:style-name="T2"/></text:p>
          <text:p text:style-name="P4"><text:span text:style-name="T2">Микросервис</text:span></text:p>
          <draw:enhanced-geometry svg:viewBox="0 0 21600 21600" draw:type="rectangle" draw:enhanced-path="M 0 0 L 21600 0 21600 21600 0 21600 0 0 Z N"/>
        </draw:custom-shape>
        <draw:g draw:style-name="gr4">
          <draw:custom-shape draw:style-name="gr5" draw:text-style-name="P6" draw:layer="layout" svg:width="3cm" svg:height="1.5cm" svg:x="2cm" svg:y="8.5cm">
            <text:p/>
            <draw:enhanced-geometry svg:viewBox="0 0 21600 21600" draw:type="rectangle" draw:enhanced-path="M 0 0 L 21600 0 21600 21600 0 21600 0 0 Z N"/>
          </draw:custom-shape>
          <draw:frame draw:style-name="gr6" draw:text-style-name="P7" draw:layer="layout" svg:width="2.32cm" svg:height="0.563cm" svg:x="2.375cm" svg:y="8.875cm">
            <draw:image xlink:href="Pictures/1000000100000B5B000002C10C448E7F.png" xlink:type="simple" xlink:show="embed" xlink:actuate="onLoad" draw:mime-type="image/png">
              <text:p/>
            </draw:image>
          </draw:frame>
        </draw:g>
        <draw:g draw:style-name="gr4">
          <draw:custom-shape draw:style-name="gr5" draw:text-style-name="P6" draw:layer="layout" svg:width="3cm" svg:height="1.5cm" svg:x="2cm" svg:y="3.25cm">
            <text:p/>
            <draw:enhanced-geometry svg:viewBox="0 0 21600 21600" draw:type="rectangle" draw:enhanced-path="M 0 0 L 21600 0 21600 21600 0 21600 0 0 Z N"/>
          </draw:custom-shape>
          <draw:frame draw:style-name="gr6" draw:text-style-name="P7" draw:layer="layout" svg:width="2.383cm" svg:height="0.937cm" svg:x="2.325cm" svg:y="3.438cm">
            <draw:image xlink:href="Pictures/100000010000013100000078C0986EE3.gif" xlink:type="simple" xlink:show="embed" xlink:actuate="onLoad" draw:mime-type="image/gif">
              <text:p/>
            </draw:image>
          </draw:frame>
        </draw:g>
        <draw:g draw:style-name="gr4">
          <draw:custom-shape draw:style-name="gr5" draw:text-style-name="P6" draw:layer="layout" svg:width="3cm" svg:height="1.5cm" svg:x="4.5cm" svg:y="11cm">
            <text:p/>
            <draw:enhanced-geometry svg:viewBox="0 0 21600 21600" draw:type="rectangle" draw:enhanced-path="M 0 0 L 21600 0 21600 21600 0 21600 0 0 Z N"/>
          </draw:custom-shape>
          <draw:frame draw:style-name="gr6" draw:text-style-name="P7" draw:layer="layout" svg:width="2.283cm" svg:height="0.656cm" svg:x="4.805cm" svg:y="11.319cm">
            <draw:image xlink:href="Pictures/1000C6E50000408A0000128F114571F0.svg" xlink:type="simple" xlink:show="embed" xlink:actuate="onLoad" draw:mime-type="image/svg+xml">
              <text:p/>
            </draw:image>
            <draw:image xlink:href="Pictures/1000000100000270000000B4211248FB.png" xlink:type="simple" xlink:show="embed" xlink:actuate="onLoad" draw:mime-type="image/png"/>
          </draw:frame>
        </draw:g>
        <draw:g draw:style-name="gr4">
          <draw:custom-shape draw:style-name="gr7" draw:text-style-name="P6" draw:layer="layout" svg:width="2.976cm" svg:height="1.49cm" svg:x="2cm" svg:y="5cm">
            <text:p/>
            <draw:enhanced-geometry svg:viewBox="0 0 21600 21600" draw:type="rectangle" draw:enhanced-path="M 0 0 L 21600 0 21600 21600 0 21600 0 0 Z N"/>
          </draw:custom-shape>
          <draw:frame draw:style-name="gr6" draw:text-style-name="P7" draw:layer="layout" svg:width="3cm" svg:height="1.41cm" svg:x="2cm" svg:y="5.043cm">
            <draw:image xlink:href="Pictures/1000000100000C73000005D8C1DECDAA.png" xlink:type="simple" xlink:show="embed" xlink:actuate="onLoad" draw:mime-type="image/png">
              <text:p/>
            </draw:image>
          </draw:frame>
        </draw:g>
        <draw:frame draw:style-name="gr8" draw:text-style-name="P8" draw:layer="layout" svg:width="2.87cm" svg:height="0.915cm" svg:x="8.505cm" svg:y="4.337cm">
          <draw:image xlink:href="Pictures/10000001000003CC00000120D2BE988E.png" xlink:type="simple" xlink:show="embed" xlink:actuate="onLoad" draw:mime-type="image/png">
            <text:p/>
          </draw:image>
        </draw:frame>
        <draw:g draw:style-name="gr4">
          <draw:custom-shape draw:style-name="gr5" draw:text-style-name="P6" draw:layer="layout" svg:width="3cm" svg:height="1.5cm" svg:x="8cm" svg:y="11cm">
            <text:p/>
            <draw:enhanced-geometry svg:viewBox="0 0 21600 21600" draw:type="rectangle" draw:enhanced-path="M 0 0 L 21600 0 21600 21600 0 21600 0 0 Z N"/>
          </draw:custom-shape>
          <draw:frame draw:style-name="gr6" draw:text-style-name="P7" draw:layer="layout" svg:width="2.518cm" svg:height="0.937cm" svg:x="8.195cm" svg:y="11.188cm">
            <draw:image xlink:href="Pictures/10000000000002D50000010E9783307B.png" xlink:type="simple" xlink:show="embed" xlink:actuate="onLoad" draw:mime-type="image/png">
              <text:p/>
            </draw:image>
          </draw:frame>
        </draw:g>
        <draw:g draw:style-name="gr4">
          <draw:custom-shape draw:style-name="gr5" draw:text-style-name="P6" draw:layer="layout" svg:width="3cm" svg:height="1.5cm" svg:x="2cm" svg:y="6.75cm">
            <text:p/>
            <draw:enhanced-geometry svg:viewBox="0 0 21600 21600" draw:type="rectangle" draw:enhanced-path="M 0 0 L 21600 0 21600 21600 0 21600 0 0 Z N"/>
          </draw:custom-shape>
          <draw:frame draw:style-name="gr6" draw:text-style-name="P7" draw:layer="layout" svg:width="2.649cm" svg:height="0.885cm" svg:x="2.164cm" svg:y="6.99cm">
            <draw:image xlink:href="Pictures/1000000100000B40000003C2E5B9A7B4.png" xlink:type="simple" xlink:show="embed" xlink:actuate="onLoad" draw:mime-type="image/png">
              <text:p/>
            </draw:image>
          </draw:frame>
        </draw:g>
        <draw:g draw:name="type-user" draw:style-name="gr9">
          <draw:path draw:style-name="gr10" draw:text-style-name="P9" draw:layer="layout" svg:width="2.08cm" svg:height="1.211cm" svg:x="2.5cm" svg:y="15.038cm" svg:viewBox="0 0 2081 1212" svg:d="M5 1212h2076v-729c0 0-198-368-610-483h-793c-388 121-678 535-678 535z">
            <text:p/>
          </draw:path>
          <draw:line draw:style-name="gr11" draw:text-style-name="P9" draw:layer="layout" svg:x1="2.96cm" svg:y1="15.851cm" svg:x2="2.96cm" svg:y2="16.208cm">
            <text:p/>
          </draw:line>
          <draw:line draw:style-name="gr12" draw:text-style-name="P9" draw:layer="layout" svg:x1="4.155cm" svg:y1="15.857cm" svg:x2="4.155cm" svg:y2="16.229cm">
            <text:p/>
          </draw:line>
          <draw:path draw:style-name="gr13" draw:text-style-name="P9" draw:layer="layout" svg:width="0.933cm" svg:height="1.011cm" svg:x="3.11cm" svg:y="14.047cm" svg:viewBox="0 0 934 1012" svg:d="M934 504c0-278-208-504-465-504-261 0-469 226-469 504 0 283 208 508 469 508 257 0 465-225 465-508z">
            <text:p/>
          </draw:path>
          <draw:path draw:style-name="gr14" draw:text-style-name="P9" draw:layer="layout" svg:width="0.882cm" svg:height="1.021cm" svg:x="3.134cm" svg:y="14.43cm" svg:viewBox="0 0 883 1022" svg:d="M13 231c0 0 237-226 460-168 222 58 401-63 401-63 25 152 5 346-125 519 0 0 92 74 92 142s14 173-83 278c-96 105-479 115-585 0-107-115-107-168-107-247 0-78 49-115 107-178-92-58-213-226-160-283z">
            <text:p/>
          </draw:path>
        </draw:g>
        <draw:custom-shape draw:style-name="gr15" draw:text-style-name="P10" draw:layer="layout" svg:width="5cm" svg:height="2.75cm" svg:x="5.75cm" svg:y="14cm">
          <text:p text:style-name="P4"><text:span text:style-name="T2">Внешние инф. системы</text:span></text:p>
          <draw:enhanced-geometry svg:viewBox="0 0 21600 21600" draw:type="rectangle" draw:enhanced-path="M 0 0 L 21600 0 21600 21600 0 21600 0 0 Z N"/>
        </draw:custom-shape>
        <draw:custom-shape draw:style-name="gr16" draw:text-style-name="P5" draw:layer="layout" svg:width="3.75cm" svg:height="1.5cm" svg:x="13.9cm" svg:y="10.9cm">
          <text:p text:style-name="P4"><text:span text:style-name="T2">Коннектор</text:span></text:p>
          <draw:enhanced-geometry svg:viewBox="0 0 21600 21600" draw:type="rectangle" draw:enhanced-path="M 0 0 L 21600 0 21600 21600 0 21600 0 0 Z N"/>
        </draw:custom-shape>
        <draw:custom-shape draw:style-name="gr16" draw:text-style-name="P5" draw:layer="layout" svg:width="3.75cm" svg:height="1.5cm" svg:x="13.7cm" svg:y="10.7cm">
          <text:p text:style-name="P4"><text:span text:style-name="T2">Коннектор</text:span></text:p>
          <draw:enhanced-geometry svg:viewBox="0 0 21600 21600" draw:type="rectangle" draw:enhanced-path="M 0 0 L 21600 0 21600 21600 0 21600 0 0 Z N"/>
        </draw:custom-shape>
        <draw:custom-shape draw:style-name="gr16" draw:text-style-name="P12" draw:layer="layout" svg:width="3.75cm" svg:height="1.5cm" svg:x="13.5cm" svg:y="10.5cm">
          <text:p text:style-name="P11"><text:span text:style-name="T1">Коннектор</text:span></text:p>
          <draw:enhanced-geometry svg:viewBox="0 0 21600 21600" draw:type="rectangle" draw:enhanced-path="M 0 0 L 21600 0 21600 21600 0 21600 0 0 Z N"/>
        </draw:custom-shape>
        <draw:g draw:style-name="gr4">
          <draw:custom-shape draw:style-name="gr17" draw:text-style-name="P13" draw:layer="layout" svg:width="1.039cm" svg:height="0.359cm" svg:x="15.15cm" svg:y="14.34cm">
            <text:p/>
            <draw:enhanced-geometry svg:viewBox="0 0 1719 599" draw:type="non-primitive" draw:enhanced-path="M 1718 3 L 1718 598 0 598 0 3 C 58 0 116 3 173 14 237 158 303 303 367 447 695 461 1023 461 1351 447 1421 304 1487 159 1551 14 1606 4 1662 0 1718 3 N"/>
          </draw:custom-shape>
          <draw:custom-shape draw:style-name="gr18" draw:text-style-name="P13" draw:layer="layout" svg:width="0.736cm" svg:height="0.236cm" svg:x="15.3cm" svg:y="14.34cm">
            <text:p/>
            <draw:enhanced-geometry svg:viewBox="0 0 1223 397" draw:type="non-primitive" draw:enhanced-path="M 0 3 C 407 0 814 3 1222 14 1164 140 1107 264 1048 387 756 396 465 394 173 382 112 257 55 130 0 3 N"/>
          </draw:custom-shape>
          <draw:custom-shape draw:style-name="gr19" draw:text-style-name="P13" draw:layer="layout" svg:width="0.5cm" svg:height="0.739cm" svg:x="16.245cm" svg:y="14.342cm">
            <text:p/>
            <draw:enhanced-geometry svg:viewBox="0 0 835 1226" draw:type="non-primitive" draw:enhanced-path="M 0 0 L 832 0 C 834 404 832 808 827 1211 552 1222 277 1225 0 1222 L 0 0 N"/>
          </draw:custom-shape>
          <draw:custom-shape draw:style-name="gr20" draw:text-style-name="P13" draw:layer="layout" svg:width="0.198cm" svg:height="0.124cm" svg:x="15.386cm" svg:y="14.393cm">
            <text:p/>
            <draw:enhanced-geometry svg:viewBox="0 0 336 213" draw:type="non-primitive" draw:enhanced-path="M 0 13 C 110 0 222 0 335 13 306 75 278 136 249 197 195 212 141 212 87 197 60 134 32 73 0 13 N"/>
          </draw:custom-shape>
          <draw:custom-shape draw:style-name="gr20" draw:text-style-name="P13" draw:layer="layout" svg:width="0.086cm" svg:height="0.124cm" svg:x="15.661cm" svg:y="14.393cm">
            <text:p/>
            <draw:enhanced-geometry svg:viewBox="0 0 152 212" draw:type="non-primitive" draw:enhanced-path="M 97 3 C 117 0 135 4 151 14 116 72 85 133 59 198 40 211 20 211 0 198 28 130 61 65 97 3 N"/>
          </draw:custom-shape>
          <draw:custom-shape draw:style-name="gr20" draw:text-style-name="P13" draw:layer="layout" svg:width="0.185cm" svg:height="0.126cm" svg:x="15.766cm" svg:y="14.393cm">
            <text:p/>
            <draw:enhanced-geometry svg:viewBox="0 0 314 214" draw:type="non-primitive" draw:enhanced-path="M 86 3 C 162 0 238 3 313 14 287 77 258 138 227 198 151 213 75 213 0 198 31 133 60 69 86 3 N"/>
          </draw:custom-shape>
          <draw:custom-shape draw:style-name="gr21" draw:text-style-name="P13" draw:layer="layout" svg:width="0.294cm" svg:height="0.345cm" svg:x="16.35cm" svg:y="14.447cm">
            <text:p/>
            <draw:enhanced-geometry svg:viewBox="0 0 494 579" draw:type="non-primitive" draw:enhanced-path="M 25 2 C 169 0 313 2 457 7 466 10 473 16 479 23 491 196 493 369 484 542 480 552 475 561 468 569 316 578 165 576 14 564 1 384 0 204 9 23 16 17 22 10 25 2 N"/>
          </draw:custom-shape>
          <draw:custom-shape draw:style-name="gr20" draw:text-style-name="P13" draw:layer="layout" svg:width="0.196cm" svg:height="0.167cm" svg:x="16.395cm" svg:y="14.492cm">
            <text:p/>
            <draw:enhanced-geometry svg:viewBox="0 0 331 282" draw:type="non-primitive" draw:enhanced-path="M 3 0 L 328 0 C 330 90 328 180 322 271 289 278 255 281 219 281 150 276 81 272 14 271 3 181 0 90 3 0 N"/>
          </draw:custom-shape>
          <draw:custom-shape draw:style-name="gr22" draw:text-style-name="P13" draw:layer="layout" svg:width="1.047cm" svg:height="0.365cm" svg:x="15.15cm" svg:y="14.342cm">
            <text:p/>
            <draw:enhanced-geometry svg:viewBox="0 0 1734 610" draw:type="non-primitive" draw:enhanced-path="M 1718 0 C 1730 200 1733 402 1730 605 1151 609 574 605 0 595 L 1718 595 1718 0 N"/>
          </draw:custom-shape>
          <draw:custom-shape draw:style-name="gr20" draw:text-style-name="P13" draw:layer="layout" svg:width="0.048cm" svg:height="0.059cm" svg:x="16.395cm" svg:y="14.699cm">
            <text:p/>
            <draw:enhanced-geometry svg:viewBox="0 0 90 104" draw:type="non-primitive" draw:enhanced-path="M 24 6 C 62 0 84 16 89 55 69 97 42 103 8 71 0 46 5 25 24 6 N"/>
          </draw:custom-shape>
          <draw:custom-shape draw:style-name="gr20" draw:text-style-name="P13" draw:layer="layout" svg:width="0.067cm" svg:height="0.045cm" svg:x="16.459cm" svg:y="14.704cm">
            <text:p/>
            <draw:enhanced-geometry svg:viewBox="0 0 117 84" draw:type="non-primitive" draw:enhanced-path="M 37 0 C 102 2 116 29 81 81 14 83 0 56 37 0 N"/>
          </draw:custom-shape>
          <draw:custom-shape draw:style-name="gr20" draw:text-style-name="P13" draw:layer="layout" svg:width="0.051cm" svg:height="0.048cm" svg:x="16.548cm" svg:y="14.704cm">
            <text:p/>
            <draw:enhanced-geometry svg:viewBox="0 0 93 89" draw:type="non-primitive" draw:enhanced-path="M 13 0 C 78 1 92 28 56 81 41 88 27 86 13 75 0 50 0 25 13 0 N"/>
          </draw:custom-shape>
          <draw:custom-shape draw:style-name="gr23" draw:text-style-name="P13" draw:layer="layout" svg:width="1.039cm" svg:height="0.316cm" svg:x="15.15cm" svg:y="14.755cm">
            <text:p/>
            <draw:enhanced-geometry svg:viewBox="0 0 1719 530" draw:type="non-primitive" draw:enhanced-path="M 1718 0 L 1718 529 0 529 0 0 1718 0 N"/>
          </draw:custom-shape>
          <draw:custom-shape draw:style-name="gr24" draw:text-style-name="P13" draw:layer="layout" svg:width="1.047cm" svg:height="0.326cm" svg:x="15.15cm" svg:y="14.755cm">
            <text:p/>
            <draw:enhanced-geometry svg:viewBox="0 0 1734 545" draw:type="non-primitive" draw:enhanced-path="M 1718 0 C 1730 178 1733 358 1730 540 1151 544 574 540 0 529 L 1718 529 1718 0 N"/>
          </draw:custom-shape>
          <draw:custom-shape draw:style-name="gr25" draw:text-style-name="P13" draw:layer="layout" svg:width="1.432cm" svg:height="0.235cm" svg:x="15.228cm" svg:y="15.127cm">
            <text:p/>
            <draw:enhanced-geometry svg:viewBox="0 0 2369 398" draw:type="non-primitive" draw:enhanced-path="M 0 15 C 787 0 1577 0 2368 15 2324 141 2277 265 2227 388 1532 397 836 395 141 382 98 257 51 135 0 15 N"/>
          </draw:custom-shape>
          <draw:custom-shape draw:style-name="gr20" draw:text-style-name="P13" draw:layer="layout" svg:width="0.027cm" svg:height="0.099cm" svg:x="15.404cm" svg:y="15.197cm">
            <text:p/>
            <draw:enhanced-geometry svg:viewBox="0 0 55 174" draw:type="non-primitive" draw:enhanced-path="M 0 0 L 54 0 54 173 0 173 0 0 N"/>
          </draw:custom-shape>
          <draw:custom-shape draw:style-name="gr20" draw:text-style-name="P13" draw:layer="layout" svg:width="0.038cm" svg:height="0.099cm" svg:x="15.495cm" svg:y="15.197cm">
            <text:p/>
            <draw:enhanced-geometry svg:viewBox="0 0 69 174" draw:type="non-primitive" draw:enhanced-path="M 14 0 L 68 0 68 173 3 173 C 0 114 4 57 14 0 N"/>
          </draw:custom-shape>
          <draw:custom-shape draw:style-name="gr20" draw:text-style-name="P13" draw:layer="layout" svg:width="0.027cm" svg:height="0.099cm" svg:x="15.594cm" svg:y="15.197cm">
            <text:p/>
            <draw:enhanced-geometry svg:viewBox="0 0 55 174" draw:type="non-primitive" draw:enhanced-path="M 0 0 L 54 0 54 173 0 173 0 0 N"/>
          </draw:custom-shape>
          <draw:custom-shape draw:style-name="gr20" draw:text-style-name="P13" draw:layer="layout" svg:width="0.035cm" svg:height="0.101cm" svg:x="15.688cm" svg:y="15.197cm">
            <text:p/>
            <draw:enhanced-geometry svg:viewBox="0 0 68 176" draw:type="non-primitive" draw:enhanced-path="M 0 0 L 65 0 C 67 54 65 108 59 162 41 172 21 175 0 173 L 0 0 N"/>
          </draw:custom-shape>
          <draw:custom-shape draw:style-name="gr20" draw:text-style-name="P13" draw:layer="layout" svg:width="0.03cm" svg:height="0.101cm" svg:x="15.883cm" svg:y="15.197cm">
            <text:p/>
            <draw:enhanced-geometry svg:viewBox="0 0 57 176" draw:type="non-primitive" draw:enhanced-path="M 0 0 L 55 0 C 56 54 55 108 49 162 34 172 18 175 0 173 L 0 0 N"/>
          </draw:custom-shape>
          <draw:custom-shape draw:style-name="gr20" draw:text-style-name="P13" draw:layer="layout" svg:width="0.027cm" svg:height="0.099cm" svg:x="16.076cm" svg:y="15.197cm">
            <text:p/>
            <draw:enhanced-geometry svg:viewBox="0 0 55 174" draw:type="non-primitive" draw:enhanced-path="M 0 0 L 54 0 54 173 0 173 0 0 N"/>
          </draw:custom-shape>
          <draw:custom-shape draw:style-name="gr20" draw:text-style-name="P13" draw:layer="layout" svg:width="0.035cm" svg:height="0.101cm" svg:x="16.167cm" svg:y="15.197cm">
            <text:p/>
            <draw:enhanced-geometry svg:viewBox="0 0 67 176" draw:type="non-primitive" draw:enhanced-path="M 0 0 L 65 0 C 66 54 65 108 59 162 41 172 21 175 0 173 L 0 0 N"/>
          </draw:custom-shape>
          <draw:custom-shape draw:style-name="gr20" draw:text-style-name="P13" draw:layer="layout" svg:width="0.027cm" svg:height="0.099cm" svg:x="16.266cm" svg:y="15.197cm">
            <text:p/>
            <draw:enhanced-geometry svg:viewBox="0 0 55 174" draw:type="non-primitive" draw:enhanced-path="M 0 0 L 54 0 54 173 0 173 0 0 N"/>
          </draw:custom-shape>
          <draw:custom-shape draw:style-name="gr20" draw:text-style-name="P13" draw:layer="layout" svg:width="0.034cm" svg:height="0.099cm" svg:x="16.358cm" svg:y="15.197cm">
            <text:p/>
            <draw:enhanced-geometry svg:viewBox="0 0 66 174" draw:type="non-primitive" draw:enhanced-path="M 0 0 L 65 0 65 173 0 173 0 0 N"/>
          </draw:custom-shape>
          <draw:custom-shape draw:style-name="gr20" draw:text-style-name="P13" draw:layer="layout" svg:width="0.035cm" svg:height="0.099cm" svg:x="16.456cm" svg:y="15.197cm">
            <text:p/>
            <draw:enhanced-geometry svg:viewBox="0 0 66 174" draw:type="non-primitive" draw:enhanced-path="M 0 0 L 65 0 65 173 0 173 0 0 N"/>
          </draw:custom-shape>
          <draw:custom-shape draw:style-name="gr20" draw:text-style-name="P13" draw:layer="layout" svg:width="0.03cm" svg:height="0.101cm" svg:x="15.784cm" svg:y="15.197cm">
            <text:p/>
            <draw:enhanced-geometry svg:viewBox="0 0 57 176" draw:type="non-primitive" draw:enhanced-path="M 2 0 L 56 0 56 173 C 38 175 22 172 7 162 2 108 0 54 2 0 N"/>
          </draw:custom-shape>
          <draw:custom-shape draw:style-name="gr20" draw:text-style-name="P13" draw:layer="layout" svg:width="0.035cm" svg:height="0.099cm" svg:x="15.977cm" svg:y="15.197cm">
            <text:p/>
            <draw:enhanced-geometry svg:viewBox="0 0 66 174" draw:type="non-primitive" draw:enhanced-path="M 0 0 L 65 0 65 173 0 173 0 0 N"/>
          </draw:custom-shape>
          <draw:custom-shape draw:style-name="gr20" draw:text-style-name="P13" draw:layer="layout" svg:width="0.225cm" svg:height="0.179cm" svg:x="15.367cm" svg:y="15.411cm">
            <text:p/>
            <draw:enhanced-geometry svg:viewBox="0 0 379 304" draw:type="non-primitive" draw:enhanced-path="M 141 0 L 249 0 249 183 C 295 191 338 206 378 227 L 378 303 0 303 0 227 C 34 231 59 218 75 189 97 186 119 182 141 178 140 121 140 62 141 0 N"/>
          </draw:custom-shape>
          <draw:custom-shape draw:style-name="gr20" draw:text-style-name="P13" draw:layer="layout" svg:width="0.224cm" svg:height="0.171cm" svg:x="16.299cm" svg:y="15.419cm">
            <text:p/>
            <draw:enhanced-geometry svg:viewBox="0 0 379 293" draw:type="non-primitive" draw:enhanced-path="M 141 0 L 237 0 C 234 60 238 118 249 173 282 166 307 178 324 205 341 216 359 219 378 216 L 378 292 0 292 0 216 C 34 222 59 212 75 184 L 141 184 141 0 N"/>
          </draw:custom-shape>
          <draw:custom-shape draw:style-name="gr20" draw:text-style-name="P13" draw:layer="layout" svg:width="0.062cm" svg:height="0.109cm" svg:x="16.384cm" svg:y="15.411cm">
            <text:p/>
            <draw:enhanced-geometry svg:viewBox="0 0 109 188" draw:type="non-primitive" draw:enhanced-path="M 0 14 C 34 3 70 0 108 3 L 108 187 C 97 132 94 74 97 14 L 0 14 N"/>
          </draw:custom-shape>
          <draw:custom-shape draw:style-name="gr20" draw:text-style-name="P13" draw:layer="layout" svg:width="0.035cm" svg:height="0.107cm" svg:x="16.344cm" svg:y="15.419cm">
            <text:p/>
            <draw:enhanced-geometry svg:viewBox="0 0 66 185" draw:type="non-primitive" draw:enhanced-path="M 65 0 L 65 184 0 184 C 16 173 34 170 54 173 51 113 55 56 65 0 N"/>
          </draw:custom-shape>
        </draw:g>
        <draw:g draw:style-name="gr4">
          <draw:custom-shape draw:style-name="gr26" draw:text-style-name="P13" draw:layer="layout" svg:width="0.419cm" svg:height="0.356cm" svg:x="12.866cm" svg:y="14.25cm">
            <text:p/>
            <draw:enhanced-geometry svg:viewBox="0 0 660 563" draw:type="non-primitive" draw:enhanced-path="M 659 0 L 659 551 C 441 548 225 551 11 562 5 562 2 558 0 551 78 367 154 183 227 0 L 659 0 N"/>
          </draw:custom-shape>
          <draw:custom-shape draw:style-name="gr27" draw:text-style-name="P13" draw:layer="layout" svg:width="0.228cm" svg:height="0.245cm" svg:x="13.339cm" svg:y="14.304cm">
            <text:p/>
            <draw:enhanced-geometry svg:viewBox="0 0 368 391" draw:type="non-primitive" draw:enhanced-path="M 0 2 C 87 0 173 2 259 7 281 21 294 41 297 66 344 82 364 114 357 164 L 292 164 292 228 357 228 C 367 274 349 301 303 310 296 336 282 358 259 374 188 377 118 382 49 390 34 381 18 378 0 380 L 0 2 N"/>
          </draw:custom-shape>
          <draw:custom-shape draw:style-name="gr28" draw:text-style-name="P13" draw:layer="layout" svg:width="0.19cm" svg:height="0.274cm" svg:x="14.305cm" svg:y="14.332cm">
            <text:p/>
            <draw:enhanced-geometry svg:viewBox="0 0 304 436" draw:type="non-primitive" draw:enhanced-path="M 97 3 C 129 0 160 4 189 14 233 149 271 286 303 425 235 421 168 425 103 435 99 363 95 291 92 219 62 230 31 230 0 219 L 0 79 C 29 81 58 79 87 73 94 49 97 26 97 3 N"/>
          </draw:custom-shape>
          <draw:custom-shape draw:style-name="gr20" draw:text-style-name="P13" draw:layer="layout" svg:width="0.142cm" svg:height="0.119cm" svg:x="13.064cm" svg:y="14.36cm">
            <text:p/>
            <draw:enhanced-geometry svg:viewBox="0 0 229 195" draw:type="non-primitive" draw:enhanced-path="M 157 0 C 228 17 228 42 157 75 159 129 137 168 93 194 24 188 0 152 22 86 53 70 88 59 125 54 139 37 149 19 157 0 N"/>
          </draw:custom-shape>
          <draw:custom-shape draw:style-name="gr29" draw:text-style-name="P13" draw:layer="layout" svg:width="0.294cm" svg:height="0.452cm" svg:x="13.61cm" svg:y="14.422cm">
            <text:p/>
            <draw:enhanced-geometry svg:viewBox="0 0 466 714" draw:type="non-primitive" draw:enhanced-path="M 162 0 L 291 0 291 109 C 313 106 333 109 351 119 371 162 387 205 400 249 L 465 249 465 713 0 713 0 249 65 249 C 75 204 91 160 113 119 128 110 144 106 162 109 L 162 0 N"/>
          </draw:custom-shape>
          <draw:custom-shape draw:style-name="gr26" draw:text-style-name="P13" draw:layer="layout" svg:width="0.418cm" svg:height="0.356cm" svg:x="12.875cm" svg:y="14.25cm">
            <text:p/>
            <draw:enhanced-geometry svg:viewBox="0 0 664 563" draw:type="non-primitive" draw:enhanced-path="M 649 0 C 659 186 663 373 659 562 L 0 562 C 214 551 431 548 649 551 L 649 0 N"/>
          </draw:custom-shape>
          <draw:custom-shape draw:style-name="gr30" draw:text-style-name="P13" draw:layer="layout" svg:width="0.238cm" svg:height="0.223cm" svg:x="14.314cm" svg:y="14.651cm">
            <text:p/>
            <draw:enhanced-geometry svg:viewBox="0 0 381 358" draw:type="non-primitive" draw:enhanced-path="M 325 0 C 342 10 358 10 373 0 379 119 380 238 379 357 L 0 357 0 11 C 110 14 218 11 325 0 N"/>
          </draw:custom-shape>
          <draw:custom-shape draw:style-name="gr31" draw:text-style-name="P13" draw:layer="layout" svg:width="0.543cm" svg:height="0.223cm" svg:x="12.866cm" svg:y="14.651cm">
            <text:p/>
            <draw:enhanced-geometry svg:viewBox="0 0 855 358" draw:type="non-primitive" draw:enhanced-path="M 0 0 C 282 7 567 11 854 11 L 854 357 0 357 0 0 N"/>
          </draw:custom-shape>
          <draw:custom-shape draw:style-name="gr20" draw:text-style-name="P13" draw:layer="layout" svg:width="0.096cm" svg:height="0.093cm" svg:x="13.457cm" svg:y="14.657cm">
            <text:p/>
            <draw:enhanced-geometry svg:viewBox="0 0 159 155" draw:type="non-primitive" draw:enhanced-path="M 14 143 C 4 99 0 52 3 3 52 0 102 0 154 3 158 54 154 104 144 154 100 150 57 146 14 143 N"/>
          </draw:custom-shape>
          <draw:custom-shape draw:style-name="gr20" draw:text-style-name="P13" draw:layer="layout" svg:width="0.317cm" svg:height="0.091cm" svg:x="13.952cm" svg:y="14.657cm">
            <text:p/>
            <draw:enhanced-geometry svg:viewBox="0 0 502 152" draw:type="non-primitive" draw:enhanced-path="M 2 0 L 499 0 C 501 43 499 87 494 129 486 141 475 148 461 151 L 29 151 C 20 150 13 146 7 140 2 94 0 47 2 0 N"/>
          </draw:custom-shape>
          <draw:custom-shape draw:style-name="gr20" draw:text-style-name="P13" draw:layer="layout" svg:width="0.01cm" svg:height="0.091cm" svg:x="13.455cm" svg:y="14.657cm">
            <text:p/>
            <draw:enhanced-geometry svg:viewBox="0 0 25 152" draw:type="non-primitive" draw:enhanced-path="M 13 0 C 10 49 14 96 24 140 24 146 20 150 13 151 0 99 0 49 13 0 N"/>
          </draw:custom-shape>
          <draw:custom-shape draw:style-name="gr20" draw:text-style-name="P13" draw:layer="layout" svg:width="0.13cm" svg:height="0.127cm" svg:x="13.703cm" svg:y="14.649cm">
            <text:p/>
            <draw:enhanced-geometry svg:viewBox="0 0 210 207" draw:type="non-primitive" draw:enhanced-path="M 165 4 C 191 0 206 10 209 37 191 62 169 86 143 107 159 177 130 206 57 193 0 113 21 70 122 64 138 45 152 25 165 4 N"/>
          </draw:custom-shape>
          <draw:custom-shape draw:style-name="gr20" draw:text-style-name="P13" draw:layer="layout" svg:width="0.105cm" svg:height="0.102cm" svg:x="13.078cm" svg:y="14.719cm">
            <text:p/>
            <draw:enhanced-geometry svg:viewBox="0 0 171 166" draw:type="non-primitive" draw:enhanced-path="M 137 0 C 150 6 160 16 170 27 141 42 133 64 148 91 133 147 96 165 40 145 0 107 0 69 40 32 76 27 108 16 137 0 N"/>
          </draw:custom-shape>
          <draw:custom-shape draw:style-name="gr20" draw:text-style-name="P13" draw:layer="layout" svg:width="0.108cm" svg:height="0.102cm" svg:x="13.225cm" svg:y="14.719cm">
            <text:p/>
            <draw:enhanced-geometry svg:viewBox="0 0 175 166" draw:type="non-primitive" draw:enhanced-path="M 123 0 C 168 10 174 28 140 54 149 135 115 165 37 145 4 114 0 80 26 43 61 30 94 16 123 0 N"/>
          </draw:custom-shape>
          <draw:custom-shape draw:style-name="gr20" draw:text-style-name="P13" draw:layer="layout" svg:width="0.096cm" svg:height="0.09cm" svg:x="13.455cm" svg:y="14.782cm">
            <text:p/>
            <draw:enhanced-geometry svg:viewBox="0 0 159 152" draw:type="non-primitive" draw:enhanced-path="M 144 11 C 155 56 158 103 155 151 L 3 151 C 0 101 3 50 14 0 58 5 101 9 144 11 N"/>
          </draw:custom-shape>
          <draw:custom-shape draw:style-name="gr20" draw:text-style-name="P13" draw:layer="layout" svg:width="0.317cm" svg:height="0.098cm" svg:x="13.952cm" svg:y="14.776cm">
            <text:p/>
            <draw:enhanced-geometry svg:viewBox="0 0 503 163" draw:type="non-primitive" draw:enhanced-path="M 360 0 C 371 5 379 12 387 22 413 15 438 11 463 11 476 14 487 21 495 33 501 75 502 119 501 162 L 3 162 C 0 112 4 64 14 17 120 18 227 20 333 22 344 16 353 9 360 0 N"/>
          </draw:custom-shape>
          <draw:custom-shape draw:style-name="gr20" draw:text-style-name="P13" draw:layer="layout" svg:width="0.011cm" svg:height="0.09cm" svg:x="13.548cm" svg:y="14.782cm">
            <text:p/>
            <draw:enhanced-geometry svg:viewBox="0 0 26 152" draw:type="non-primitive" draw:enhanced-path="M 0 11 C 1 5 4 2 11 0 25 52 25 103 11 151 14 103 11 56 0 11 N"/>
          </draw:custom-shape>
          <draw:custom-shape draw:style-name="gr32" draw:text-style-name="P13" draw:layer="layout" svg:width="1.686cm" svg:height="0.662cm" svg:x="12.866cm" svg:y="14.928cm">
            <text:p/>
            <draw:enhanced-geometry svg:viewBox="0 0 2640 1039" draw:type="non-primitive" draw:enhanced-path="M 2 0 L 2639 0 2639 1027 C 2484 1028 2329 1027 2174 1022 2131 971 2088 920 2045 870 1677 869 1312 866 948 865 831 866 713 869 596 870 557 924 514 974 466 1022 312 1023 159 1029 7 1038 2 692 0 346 2 0 N"/>
          </draw:custom-shape>
          <draw:custom-shape draw:style-name="gr20" draw:text-style-name="P13" draw:layer="layout" svg:width="0.382cm" svg:height="0.037cm" svg:x="13.033cm" svg:y="15.095cm">
            <text:p/>
            <draw:enhanced-geometry svg:viewBox="0 0 606 66" draw:type="non-primitive" draw:enhanced-path="M 0 0 L 605 0 605 65 C 403 56 201 56 0 65 L 0 0 N"/>
          </draw:custom-shape>
          <draw:custom-shape draw:style-name="gr20" draw:text-style-name="P13" draw:layer="layout" svg:width="0.384cm" svg:height="0.038cm" svg:x="13.033cm" svg:y="15.185cm">
            <text:p/>
            <draw:enhanced-geometry svg:viewBox="0 0 609 66" draw:type="non-primitive" draw:enhanced-path="M 0 0 C 201 0 398 1 595 5 604 24 608 43 605 65 L 0 65 0 0 N"/>
          </draw:custom-shape>
          <draw:custom-shape draw:style-name="gr20" draw:text-style-name="P13" draw:layer="layout" svg:width="0.384cm" svg:height="0.037cm" svg:x="13.033cm" svg:y="15.282cm">
            <text:p/>
            <draw:enhanced-geometry svg:viewBox="0 0 608 66" draw:type="non-primitive" draw:enhanced-path="M 2 0 L 607 0 607 54 C 406 52 206 55 7 65 2 43 0 22 2 0 N"/>
          </draw:custom-shape>
        </draw:g>
        <draw:g draw:style-name="gr4">
          <draw:custom-shape draw:style-name="gr33" draw:text-style-name="P13" draw:layer="layout" svg:width="0.482cm" svg:height="0.589cm" svg:x="16.995cm" svg:y="15.09cm">
            <text:p/>
            <draw:enhanced-geometry svg:viewBox="0 0 901 1097" draw:mirror-horizontal="false" draw:mirror-vertical="false" draw:type="non-primitive" draw:enhanced-path="M 412 1 L 443 0 472 1 501 4 528 9 554 16 579 25 603 36 626 48 648 62 669 78 688 96 707 116 724 137 740 161 755 186 769 213 777 236 783 259 788 282 791 305 793 327 794 349 793 371 791 393 787 415 781 436 775 457 766 478 757 499 746 519 733 539 719 559 701 580 681 598 661 615 639 631 617 645 593 657 568 667 542 676 541 688 541 699 541 710 541 722 546 722 552 722 557 722 562 723 563 723 564 724 565 725 566 725 566 725 566 726 567 726 567 727 568 728 568 729 570 760 570 775 570 791 715 791 716 786 718 781 719 777 721 773 724 769 726 766 729 763 732 761 735 759 739 758 743 757 747 756 752 756 756 756 761 757 767 758 772 757 777 756 782 756 786 757 791 757 795 758 798 760 802 762 805 764 808 767 811 770 813 773 815 777 817 781 819 786 820 791 897 792 899 794 899 795 900 796 899 1058 880 1060 860 1061 840 1061 820 1061 819 1066 817 1070 816 1075 814 1079 811 1082 809 1085 806 1088 803 1090 799 1092 795 1093 791 1095 787 1095 783 1096 778 1096 773 1095 768 1094 762 1095 757 1096 752 1096 748 1096 744 1095 740 1094 736 1093 733 1091 729 1089 727 1086 724 1083 722 1079 720 1075 718 1071 716 1066 715 1061 185 1061 184 1066 183 1071 181 1075 179 1079 177 1082 174 1086 171 1088 168 1091 165 1092 161 1094 158 1095 153 1096 149 1096 144 1096 139 1095 134 1094 129 1095 124 1096 119 1096 115 1096 111 1095 107 1094 103 1093 99 1091 96 1089 93 1086 90 1083 88 1080 86 1076 84 1072 82 1068 80 1063 1 1058 0 796 1 795 2 794 4 792 80 789 81 786 81 783 82 780 83 778 84 776 85 773 87 771 88 769 90 768 92 766 94 764 96 763 99 762 101 761 104 760 106 759 120 758 134 758 147 758 161 759 164 760 166 761 169 762 171 764 173 766 175 767 177 769 178 771 180 773 181 775 182 778 183 780 184 783 184 785 185 788 185 791 331 791 331 775 331 760 332 729 332 728 333 727 334 726 334 726 334 725 335 725 335 725 336 724 337 723 338 723 343 722 349 722 354 722 359 722 360 710 359 698 359 687 357 675 330 665 305 654 282 642 259 629 239 614 219 598 202 581 185 563 170 544 157 523 145 501 135 478 126 453 118 428 112 401 108 373 107 350 107 327 109 305 112 284 116 263 122 243 128 223 136 203 145 185 156 166 167 149 180 132 194 115 209 99 225 84 242 69 262 56 282 44 302 33 323 24 345 16 367 10 389 4 412 1 N"/>
          </draw:custom-shape>
          <draw:custom-shape draw:style-name="gr34" draw:text-style-name="P13" draw:layer="layout" svg:width="0.348cm" svg:height="0.348cm" svg:x="17.062cm" svg:y="15.1cm">
            <text:p/>
            <draw:enhanced-geometry svg:viewBox="0 0 651 652" draw:mirror-horizontal="false" draw:mirror-vertical="false" draw:type="non-primitive" draw:enhanced-path="M 315 0 L 341 1 366 4 390 8 413 14 435 21 456 29 476 38 496 50 514 62 532 76 549 91 565 108 580 126 594 145 607 166 620 189 629 213 637 238 642 262 647 286 649 309 650 332 649 355 646 378 641 400 635 422 627 444 618 466 607 487 594 508 579 529 562 549 543 567 523 584 502 598 481 611 460 622 438 631 416 638 394 644 371 648 348 650 324 651 300 650 276 646 251 642 226 635 201 627 178 615 156 603 136 589 117 575 99 560 83 543 68 526 55 508 43 488 33 468 24 447 16 425 10 402 5 378 2 353 0 327 2 302 5 277 9 253 15 230 22 208 31 187 41 167 53 148 66 129 80 112 96 96 113 80 132 66 152 52 173 39 196 27 210 22 225 17 240 12 255 9 270 6 285 3 300 1 315 0 N"/>
          </draw:custom-shape>
          <draw:custom-shape draw:style-name="gr35" draw:text-style-name="P13" draw:layer="layout" svg:width="0.324cm" svg:height="0.324cm" svg:x="17.074cm" svg:y="15.112cm">
            <text:p/>
            <draw:enhanced-geometry svg:viewBox="0 0 607 610" draw:mirror-horizontal="false" draw:mirror-vertical="false" draw:type="non-primitive" draw:enhanced-path="M 276 19 L 253 23 231 28 209 35 188 43 167 53 148 65 129 78 110 93 110 94 110 95 109 95 109 96 109 97 109 98 110 99 110 100 119 109 128 118 137 126 146 134 147 136 148 139 149 141 149 143 149 145 149 146 149 147 148 148 148 149 147 149 147 150 146 150 145 151 144 151 142 151 140 151 138 151 136 150 133 149 94 110 77 130 62 151 49 173 39 196 30 220 24 244 20 270 18 296 34 296 50 296 66 297 82 299 82 300 83 302 83 303 83 304 83 306 83 307 83 308 82 309 81 310 81 311 80 311 79 312 78 313 76 313 75 314 73 314 67 315 60 315 53 315 46 315 40 315 33 314 26 314 20 313 21 338 24 362 29 386 37 409 46 431 57 452 71 472 87 492 87 493 88 493 88 494 89 495 90 496 91 496 91 497 92 497 93 497 93 498 94 498 95 498 96 498 97 498 138 457 140 457 142 457 143 458 145 458 146 459 147 459 147 460 148 460 149 461 149 462 149 463 150 463 150 464 150 466 150 467 150 469 149 471 149 473 109 513 125 527 142 539 159 551 177 560 195 569 214 576 234 582 255 586 289 590 306 590 322 589 338 588 354 585 369 582 384 578 399 573 414 567 428 561 442 553 456 544 470 535 483 525 496 513 457 473 456 471 456 469 455 467 455 466 455 464 456 463 456 462 456 461 457 461 457 460 458 460 458 459 460 459 461 458 462 458 464 457 466 457 467 457 510 499 528 479 543 458 556 436 566 414 575 390 581 365 584 339 586 313 579 314 572 314 566 315 559 315 552 315 545 315 539 315 532 314 530 314 529 313 528 313 526 312 525 311 524 310 523 309 523 308 522 307 522 306 522 304 522 303 523 302 523 300 524 299 539 297 555 296 571 296 587 296 585 270 581 244 575 220 567 196 556 173 543 151 529 130 512 110 470 152 468 152 466 152 464 152 463 152 461 152 460 152 459 152 459 151 458 151 458 150 457 150 457 149 456 148 456 147 456 146 456 144 456 143 456 141 457 139 494 100 495 99 495 98 496 98 496 97 496 96 496 95 495 94 495 93 494 93 494 92 474 76 453 62 432 50 409 40 386 32 362 26 338 22 312 19 312 35 312 50 311 81 310 82 309 83 308 84 307 85 306 85 305 86 304 86 303 86 302 86 301 86 300 85 298 85 297 84 296 83 295 82 294 81 293 50 293 35 293 19 276 19 Z M 279 0 L 307 1 334 3 360 7 385 13 409 20 431 29 453 40 473 52 492 66 510 82 527 100 542 119 557 140 570 162 582 187 593 213 598 236 603 260 605 282 606 305 606 327 604 348 600 369 595 390 588 410 580 430 570 449 559 468 546 486 532 504 516 522 498 539 478 553 457 566 437 577 416 586 395 594 373 600 352 605 330 608 309 609 287 608 265 606 243 602 220 596 198 589 175 580 152 570 130 554 109 538 90 521 73 503 58 485 44 465 33 445 23 424 15 403 8 380 4 357 1 333 0 308 1 283 3 256 8 229 14 210 21 191 29 174 37 157 47 141 57 125 68 111 80 97 93 84 107 72 121 61 137 50 153 40 170 31 188 23 207 16 225 11 243 6 261 3 279 0 Z N"/>
          </draw:custom-shape>
          <draw:custom-shape draw:style-name="gr36" draw:text-style-name="P13" draw:layer="layout" svg:width="0.11cm" svg:height="0.039cm" svg:x="17.217cm" svg:y="15.254cm">
            <text:p/>
            <draw:enhanced-geometry svg:viewBox="0 0 210 80" draw:mirror-horizontal="false" draw:mirror-vertical="false" draw:type="non-primitive" draw:enhanced-path="M 30 0 L 34 0 38 0 42 0 46 1 50 2 53 3 56 4 59 6 62 8 65 10 68 12 70 15 72 18 74 21 76 25 78 29 207 33 207 33 208 34 208 35 208 36 208 37 209 37 209 38 209 39 209 40 209 41 209 41 209 42 209 43 208 44 208 46 91 51 89 48 83 50 80 52 78 53 76 57 74 60 71 63 69 66 66 69 64 71 61 73 58 75 54 76 51 78 47 78 44 79 40 79 36 79 32 79 28 78 23 76 19 73 15 70 11 68 9 65 6 61 4 58 2 54 1 51 0 47 0 43 0 38 1 34 2 29 3 24 5 19 8 16 10 13 13 11 16 8 19 6 23 4 26 2 30 0 N"/>
          </draw:custom-shape>
          <draw:custom-shape draw:style-name="gr36" draw:text-style-name="P13" draw:layer="layout" svg:width="0.019cm" svg:height="0.019cm" svg:x="17.226cm" svg:y="15.264cm">
            <text:p/>
            <draw:enhanced-geometry svg:viewBox="0 0 44 45" draw:mirror-horizontal="false" draw:mirror-vertical="false" draw:type="non-primitive" draw:enhanced-path="M 12 1 L 15 0 18 0 21 0 24 0 27 1 29 1 31 2 33 3 35 5 37 7 38 9 40 11 41 13 42 16 42 19 43 23 42 25 42 27 41 29 41 31 40 33 39 34 38 36 36 37 35 39 33 40 32 41 30 42 28 43 26 43 24 44 21 44 17 42 13 40 10 38 7 36 4 34 3 31 2 30 1 29 1 27 0 26 0 25 0 23 0 22 0 21 1 18 2 14 4 11 6 8 9 5 12 1 N"/>
          </draw:custom-shape>
          <draw:custom-shape draw:style-name="gr36" draw:text-style-name="P13" draw:layer="layout" svg:width="0.141cm" svg:height="0.074cm" svg:x="17.167cm" svg:y="15.314cm">
            <text:p/>
            <draw:enhanced-geometry svg:viewBox="0 0 267 145" draw:mirror-horizontal="false" draw:mirror-vertical="false" draw:type="non-primitive" draw:enhanced-path="M 109 1 L 122 0 135 0 147 1 159 3 171 5 181 9 192 13 201 19 211 25 219 32 227 39 235 48 242 58 249 68 255 79 260 92 262 97 263 103 265 109 265 115 266 121 266 127 266 133 265 139 261 143 257 143 253 144 249 144 245 144 241 144 236 144 232 143 228 143 227 142 226 141 225 141 224 140 223 139 222 138 222 137 221 136 221 135 221 134 221 133 221 131 222 130 222 129 223 128 223 126 229 125 235 125 241 125 247 125 246 116 245 108 243 100 240 92 237 84 233 77 228 70 223 63 223 62 223 62 223 62 222 61 222 61 222 61 222 61 221 61 221 61 221 61 220 61 220 61 220 61 219 61 219 61 219 62 217 64 215 66 213 68 211 70 208 71 206 73 203 74 201 75 199 74 198 74 197 73 196 73 195 72 194 71 194 70 193 70 193 69 193 68 193 67 192 66 193 64 193 63 193 62 193 61 196 59 198 57 199 55 201 53 202 51 204 49 205 46 205 44 198 39 191 34 184 30 176 27 168 24 159 22 151 21 142 20 142 25 142 31 142 36 141 41 140 43 139 44 138 44 137 45 136 46 135 46 134 46 133 46 132 46 130 46 129 46 128 45 127 44 126 44 125 43 124 41 123 36 123 31 123 25 123 20 114 21 105 22 96 24 88 27 80 31 73 35 65 40 58 46 62 50 65 54 68 57 72 61 72 62 72 63 73 65 73 66 73 67 72 68 72 69 72 70 71 71 70 72 69 72 68 73 67 74 66 74 65 75 63 75 61 74 59 72 56 71 54 69 52 68 50 66 48 64 47 62 46 61 46 61 45 61 45 61 45 61 45 61 44 61 44 61 44 61 43 61 43 61 43 61 43 62 42 62 42 62 42 63 37 70 32 77 28 84 25 92 22 100 20 108 19 116 18 125 24 125 30 125 36 125 42 126 42 127 43 129 43 130 44 131 44 132 44 133 44 134 44 135 44 136 43 137 43 138 42 139 42 140 41 141 40 142 39 143 35 143 30 144 26 144 21 144 17 144 13 144 8 143 4 143 0 139 1 126 2 113 4 101 7 89 11 78 16 68 22 58 28 49 35 41 43 33 52 26 62 20 72 14 84 9 96 5 109 1 N"/>
          </draw:custom-shape>
          <draw:custom-shape draw:style-name="gr36" draw:text-style-name="P13" draw:layer="layout" svg:width="0.028cm" svg:height="0.029cm" svg:x="17.21cm" svg:y="15.371cm">
            <text:p/>
            <draw:enhanced-geometry svg:viewBox="0 0 62 62" draw:mirror-horizontal="false" draw:mirror-vertical="false" draw:type="non-primitive" draw:enhanced-path="M 2 0 L 4 0 5 0 7 0 8 0 10 0 11 1 13 1 14 1 61 48 61 50 61 52 61 53 61 55 61 56 60 57 60 58 60 58 59 59 59 59 58 60 58 60 57 60 57 61 56 61 54 61 53 61 51 61 50 61 48 61 1 14 0 13 0 11 0 10 0 9 0 8 0 7 0 6 0 5 0 4 1 4 1 3 1 2 2 0 N"/>
          </draw:custom-shape>
          <draw:custom-shape draw:style-name="gr36" draw:text-style-name="P13" draw:layer="layout" svg:width="0.076cm" svg:height="0.019cm" svg:x="17.198cm" svg:y="15.46cm">
            <text:p/>
            <draw:enhanced-geometry svg:viewBox="0 0 149 42" draw:mirror-horizontal="false" draw:mirror-vertical="false" draw:type="non-primitive" draw:enhanced-path="M 0 0 L 75 7 148 0 148 41 0 41 0 0 N"/>
          </draw:custom-shape>
          <draw:custom-shape draw:style-name="gr36" draw:text-style-name="P13" draw:layer="layout" svg:width="0.106cm" svg:height="0.04cm" svg:x="17.183cm" svg:y="15.491cm">
            <text:p/>
            <draw:enhanced-geometry svg:viewBox="0 0 202 82" draw:mirror-horizontal="false" draw:mirror-vertical="false" draw:type="non-primitive" draw:enhanced-path="M 0 0 L 201 0 201 14 201 28 200 41 198 55 186 61 174 66 162 71 150 74 138 77 125 79 113 81 101 81 89 81 76 80 64 78 52 75 40 72 27 67 15 62 3 56 1 42 0 28 0 14 0 0 N"/>
          </draw:custom-shape>
          <draw:custom-shape draw:style-name="gr36" draw:text-style-name="P13" draw:layer="layout" svg:width="0.031cm" svg:height="0.157cm" svg:x="17.047cm" svg:y="15.51cm">
            <text:p/>
            <draw:enhanced-geometry svg:viewBox="0 0 65 302" draw:mirror-horizontal="false" draw:mirror-vertical="false" draw:type="non-primitive" draw:enhanced-path="M 8 0 L 21 0 33 0 46 1 58 1 64 7 64 292 63 293 63 294 62 295 61 295 60 296 60 297 59 297 58 298 57 298 56 298 55 299 54 299 53 299 51 300 46 300 40 301 34 301 28 301 23 300 17 300 12 299 6 297 5 297 4 296 3 295 2 294 2 293 1 292 0 290 0 289 0 10 1 8 1 7 2 5 3 4 4 3 6 2 7 1 8 0 N"/>
          </draw:custom-shape>
          <draw:custom-shape draw:style-name="gr36" draw:text-style-name="P13" draw:layer="layout" svg:width="0.031cm" svg:height="0.157cm" svg:x="17.391cm" svg:y="15.51cm">
            <text:p/>
            <draw:enhanced-geometry svg:viewBox="0 0 65 302" draw:mirror-horizontal="false" draw:mirror-vertical="false" draw:type="non-primitive" draw:enhanced-path="M 6 0 L 19 0 31 0 44 1 56 1 57 2 58 2 58 2 59 3 60 3 60 3 61 4 61 4 62 5 62 5 63 6 63 7 64 7 64 8 64 9 64 10 64 289 64 290 63 292 63 293 62 294 61 295 60 296 60 297 59 297 58 298 57 298 55 299 54 299 53 300 52 300 50 300 49 300 44 300 40 301 36 301 31 301 27 301 22 301 18 300 13 300 11 299 10 299 9 299 8 298 7 298 6 298 6 297 5 297 4 296 3 295 3 295 2 294 1 293 0 292 0 7 1 7 2 6 3 5 3 4 4 3 5 2 5 1 6 0 N"/>
          </draw:custom-shape>
          <draw:custom-shape draw:style-name="gr36" draw:text-style-name="P13" draw:layer="layout" svg:width="0.028cm" svg:height="0.121cm" svg:x="17.005cm" svg:y="15.529cm">
            <text:p/>
            <draw:enhanced-geometry svg:viewBox="0 0 63 233" draw:mirror-horizontal="false" draw:mirror-vertical="false" draw:type="non-primitive" draw:enhanced-path="M 0 0 L 62 0 62 232 0 232 0 0 N"/>
          </draw:custom-shape>
          <draw:custom-shape draw:style-name="gr36" draw:text-style-name="P13" draw:layer="layout" svg:width="0.281cm" svg:height="0.121cm" svg:x="17.093cm" svg:y="15.529cm">
            <text:p/>
            <draw:enhanced-geometry svg:viewBox="0 0 531 233" draw:mirror-horizontal="false" draw:mirror-vertical="false" draw:type="non-primitive" draw:enhanced-path="M 0 0 L 155 1 169 8 183 14 196 19 210 23 224 26 237 28 251 29 265 30 279 29 292 28 306 26 320 23 334 19 347 14 361 8 375 1 530 0 530 232 0 232 0 0 N"/>
          </draw:custom-shape>
          <draw:custom-shape draw:style-name="gr36" draw:text-style-name="P13" draw:layer="layout" svg:width="0.029cm" svg:height="0.121cm" svg:x="17.436cm" svg:y="15.529cm">
            <text:p/>
            <draw:enhanced-geometry svg:viewBox="0 0 63 233" draw:mirror-horizontal="false" draw:mirror-vertical="false" draw:type="non-primitive" draw:enhanced-path="M 0 0 L 62 0 62 232 0 232 0 0 N"/>
          </draw:custom-shape>
        </draw:g>
        <draw:g draw:style-name="gr4">
          <draw:custom-shape draw:style-name="gr37" draw:text-style-name="P13" draw:layer="layout" svg:width="0.505cm" svg:height="0.395cm" svg:x="17.245cm" svg:y="14.399cm">
            <text:p/>
            <draw:enhanced-geometry svg:viewBox="0 0 834 657" draw:type="non-primitive" draw:enhanced-path="M 833 401 L 833 433 831 459 828 485 823 510 816 535 808 559 799 583 788 606 775 629 756 656 702 614 706 607 706 606 706 606 706 606 706 606 706 606 706 606 706 606 706 606 706 605 706 605 706 605 706 605 706 605 706 605 706 605 706 604 648 570 664 541 664 541 664 541 664 541 665 541 665 541 665 541 665 541 665 541 665 541 665 541 725 575 733 558 741 541 747 524 752 506 756 489 759 471 761 452 762 434 694 434 694 399 762 399 761 382 759 366 757 349 753 333 749 317 744 301 738 285 732 270 730 267 729 263 727 260 725 257 706 268 702 261 697 254 689 239 689 239 689 239 689 239 689 239 689 238 689 238 689 238 690 238 690 238 690 238 708 226 697 211 686 197 674 184 662 171 649 159 635 147 621 136 605 126 605 126 605 126 605 127 605 127 604 127 604 127 604 128 603 128 570 185 546 172 545 171 545 171 544 170 543 170 542 169 542 169 541 168 541 167 575 108 558 100 541 93 524 87 506 82 488 78 470 74 452 72 434 71 434 139 399 139 399 71 380 72 362 74 344 78 326 82 309 87 292 93 275 100 258 108 292 167 292 168 292 168 291 168 291 169 291 169 290 169 290 169 290 169 262 185 229 128 229 128 229 127 228 127 228 127 228 127 227 126 227 126 227 126 212 136 198 147 184 159 171 171 158 184 146 197 135 211 125 226 185 263 167 293 107 258 99 275 92 292 86 309 81 327 77 344 74 362 72 381 71 399 139 399 139 434 71 434 72 452 74 471 77 489 81 506 86 524 92 541 99 558 107 575 167 541 167 541 168 541 168 541 168 541 168 541 168 541 168 541 168 541 169 541 169 541 185 570 127 604 127 605 126 605 126 605 126 605 126 605 126 605 126 605 126 606 126 606 126 606 126 606 126 606 126 606 126 606 126 606 126 607 129 610 130 612 131 614 131 614 131 614 131 614 132 614 132 614 132 614 132 615 132 615 132 615 131 615 131 615 131 615 131 615 131 615 131 616 76 655 75 653 73 651 72 649 70 648 55 624 42 599 31 574 21 549 13 523 7 496 3 469 0 441 0 392 2 368 6 345 10 322 16 299 24 276 32 254 42 232 53 211 79 172 93 154 107 137 122 121 138 106 154 92 172 79 190 67 208 55 227 45 247 36 268 27 290 20 334 8 380 2 403 0 425 0 447 1 469 3 491 6 512 11 533 16 554 23 574 31 594 40 614 50 634 61 672 87 707 118 723 135 738 152 752 170 765 188 776 207 787 226 797 246 805 266 812 287 819 309 824 331 828 354 833 401 N"/>
          </draw:custom-shape>
          <draw:custom-shape draw:style-name="gr38" draw:text-style-name="P13" draw:layer="layout" svg:width="0.2cm" svg:height="0.132cm" svg:x="17.456cm" svg:y="14.556cm">
            <text:p/>
            <draw:enhanced-geometry svg:viewBox="0 0 337 226" draw:type="non-primitive" draw:enhanced-path="M 332 0 L 332 0 333 1 334 1 334 1 335 2 335 2 335 3 336 3 139 151 139 158 139 164 138 169 136 175 135 180 132 185 130 190 127 194 124 199 121 203 117 207 113 210 108 213 103 216 98 219 92 222 87 223 82 224 77 225 71 225 66 225 62 225 57 224 52 223 47 222 43 220 38 218 34 216 30 213 26 210 22 207 18 203 14 198 11 194 9 190 6 185 4 180 3 176 2 171 1 166 0 162 0 157 0 152 1 147 2 142 3 137 5 132 6 126 9 122 12 118 15 114 18 110 21 106 25 103 28 100 32 98 36 95 40 93 45 92 49 90 54 89 59 88 64 87 69 87 74 87 78 88 83 88 87 90 92 91 96 93 100 95 104 97 104 97 104 97 105 97 105 97 105 97 105 97 105 97 105 97 106 97 106 97 106 97 106 97 106 97 107 97 332 0 N"/>
          </draw:custom-shape>
          <draw:custom-shape draw:style-name="gr38" draw:text-style-name="P13" draw:layer="layout" svg:width="0.165cm" svg:height="0.06cm" svg:x="17.412cm" svg:y="14.78cm">
            <text:p/>
            <draw:enhanced-geometry svg:viewBox="0 0 279 105" draw:type="non-primitive" draw:enhanced-path="M 0 0 L 278 0 278 104 0 104 0 0 N"/>
          </draw:custom-shape>
        </draw:g>
        <draw:g draw:style-name="gr4">
          <draw:custom-shape draw:style-name="gr39" draw:text-style-name="P13" draw:layer="layout" svg:width="0.75cm" svg:height="0.605cm" svg:x="11.745cm" svg:y="14.34cm">
            <text:p/>
            <draw:enhanced-geometry svg:viewBox="0 0 1242 1001" draw:mirror-horizontal="false" draw:mirror-vertical="false" draw:type="non-primitive" draw:enhanced-path="M 127 0 L 1220 133 1224 134 1225 135 1227 136 1228 136 1230 137 1231 138 1232 139 1234 140 1235 141 1236 142 1237 144 1238 145 1239 146 1240 148 1241 150 1241 876 1237 885 1230 890 1224 895 1218 901 1212 907 1208 974 1207 976 1207 978 1206 981 1204 983 1203 985 1202 986 1200 988 1199 990 1197 991 1196 993 1194 994 1192 995 1190 996 1188 997 1186 998 1183 999 1169 1000 1155 1000 1141 1000 1127 999 34 864 30 863 27 863 24 861 22 860 19 859 17 857 14 855 12 854 10 852 8 849 6 847 5 844 3 842 2 839 1 836 0 833 0 45 1 43 2 41 3 39 5 37 6 35 7 33 9 32 11 30 12 29 14 28 16 27 18 26 20 25 23 24 25 23 27 23 44 24 62 26 79 27 97 27 127 0 N"/>
          </draw:custom-shape>
          <draw:custom-shape draw:style-name="gr40" draw:text-style-name="P13" draw:layer="layout" svg:width="0.718cm" svg:height="0.575cm" svg:x="11.75cm" svg:y="14.361cm">
            <text:p/>
            <draw:enhanced-geometry svg:viewBox="0 0 1192 953" draw:mirror-horizontal="false" draw:mirror-vertical="false" draw:type="non-primitive" draw:enhanced-path="M 113 6 L 1165 135 1167 135 1169 136 1171 137 1173 139 1175 140 1177 141 1179 143 1181 144 1182 146 1184 147 1185 149 1186 151 1188 153 1189 155 1190 157 1191 160 1187 936 1186 939 1184 941 1182 943 1180 945 1178 947 1176 948 1174 949 1171 950 1169 951 1167 952 1164 952 1161 952 1158 952 1156 952 1153 951 1149 950 1151 949 1152 947 1153 945 1154 944 1155 942 1156 940 1157 938 1157 936 1157 185 1157 183 1156 181 1155 179 1155 178 1154 176 1153 174 1152 173 1151 171 1150 170 1148 168 1147 167 1146 166 1144 165 1142 163 1140 162 1139 162 1137 160 1135 159 1134 158 1132 157 1130 156 1128 155 1126 154 1123 154 169 38 130 33 90 28 50 24 11 22 9 23 7 24 6 25 5 26 4 26 4 26 3 26 3 26 2 26 2 26 2 26 1 26 1 25 1 25 1 25 0 24 0 24 0 23 0 22 0 20 0 18 1 14 2 12 4 10 5 8 6 7 8 5 9 3 11 2 13 0 113 6 N"/>
          </draw:custom-shape>
          <draw:custom-shape draw:style-name="gr41" draw:text-style-name="P13" draw:layer="layout" svg:width="0.597cm" svg:height="0.083cm" svg:x="11.81cm" svg:y="14.345cm">
            <text:p/>
            <draw:enhanced-geometry svg:viewBox="0 0 992 144" draw:mirror-horizontal="false" draw:mirror-vertical="false" draw:type="non-primitive" draw:enhanced-path="M 989 119 L 989 120 989 121 988 121 988 122 988 122 988 123 988 123 988 123 988 123 988 123 988 124 988 124 989 125 989 125 989 126 990 126 991 127 991 127 991 127 990 128 990 128 990 128 990 129 989 129 989 129 989 130 989 130 989 130 989 130 989 130 989 130 989 131 990 131 990 131 990 131 990 131 990 132 991 132 991 132 991 134 990 135 989 137 988 138 987 139 986 140 985 141 984 141 982 142 981 142 980 143 978 143 977 143 975 143 974 143 972 142 974 140 976 138 978 136 979 134 980 133 980 132 980 131 980 131 980 130 980 129 980 129 979 128 979 128 979 127 978 127 977 126 977 126 975 125 973 125 970 124 968 124 964 124 963 124 961 124 959 124 957 124 956 125 954 125 953 126 951 127 950 127 949 128 947 129 946 130 945 132 944 133 942 134 941 136 859 128 818 123 777 117 778 115 780 113 781 111 782 110 782 108 782 107 783 107 783 106 782 106 782 105 782 104 782 104 781 103 781 103 780 102 780 102 779 102 777 101 776 101 773 100 771 100 768 100 759 101 757 103 755 105 752 106 750 108 747 109 744 111 741 112 739 113 738 113 737 113 736 112 735 112 735 112 735 112 734 112 734 112 734 111 734 111 734 111 734 111 734 111 734 110 734 110 734 110 735 109 735 109 736 108 737 108 739 106 739 106 739 105 739 105 740 104 740 103 740 103 740 102 740 102 740 101 739 101 739 100 739 100 739 99 738 99 738 98 738 98 735 97 732 96 729 96 726 96 723 96 720 96 717 96 714 97 710 100 705 103 701 106 696 109 696 108 695 108 694 107 693 107 693 107 692 106 693 105 694 104 695 103 696 102 696 100 697 99 698 98 698 97 697 95 696 94 695 94 694 93 693 92 691 91 690 91 689 90 687 90 686 90 684 90 683 89 682 89 680 90 678 90 677 90 665 96 659 99 653 102 650 102 649 102 649 102 648 101 648 101 647 101 647 101 647 101 647 101 647 100 647 100 647 100 647 100 647 100 647 99 647 99 648 98 649 98 650 97 652 96 652 95 652 95 653 94 653 94 653 94 653 93 653 93 653 92 653 92 653 91 653 91 653 91 653 90 652 90 652 89 652 89 649 88 646 86 643 86 640 85 637 85 633 85 630 85 627 86 625 88 623 89 620 91 618 92 616 94 613 95 611 96 608 98 603 96 605 93 606 92 607 91 608 90 608 88 609 87 610 86 608 85 607 84 606 83 604 82 603 81 602 80 600 80 599 79 597 79 596 79 594 79 592 78 591 79 589 79 587 79 586 79 565 91 564 91 563 91 562 91 562 90 561 90 561 90 561 90 561 90 561 90 561 89 561 89 561 89 561 89 561 89 561 88 561 88 561 88 562 87 562 87 563 86 565 85 565 84 566 84 566 83 566 83 566 83 566 82 566 82 566 81 566 81 566 81 566 80 566 80 566 79 566 79 565 79 565 78 562 77 560 76 557 75 555 74 552 74 550 74 547 74 545 74 542 75 540 76 538 77 536 78 533 80 531 82 529 84 527 86 526 86 524 87 522 87 521 87 519 87 517 87 516 86 514 86 515 85 517 84 518 82 519 81 521 79 523 76 522 75 522 74 522 74 521 73 520 72 520 72 519 71 519 71 515 70 512 70 509 70 506 69 502 70 499 70 496 70 493 71 492 72 491 74 490 75 488 76 487 77 486 78 485 79 483 79 482 80 481 80 479 80 477 80 476 80 474 80 472 80 471 79 473 77 474 76 476 74 477 72 477 71 477 71 478 70 478 69 478 69 478 68 477 68 477 67 477 67 477 66 476 66 476 65 475 65 474 65 472 64 470 64 468 63 462 63 454 64 448 67 443 70 438 73 433 76 432 76 431 76 430 75 429 75 429 75 429 75 429 75 428 75 428 74 428 74 428 74 428 74 428 74 428 74 428 73 428 73 429 73 429 72 430 71 431 71 433 70 433 69 433 68 434 68 434 67 434 67 434 66 434 66 434 65 434 64 434 64 433 63 433 63 433 62 433 62 432 61 432 61 429 60 426 59 423 59 420 59 417 59 414 59 411 59 408 60 406 62 404 63 401 65 399 66 397 68 394 69 392 70 389 72 388 71 387 71 387 70 386 70 386 70 385 70 385 69 385 69 385 69 385 69 385 68 385 68 385 68 385 68 385 67 385 67 385 67 385 66 386 66 387 65 387 64 388 64 389 63 390 62 390 61 390 60 390 59 390 58 390 57 389 56 389 56 389 56 388 55 388 55 387 54 386 54 385 54 384 53 383 53 382 53 379 53 377 52 375 52 373 52 371 52 369 52 367 53 365 53 363 54 361 55 359 56 358 57 356 59 354 60 353 62 351 64 348 65 347 65 345 65 344 65 344 65 343 65 343 65 343 65 342 65 342 64 342 64 342 64 342 64 342 63 342 63 342 63 343 62 343 62 344 61 346 59 347 58 347 56 347 55 347 54 347 53 347 52 347 51 347 50 344 49 342 48 339 48 336 47 333 47 331 47 328 48 326 48 323 49 321 50 319 51 316 52 314 54 312 56 310 58 308 60 154 42 153 42 152 42 152 42 151 41 150 41 149 40 148 40 148 39 149 38 150 38 151 37 152 36 153 35 153 34 153 34 154 34 154 33 154 33 154 32 154 32 154 31 154 31 153 30 153 29 152 28 152 27 151 26 150 25 147 25 144 24 141 24 138 24 135 24 132 24 129 25 126 25 118 31 114 34 110 37 108 37 107 36 107 36 106 35 105 35 105 34 105 34 105 34 105 34 105 33 105 33 105 33 105 33 105 32 105 32 105 32 105 31 106 31 107 30 107 30 108 29 110 28 110 27 110 26 110 25 110 24 110 23 110 23 109 22 109 21 109 21 108 20 107 20 106 19 105 19 104 19 103 19 102 18 100 18 98 18 96 18 93 17 91 18 89 18 87 18 85 18 83 20 80 22 78 24 76 25 74 27 71 28 69 29 66 31 64 30 62 30 61 29 62 29 63 28 64 27 65 26 66 25 66 24 67 23 67 22 67 21 67 20 66 19 66 18 66 17 65 16 64 15 63 14 60 14 58 13 55 13 52 13 49 13 47 13 44 14 41 14 39 16 37 18 35 19 32 21 30 22 28 24 25 25 23 26 20 25 17 25 11 24 10 24 8 24 7 24 5 24 4 24 3 23 1 23 0 22 3 18 6 15 9 12 12 9 15 6 19 4 22 2 26 0 989 119 N"/>
          </draw:custom-shape>
          <draw:custom-shape draw:style-name="gr38" draw:text-style-name="P13" draw:layer="layout" svg:width="0.035cm" svg:height="0.005cm" svg:x="11.936cm" svg:y="14.364cm">
            <text:p/>
            <draw:enhanced-geometry svg:viewBox="0 0 68 19" draw:mirror-horizontal="false" draw:mirror-vertical="false" draw:type="non-primitive" draw:enhanced-path="M 9 0 L 67 6 67 7 67 8 67 9 67 10 67 11 67 12 66 13 66 13 65 14 65 15 64 15 64 16 63 17 62 17 62 18 61 18 53 18 45 18 38 18 30 17 23 16 15 14 7 13 0 11 2 8 4 5 9 0 N"/>
          </draw:custom-shape>
          <draw:custom-shape draw:style-name="gr38" draw:text-style-name="P13" draw:layer="layout" svg:width="0.022cm" svg:height="0.001cm" svg:x="11.941cm" svg:y="14.369cm">
            <text:p/>
            <draw:enhanced-geometry svg:viewBox="0 0 46 6" draw:mirror-horizontal="false" draw:mirror-vertical="false" draw:type="non-primitive" draw:enhanced-path="M 0 1 L 6 0 11 0 17 0 23 0 28 1 34 2 40 4 45 5 34 5 23 4 12 3 0 1 N"/>
          </draw:custom-shape>
          <draw:custom-shape draw:style-name="gr42" draw:text-style-name="P13" draw:layer="layout" svg:width="0.653cm" svg:height="0.1cm" svg:x="11.818cm" svg:y="14.353cm">
            <text:p/>
            <draw:enhanced-geometry svg:viewBox="0 0 1086 172" draw:mirror-horizontal="false" draw:mirror-vertical="false" draw:type="non-primitive" draw:enhanced-path="M 980 119 L 984 118 987 118 991 117 995 117 998 117 1002 118 1005 118 1009 119 1009 120 1010 121 1010 123 1010 124 1010 125 1010 125 1010 126 1010 127 1010 128 1009 129 1009 130 1008 131 1007 131 1006 132 1005 133 1004 133 1006 134 1007 134 1008 134 1010 134 1012 133 1015 132 1017 131 1019 129 1022 128 1024 126 1026 124 1028 123 1031 122 1033 122 1036 122 1038 121 1040 122 1043 122 1045 122 1048 123 1049 123 1051 124 1052 125 1053 126 1053 127 1053 127 1054 128 1054 128 1054 129 1054 129 1054 130 1054 130 1054 131 1054 131 1054 132 1053 133 1053 134 1052 135 1051 136 1049 137 1048 138 1051 138 1054 139 1057 140 1060 142 1063 143 1066 145 1068 146 1071 148 1073 150 1075 152 1077 155 1079 157 1080 160 1082 163 1083 166 1085 169 1084 169 1083 168 1083 168 1083 167 1082 167 1082 167 1082 167 1082 167 1082 167 1081 167 1081 167 1081 167 1081 167 1081 168 1081 168 1081 168 1081 168 1080 169 1080 169 1080 170 1080 171 1080 171 1079 169 1078 167 1077 165 1076 163 1075 161 1073 159 1072 158 1070 156 1069 154 1067 153 1065 152 1063 150 1061 149 1059 148 1057 147 1054 146 2 17 2 17 2 17 2 16 3 16 3 16 3 16 3 16 3 15 3 15 3 15 4 15 4 14 4 14 4 14 3 14 2 13 2 13 1 12 1 12 1 12 1 12 0 11 0 11 0 11 6 12 9 12 12 13 14 12 17 11 19 9 22 8 24 6 26 5 28 3 30 1 33 1 36 0 39 0 41 0 44 0 47 0 49 1 52 1 53 2 54 3 55 4 55 5 56 6 56 7 56 8 56 9 56 10 55 11 55 12 54 13 53 14 52 15 51 15 50 16 51 17 53 17 55 17 58 16 60 15 63 14 65 12 67 11 69 9 72 7 74 5 76 5 78 5 80 4 82 4 85 4 87 5 89 5 91 5 92 5 93 6 94 6 95 6 96 7 97 7 98 7 98 8 99 9 99 9 99 10 99 11 99 12 99 13 99 14 99 15 98 16 97 17 96 17 95 18 94 18 94 19 94 19 94 19 94 20 94 20 94 20 94 20 94 21 94 21 94 21 94 21 94 22 95 22 96 23 97 23 98 23 99 24 103 21 107 18 115 12 118 11 121 11 124 11 127 11 130 11 133 11 136 11 139 12 140 13 141 14 142 15 142 16 143 17 143 18 143 18 143 19 143 19 143 20 143 20 143 20 142 21 142 21 142 22 141 23 140 24 139 24 138 25 137 26 137 27 138 27 139 28 140 28 141 28 141 29 142 29 143 29 297 47 299 44 301 42 303 41 305 39 308 38 310 37 312 36 315 35 317 35 320 34 322 34 325 34 328 35 331 35 333 36 336 37 336 38 336 39 336 40 336 41 336 42 336 43 336 44 335 46 333 48 332 49 332 49 332 50 331 50 331 50 331 51 331 51 331 51 331 51 332 52 332 52 332 52 332 52 333 52 333 52 334 52 336 52 337 52 341 51 342 49 344 47 345 46 347 44 348 43 350 42 352 41 354 40 356 39 358 39 360 39 362 39 364 39 366 39 369 40 371 40 372 40 373 40 374 41 375 41 376 41 377 42 377 42 378 43 378 43 378 43 379 44 379 45 379 46 379 47 379 48 379 49 378 50 377 51 376 51 376 52 375 53 374 53 374 54 374 54 374 54 374 54 374 55 374 55 374 55 374 55 374 56 374 56 374 56 374 56 375 57 375 57 376 57 376 58 377 58 378 58 381 57 383 56 386 55 388 53 390 52 393 50 395 48 397 47 400 46 403 46 406 46 409 46 412 46 415 46 418 47 421 48 421 48 422 49 422 49 422 50 422 50 423 51 423 51 423 52 423 52 423 53 423 54 423 54 423 55 422 55 422 56 422 56 420 58 419 58 418 59 418 59 418 60 417 60 417 60 417 61 417 61 417 61 417 61 417 61 418 62 418 62 418 62 418 62 418 62 419 62 420 63 421 63 422 63 427 60 432 57 437 54 443 51 451 50 457 50 459 51 462 51 463 52 464 52 465 52 465 53 466 53 466 54 466 54 467 55 467 55 467 56 467 56 467 57 466 58 466 58 466 59 465 61 463 62 462 64 460 66 462 67 463 67 465 67 467 67 468 67 470 67 471 67 472 66 474 66 475 65 476 64 478 63 479 62 480 61 481 59 482 58 485 57 488 57 491 56 495 56 498 56 501 57 504 57 508 58 508 58 509 59 510 59 510 60 511 61 511 61 512 62 512 63 510 66 508 68 507 69 506 70 504 72 503 73 505 73 507 73 508 74 510 74 511 74 513 73 515 73 516 73 518 70 520 68 522 67 525 65 527 64 529 63 531 62 534 61 536 61 539 61 541 61 544 61 546 62 549 63 552 64 554 65 555 66 555 66 555 66 555 67 555 67 555 67 555 68 555 68 555 69 555 69 555 70 555 70 555 70 555 71 555 71 554 72 552 73 551 74 551 74 550 75 550 75 550 75 550 76 550 76 550 76 550 76 550 76 550 77 550 77 550 77 550 77 551 77 551 77 551 78 552 78 553 78 554 78 575 66 577 66 578 66 580 65 582 65 583 65 585 66 586 66 588 66 589 67 591 67 592 68 594 69 595 69 596 70 597 72 599 73 598 74 597 75 597 77 596 78 595 79 594 80 592 83 598 85 600 83 602 82 605 81 607 79 609 78 612 76 614 75 616 73 619 72 623 72 626 72 629 72 632 73 635 73 638 74 641 76 641 76 642 77 642 77 642 78 642 78 642 78 642 79 642 79 642 80 642 80 642 80 642 81 642 81 642 82 641 82 641 83 639 84 638 85 637 85 637 86 636 86 636 86 636 87 636 87 636 87 636 87 636 88 636 88 636 88 636 88 637 88 637 88 638 89 638 89 640 89 642 89 648 86 654 83 666 77 668 77 669 76 671 76 672 76 674 76 675 77 676 77 678 77 679 78 680 78 682 79 683 80 684 80 685 81 686 82 688 83 687 85 686 86 686 87 685 89 684 90 683 91 682 92 681 93 682 93 682 94 683 94 684 95 685 95 686 95 690 93 694 90 699 87 703 83 706 83 709 83 712 82 715 83 718 83 721 83 724 84 727 85 727 85 728 86 728 86 728 87 728 87 729 88 729 88 729 89 729 89 729 90 729 90 729 91 728 91 728 92 728 93 728 93 726 95 725 95 724 96 724 96 723 97 723 97 723 97 723 97 723 98 723 98 723 98 723 98 723 98 723 99 724 99 724 99 724 99 725 99 726 99 727 100 728 100 731 99 733 98 736 96 739 95 741 93 744 92 746 90 748 88 757 87 760 87 762 87 765 87 767 88 768 89 769 89 769 89 770 90 770 90 771 91 771 91 771 92 772 92 772 93 772 94 772 94 771 95 771 97 770 98 769 100 768 102 766 104 807 110 848 115 931 123 932 121 933 120 934 118 935 117 936 116 938 115 939 114 940 114 942 113 943 112 945 112 947 111 948 111 950 111 952 111 953 111 957 111 959 111 962 111 964 112 966 113 966 113 967 114 968 114 968 114 969 115 969 116 969 116 969 117 969 117 969 118 969 119 969 120 968 121 967 123 965 125 963 127 961 129 963 129 964 130 966 130 967 130 969 129 970 129 972 129 973 128 974 128 975 127 976 126 977 125 978 124 979 122 980 121 980 119 N"/>
          </draw:custom-shape>
          <draw:custom-shape draw:style-name="gr38" draw:text-style-name="P13" draw:layer="layout" svg:width="0.008cm" svg:height="0.001cm" svg:x="11.885cm" svg:y="14.364cm">
            <text:p/>
            <draw:enhanced-geometry svg:viewBox="0 0 22 11" draw:mirror-horizontal="false" draw:mirror-vertical="false" draw:type="non-primitive" draw:enhanced-path="M 11 0 L 15 0 16 0 17 1 19 1 19 1 19 1 20 2 20 2 20 2 20 3 21 3 21 3 21 4 20 4 20 4 20 5 20 6 19 7 18 8 15 10 9 10 6 10 4 10 3 10 2 10 1 10 1 10 1 9 0 9 0 9 0 9 0 9 0 9 0 8 0 8 0 8 0 7 1 7 1 6 2 5 4 4 6 3 11 0 N"/>
          </draw:custom-shape>
          <draw:custom-shape draw:style-name="gr38" draw:text-style-name="P13" draw:layer="layout" svg:width="0.011cm" svg:height="0.003cm" svg:x="11.858cm" svg:y="14.361cm">
            <text:p/>
            <draw:enhanced-geometry svg:viewBox="0 0 25 12" draw:mirror-horizontal="false" draw:mirror-vertical="false" draw:type="non-primitive" draw:enhanced-path="M 9 0 L 15 0 18 0 20 1 21 1 22 1 22 2 23 2 23 2 23 2 23 2 24 3 24 3 24 3 24 3 23 4 23 4 23 4 23 5 22 5 21 6 19 7 17 8 11 11 9 11 8 11 7 10 5 10 4 9 3 9 1 8 0 8 2 5 4 3 5 3 6 2 8 1 9 0 N"/>
          </draw:custom-shape>
          <draw:custom-shape draw:style-name="gr38" draw:text-style-name="P13" draw:layer="layout" svg:width="0.011cm" svg:height="0.001cm" svg:x="11.831cm" svg:y="14.358cm">
            <text:p/>
            <draw:enhanced-geometry svg:viewBox="0 0 27 10" draw:mirror-horizontal="false" draw:mirror-vertical="false" draw:type="non-primitive" draw:enhanced-path="M 6 0 L 9 0 11 0 16 0 21 1 26 1 25 3 23 4 22 5 20 6 19 7 17 7 16 8 14 8 13 9 11 9 9 9 7 9 6 9 4 9 2 8 0 8 1 7 2 6 3 5 4 4 4 3 5 2 6 1 6 0 N"/>
          </draw:custom-shape>
          <draw:custom-shape draw:style-name="gr43" draw:text-style-name="P13" draw:layer="layout" svg:width="0.027cm" svg:height="0.479cm" svg:x="11.75cm" svg:y="14.377cm">
            <text:p/>
            <draw:enhanced-geometry svg:viewBox="0 0 54 793" draw:mirror-horizontal="false" draw:mirror-vertical="false" draw:type="non-primitive" draw:enhanced-path="M 53 2 L 53 2 52 2 52 3 52 3 51 3 51 3 51 4 50 4 50 4 49 4 49 4 48 4 48 4 48 4 47 4 47 4 43 3 40 3 37 2 34 3 32 3 29 3 27 4 25 5 23 7 21 8 19 10 17 12 16 15 15 17 14 20 13 23 13 767 14 770 15 772 16 774 17 776 18 778 20 780 21 781 23 783 25 784 27 785 29 786 31 787 33 788 35 788 38 789 40 789 40 789 40 790 40 790 40 790 40 790 40 790 40 791 40 791 39 791 39 791 39 791 39 791 39 791 38 791 38 791 38 791 34 792 31 791 28 791 25 791 22 790 20 789 17 788 15 786 12 785 10 783 8 781 6 779 4 776 3 773 1 770 0 767 0 11 1 9 3 8 4 6 5 5 7 4 8 3 10 2 12 1 17 0 22 0 33 0 43 1 53 2 N"/>
          </draw:custom-shape>
          <draw:custom-shape draw:style-name="gr38" draw:text-style-name="P13" draw:layer="layout" svg:width="0.011cm" svg:height="0.001cm" svg:x="12.003cm" svg:y="14.38cm">
            <text:p/>
            <draw:enhanced-geometry svg:viewBox="0 0 25 10" draw:mirror-horizontal="false" draw:mirror-vertical="false" draw:type="non-primitive" draw:enhanced-path="M 4 0 L 7 0 9 0 14 0 19 0 24 1 23 3 21 4 20 5 19 6 17 7 16 7 14 8 13 8 11 9 10 9 8 8 7 8 5 8 3 7 2 6 0 6 1 5 1 4 2 4 3 3 3 2 4 2 4 1 4 0 N"/>
          </draw:custom-shape>
          <draw:custom-shape draw:style-name="gr38" draw:text-style-name="P13" draw:layer="layout" svg:width="0.008cm" svg:height="0.001cm" svg:x="12.03cm" svg:y="14.383cm">
            <text:p/>
            <draw:enhanced-geometry svg:viewBox="0 0 23 10" draw:mirror-horizontal="false" draw:mirror-vertical="false" draw:type="non-primitive" draw:enhanced-path="M 6 0 L 8 0 10 0 12 0 14 0 16 1 18 1 20 2 22 2 21 3 21 4 20 5 19 6 19 6 18 7 17 8 16 8 16 8 15 9 14 9 13 9 12 9 11 9 10 9 9 9 4 8 2 7 0 7 1 6 2 5 3 5 4 4 4 3 5 2 6 1 6 0 N"/>
          </draw:custom-shape>
          <draw:custom-shape draw:style-name="gr44" draw:text-style-name="P13" draw:layer="layout" svg:width="0.669cm" svg:height="0.548cm" svg:x="11.761cm" svg:y="14.383cm">
            <text:p/>
            <draw:enhanced-geometry svg:viewBox="0 0 1110 908" draw:mirror-horizontal="false" draw:mirror-vertical="false" draw:type="non-primitive" draw:enhanced-path="M 18 0 L 1086 132 1088 132 1090 133 1091 133 1093 133 1095 134 1097 135 1098 135 1100 136 1101 137 1102 138 1103 140 1105 141 1106 142 1107 144 1108 146 1109 148 1109 894 1109 895 1108 896 1107 898 1107 899 1106 900 1105 901 1104 902 1103 902 1102 903 1101 904 1099 905 1098 905 1097 906 1095 906 1094 906 1092 907 12 773 10 772 9 770 7 768 5 767 4 765 3 763 1 761 0 759 0 11 1 9 2 8 3 7 4 6 5 5 6 4 7 4 8 3 9 2 10 2 12 1 13 1 14 0 16 0 17 0 18 0 N"/>
          </draw:custom-shape>
          <draw:custom-shape draw:style-name="gr38" draw:text-style-name="P13" draw:layer="layout" svg:width="0.011cm" svg:height="0.002cm" svg:x="12.054cm" svg:y="14.383cm">
            <text:p/>
            <draw:enhanced-geometry svg:viewBox="0 0 25 12" draw:mirror-horizontal="false" draw:mirror-vertical="false" draw:type="non-primitive" draw:enhanced-path="M 9 0 L 11 0 13 0 15 0 17 0 18 1 20 2 22 2 24 3 23 5 21 6 20 7 19 8 17 9 16 10 14 10 13 11 11 11 10 11 8 11 7 10 5 10 3 9 2 9 0 8 1 7 2 6 3 5 4 4 5 3 6 2 8 1 9 0 N"/>
          </draw:custom-shape>
          <draw:custom-shape draw:style-name="gr38" draw:text-style-name="P13" draw:layer="layout" svg:width="0.011cm" svg:height="0.001cm" svg:x="12.081cm" svg:y="14.388cm">
            <text:p/>
            <draw:enhanced-geometry svg:viewBox="0 0 25 10" draw:mirror-horizontal="false" draw:mirror-vertical="false" draw:type="non-primitive" draw:enhanced-path="M 7 0 L 9 0 11 0 13 0 15 0 17 0 20 1 22 1 24 1 23 3 21 4 20 5 19 6 17 7 16 7 15 8 13 8 12 9 10 9 9 9 7 9 5 9 4 9 2 8 0 8 1 7 2 6 3 5 4 4 4 3 5 2 7 0 N"/>
          </draw:custom-shape>
          <draw:custom-shape draw:style-name="gr38" draw:text-style-name="P13" draw:layer="layout" svg:width="0.008cm" svg:height="0.003cm" svg:x="12.108cm" svg:y="14.391cm">
            <text:p/>
            <draw:enhanced-geometry svg:viewBox="0 0 23 12" draw:mirror-horizontal="false" draw:mirror-vertical="false" draw:type="non-primitive" draw:enhanced-path="M 11 0 L 15 0 17 0 18 0 20 0 20 1 21 1 21 1 22 1 22 1 22 2 22 2 22 2 22 3 22 3 22 4 22 4 22 4 22 5 21 6 20 7 19 9 17 10 15 10 13 11 11 11 9 10 6 10 4 10 2 9 0 8 1 7 2 5 4 4 5 3 6 2 8 2 9 1 11 0 N"/>
          </draw:custom-shape>
          <draw:custom-shape draw:style-name="gr38" draw:text-style-name="P13" draw:layer="layout" svg:width="0.011cm" svg:height="0.001cm" svg:x="12.132cm" svg:y="14.396cm">
            <text:p/>
            <draw:enhanced-geometry svg:viewBox="0 0 25 10" draw:mirror-horizontal="false" draw:mirror-vertical="false" draw:type="non-primitive" draw:enhanced-path="M 6 0 L 9 0 11 0 13 0 15 0 17 1 20 1 22 2 24 2 23 3 22 4 22 5 21 6 20 6 19 7 18 7 17 8 16 8 15 9 14 9 13 9 12 9 11 9 10 9 9 9 7 9 4 8 0 8 2 6 3 5 3 4 4 3 5 2 6 1 6 0 N"/>
          </draw:custom-shape>
          <draw:custom-shape draw:style-name="gr38" draw:text-style-name="P13" draw:layer="layout" svg:width="0.01cm" svg:height="0.003cm" svg:x="12.159cm" svg:y="14.396cm">
            <text:p/>
            <draw:enhanced-geometry svg:viewBox="0 0 25 12" draw:mirror-horizontal="false" draw:mirror-vertical="false" draw:type="non-primitive" draw:enhanced-path="M 9 0 L 15 0 17 0 19 0 21 1 22 1 22 1 23 1 23 1 23 2 23 2 23 2 24 2 24 2 24 3 23 3 23 4 23 4 23 5 21 6 20 7 18 8 13 11 0 8 1 7 3 6 4 5 5 4 6 3 7 2 8 1 9 0 N"/>
          </draw:custom-shape>
          <draw:custom-shape draw:style-name="gr38" draw:text-style-name="P13" draw:layer="layout" svg:width="0.011cm" svg:height="0.001cm" svg:x="12.186cm" svg:y="14.402cm">
            <text:p/>
            <draw:enhanced-geometry svg:viewBox="0 0 25 10" draw:mirror-horizontal="false" draw:mirror-vertical="false" draw:type="non-primitive" draw:enhanced-path="M 6 0 L 9 0 11 0 13 0 15 0 17 1 20 1 22 2 24 2 23 3 22 4 22 5 21 6 20 6 19 7 18 7 17 8 16 8 15 9 14 9 13 9 12 9 11 9 10 9 9 9 0 8 1 7 2 6 3 5 4 4 4 3 5 2 6 1 6 0 N"/>
          </draw:custom-shape>
          <draw:custom-shape draw:style-name="gr45" draw:text-style-name="P13" draw:layer="layout" svg:width="0.646cm" svg:height="0.078cm" svg:x="11.774cm" svg:y="14.383cm">
            <text:p/>
            <draw:enhanced-geometry svg:viewBox="0 0 1073 136" draw:mirror-horizontal="false" draw:mirror-vertical="false" draw:type="non-primitive" draw:enhanced-path="M 9 0 L 1065 128 1066 128 1066 128 1067 128 1067 128 1067 128 1068 128 1068 128 1069 128 1069 128 1070 128 1070 129 1070 129 1071 129 1071 129 1071 130 1072 130 1071 130 1070 130 1069 130 1068 130 1068 130 1067 130 1067 130 1067 130 1067 130 1066 131 1066 131 1066 131 1066 131 1066 131 1066 132 1066 132 1066 132 1066 132 1066 133 1066 133 1067 134 1067 135 0 2 1 2 2 2 4 2 4 2 5 2 5 2 6 2 6 1 7 1 7 1 8 1 8 0 9 0 N"/>
          </draw:custom-shape>
          <draw:custom-shape draw:style-name="gr46" draw:text-style-name="P13" draw:layer="layout" svg:width="0.64cm" svg:height="0.075cm" svg:x="11.78cm" svg:y="14.38cm">
            <text:p/>
            <draw:enhanced-geometry svg:viewBox="0 0 1062 133" draw:mirror-horizontal="false" draw:mirror-vertical="false" draw:type="non-primitive" draw:enhanced-path="M 6 0 L 117 13 1061 130 1060 130 1060 130 1060 130 1059 130 1059 130 1059 130 1058 130 1058 130 1058 130 1058 131 1057 131 1057 131 1057 131 1057 132 1057 132 1056 132 0 4 0 2 0 2 1 2 1 2 2 2 2 2 3 2 3 2 4 2 4 2 4 2 5 1 5 1 6 1 6 1 6 0 N"/>
          </draw:custom-shape>
          <draw:custom-shape draw:style-name="gr38" draw:text-style-name="P13" draw:layer="layout" svg:width="0.011cm" svg:height="0.003cm" svg:x="12.213cm" svg:y="14.404cm">
            <text:p/>
            <draw:enhanced-geometry svg:viewBox="0 0 25 12" draw:mirror-horizontal="false" draw:mirror-vertical="false" draw:type="non-primitive" draw:enhanced-path="M 9 0 L 15 0 17 0 19 0 21 1 22 1 22 1 23 1 23 1 23 2 23 2 23 2 24 2 24 2 24 3 23 3 23 4 23 4 23 5 21 6 20 7 18 8 13 11 7 9 3 8 0 8 1 7 2 6 3 5 4 4 5 3 6 2 8 1 9 0 N"/>
          </draw:custom-shape>
          <draw:custom-shape draw:style-name="gr38" draw:text-style-name="P13" draw:layer="layout" svg:width="0.01cm" svg:height="0.001cm" svg:x="12.24cm" svg:y="14.41cm">
            <text:p/>
            <draw:enhanced-geometry svg:viewBox="0 0 25 10" draw:mirror-horizontal="false" draw:mirror-vertical="false" draw:type="non-primitive" draw:enhanced-path="M 4 0 L 7 0 9 0 14 0 19 1 24 1 23 3 21 4 20 5 19 6 17 7 16 7 14 8 13 8 11 9 10 9 8 9 7 9 5 8 3 8 2 7 0 7 2 3 3 2 4 0 N"/>
          </draw:custom-shape>
          <draw:custom-shape draw:style-name="gr38" draw:text-style-name="P13" draw:layer="layout" svg:width="0.011cm" svg:height="0.003cm" svg:x="12.266cm" svg:y="14.41cm">
            <text:p/>
            <draw:enhanced-geometry svg:viewBox="0 0 25 12" draw:mirror-horizontal="false" draw:mirror-vertical="false" draw:type="non-primitive" draw:enhanced-path="M 6 0 L 14 0 16 0 19 0 21 1 21 1 22 1 23 1 23 2 23 2 23 2 24 2 24 2 24 3 24 3 23 3 23 3 23 4 23 4 22 5 21 6 19 7 16 8 10 11 8 11 7 11 6 10 5 10 3 10 2 9 1 8 0 8 2 6 3 5 3 4 4 3 5 2 6 1 6 0 N"/>
          </draw:custom-shape>
          <draw:custom-shape draw:style-name="gr38" draw:text-style-name="P13" draw:layer="layout" svg:width="0.034cm" svg:height="0.007cm" svg:x="12.318cm" svg:y="14.413cm">
            <text:p/>
            <draw:enhanced-geometry svg:viewBox="0 0 68 21" draw:mirror-horizontal="false" draw:mirror-vertical="false" draw:type="non-primitive" draw:enhanced-path="M 6 0 L 63 5 63 6 64 6 65 6 65 7 66 7 66 8 67 8 67 9 66 10 65 12 63 14 62 15 60 16 59 18 57 19 55 20 41 17 28 16 14 14 0 13 0 11 1 9 1 8 1 7 1 7 2 6 2 5 3 4 3 3 4 3 4 2 5 1 6 1 6 0 N"/>
          </draw:custom-shape>
          <draw:custom-shape draw:style-name="gr38" draw:text-style-name="P13" draw:layer="layout" svg:width="0.022cm" svg:height="0.001cm" svg:x="12.325cm" svg:y="14.415cm">
            <text:p/>
            <draw:enhanced-geometry svg:viewBox="0 0 44 6" draw:mirror-horizontal="false" draw:mirror-vertical="false" draw:type="non-primitive" draw:enhanced-path="M 0 2 L 1 2 3 1 4 1 6 1 7 0 9 0 10 0 12 0 20 1 24 1 28 2 32 2 36 3 40 4 43 5 33 5 22 4 11 3 0 2 N"/>
          </draw:custom-shape>
          <draw:custom-shape draw:style-name="gr47" draw:text-style-name="P13" draw:layer="layout" svg:width="0.075cm" svg:height="0.46cm" svg:x="12.409cm" svg:y="14.417cm">
            <text:p/>
            <draw:enhanced-geometry svg:viewBox="0 0 134 765" draw:mirror-horizontal="false" draw:mirror-vertical="false" draw:type="non-primitive" draw:enhanced-path="M 2 0 L 123 14 124 15 126 16 127 17 128 18 130 20 131 21 132 22 133 24 133 744 128 749 122 754 117 759 111 764 110 761 110 758 109 755 109 752 109 750 109 747 110 744 110 742 111 740 112 737 113 735 115 733 116 731 118 729 120 726 122 725 123 721 124 718 125 715 125 712 125 708 125 705 124 702 123 698 122 698 122 698 121 697 120 697 119 697 119 697 118 697 117 697 117 697 116 697 115 698 115 698 114 699 113 699 113 700 112 700 110 696 111 694 112 692 113 690 115 688 117 686 118 684 120 683 122 681 123 678 124 675 124 671 125 668 125 665 124 662 124 658 123 655 122 655 122 654 121 654 120 654 119 654 119 654 118 654 117 654 117 654 116 654 115 654 115 655 114 655 113 656 113 657 112 657 112 657 112 656 111 655 110 654 110 653 110 653 111 651 112 648 113 646 115 645 117 643 118 641 120 639 122 638 123 634 124 630 125 625 125 621 125 619 124 617 124 615 124 614 123 613 123 612 122 612 122 611 122 611 121 611 121 610 120 610 120 610 119 610 119 610 118 610 118 611 117 611 115 612 114 613 113 614 111 616 111 615 110 613 110 612 110 611 110 609 110 608 111 606 111 605 113 603 116 601 117 599 119 597 121 595 122 593 123 590 123 588 124 585 124 583 124 581 124 578 124 575 123 573 122 570 121 567 120 567 119 567 119 567 118 567 117 567 117 568 116 568 115 568 115 569 114 569 114 569 113 570 113 571 112 571 112 572 111 573 111 571 110 570 110 569 110 567 110 566 110 565 111 563 111 562 113 560 116 558 117 556 119 554 121 551 122 549 123 547 124 544 124 542 124 540 124 537 124 535 124 532 123 529 122 527 121 524 120 524 120 524 119 524 118 524 118 524 117 524 117 524 116 524 116 524 115 525 115 525 114 525 114 526 113 526 113 527 112 527 112 527 112 526 111 525 110 524 110 523 110 523 111 520 112 518 113 516 115 514 117 513 118 511 120 509 122 507 123 505 124 502 124 499 124 496 125 493 125 490 124 487 124 484 123 483 122 482 121 481 120 481 120 480 119 480 118 480 118 480 117 480 117 480 117 480 116 480 116 480 115 481 115 481 114 482 113 483 112 483 112 485 111 486 110 445 110 404 112 323 113 323 114 322 115 322 116 321 116 321 117 320 118 320 118 319 119 318 120 318 120 317 121 316 121 315 121 314 122 313 122 312 123 308 124 303 125 298 125 294 125 289 124 285 123 280 122 275 121 275 120 274 120 274 119 274 118 274 117 274 117 274 116 274 115 274 115 274 114 274 113 275 113 275 112 276 112 277 111 277 110 267 113 251 117 236 119 220 122 204 124 194 125 184 125 174 125 164 124 155 123 145 120 135 117 126 115 98 115 97 115 97 114 97 114 96 114 96 113 96 113 96 112 95 108 63 106 60 105 57 104 54 102 51 100 48 98 46 96 44 94 42 92 40 89 38 86 37 84 35 81 34 78 33 74 32 71 31 72 30 74 29 75 28 76 27 76 26 77 25 77 25 77 24 77 24 77 23 77 23 77 22 77 22 77 22 77 21 76 21 76 20 75 19 74 18 72 17 71 16 68 16 66 15 64 15 61 15 59 15 56 15 54 16 51 16 49 18 47 20 45 21 43 23 40 24 38 26 36 27 33 28 32 28 30 28 29 27 27 27 29 26 30 26 30 25 31 24 32 23 32 23 33 22 33 21 33 20 33 19 33 18 33 17 33 16 33 15 32 14 32 13 28 12 25 11 21 11 18 11 14 11 11 11 7 12 4 13 3 13 3 12 2 12 2 12 2 11 2 11 2 11 2 11 2 11 2 11 2 10 2 10 2 10 2 10 2 10 2 9 2 9 2 9 3 8 3 8 4 8 3 7 2 7 2 6 1 6 1 5 1 5 0 5 0 4 0 4 0 4 0 3 0 3 0 3 0 2 0 2 1 1 1 1 2 0 N"/>
          </draw:custom-shape>
          <draw:custom-shape draw:style-name="gr48" draw:text-style-name="P13" draw:layer="layout" svg:width="0.586cm" svg:height="0.073cm" svg:x="11.85cm" svg:y="14.385cm">
            <text:p/>
            <draw:enhanced-geometry svg:viewBox="0 0 975 129" draw:mirror-horizontal="false" draw:mirror-vertical="false" draw:type="non-primitive" draw:enhanced-path="M 4 0 L 959 116 961 116 963 117 965 118 967 119 969 120 971 121 972 122 974 123 972 128 969 126 965 125 962 123 958 122 955 122 951 121 947 121 944 121 0 4 1 3 2 2 3 1 4 0 N"/>
          </draw:custom-shape>
          <draw:custom-shape draw:style-name="gr38" draw:text-style-name="P13" draw:layer="layout" svg:width="0.01cm" svg:height="0.002cm" svg:x="12.388cm" svg:y="14.426cm">
            <text:p/>
            <draw:enhanced-geometry svg:viewBox="0 0 25 12" draw:mirror-horizontal="false" draw:mirror-vertical="false" draw:type="non-primitive" draw:enhanced-path="M 9 0 L 15 0 18 0 20 1 21 1 22 1 22 2 23 2 23 2 23 2 23 2 24 3 24 3 24 3 24 3 23 3 23 4 23 4 23 5 22 5 21 6 19 7 17 8 11 11 9 11 8 11 7 10 5 10 4 9 3 9 1 8 0 8 2 5 4 3 5 3 6 2 8 1 9 0 N"/>
          </draw:custom-shape>
          <draw:custom-shape draw:style-name="gr38" draw:text-style-name="P13" draw:layer="layout" svg:width="0.011cm" svg:height="0.003cm" svg:x="12.411cm" svg:y="14.428cm">
            <text:p/>
            <draw:enhanced-geometry svg:viewBox="0 0 26 12" draw:mirror-horizontal="false" draw:mirror-vertical="false" draw:type="non-primitive" draw:enhanced-path="M 13 0 L 18 0 20 0 21 1 23 1 23 1 24 1 24 2 24 2 24 2 25 2 25 3 25 3 25 3 25 4 24 4 24 5 23 5 22 6 21 7 17 10 10 11 7 11 5 11 3 11 2 11 1 11 1 10 0 10 0 10 0 10 0 10 0 10 0 10 0 9 0 9 0 9 0 8 1 8 1 7 3 6 5 5 7 3 13 0 N"/>
          </draw:custom-shape>
          <draw:custom-shape draw:style-name="gr38" draw:text-style-name="P13" draw:layer="layout" svg:width="0.011cm" svg:height="0.003cm" svg:x="12.438cm" svg:y="14.431cm">
            <text:p/>
            <draw:enhanced-geometry svg:viewBox="0 0 25 12" draw:mirror-horizontal="false" draw:mirror-vertical="false" draw:type="non-primitive" draw:enhanced-path="M 6 0 L 9 0 11 0 13 0 15 0 17 1 20 1 22 2 24 2 23 4 22 6 20 7 19 8 18 9 16 10 15 11 14 11 12 11 10 11 9 11 7 11 5 10 4 10 2 9 0 8 1 7 2 6 3 5 4 4 4 3 5 2 6 1 6 0 N"/>
          </draw:custom-shape>
          <draw:custom-shape draw:style-name="gr49" draw:text-style-name="P13" draw:layer="layout" svg:width="0.002cm" svg:height="0.336cm" svg:x="11.823cm" svg:y="14.445cm">
            <text:p/>
            <draw:enhanced-geometry svg:viewBox="0 0 12 561" draw:mirror-horizontal="false" draw:mirror-vertical="false" draw:type="non-primitive" draw:enhanced-path="M 0 0 L 2 0 3 0 3 0 4 0 4 0 5 0 5 0 5 1 5 1 5 1 5 1 5 1 5 1 6 2 6 2 5 2 5 2 5 3 5 3 5 4 4 5 6 556 7 556 7 556 7 556 7 557 7 557 8 557 8 558 9 558 10 558 10 559 11 559 10 559 8 559 7 560 6 560 4 560 3 560 1 560 0 560 0 0 N"/>
          </draw:custom-shape>
          <draw:custom-shape draw:style-name="gr50" draw:text-style-name="P13" draw:layer="layout" svg:width="0.565cm" svg:height="0.401cm" svg:x="11.825cm" svg:y="14.447cm">
            <text:p/>
            <draw:enhanced-geometry svg:viewBox="0 0 940 667" draw:mirror-horizontal="false" draw:mirror-vertical="false" draw:type="non-primitive" draw:enhanced-path="M 0 0 L 889 108 900 110 910 111 920 112 931 113 931 113 932 113 932 114 933 114 933 114 934 114 934 115 935 115 935 115 936 115 937 115 938 115 939 115 939 666 2 551 0 0 N"/>
          </draw:custom-shape>
          <draw:custom-shape draw:style-name="gr51" draw:text-style-name="P13" draw:layer="layout" svg:width="0.024cm" svg:height="0.481cm" svg:x="12.42cm" svg:y="14.458cm">
            <text:p/>
            <draw:enhanced-geometry svg:viewBox="0 0 48 796" draw:mirror-horizontal="false" draw:mirror-vertical="false" draw:type="non-primitive" draw:enhanced-path="M 0 2 L 0 2 0 2 0 1 1 1 1 1 1 1 1 0 2 0 2 0 2 0 2 0 3 0 3 0 4 0 4 0 4 0 8 0 12 0 15 0 19 1 22 2 26 3 29 5 33 7 35 8 37 10 39 12 41 14 42 17 44 19 45 21 47 24 47 779 45 782 43 784 41 786 39 788 37 790 34 792 32 793 30 794 27 794 24 795 22 795 19 795 16 795 13 794 10 793 6 792 8 791 10 790 11 789 13 788 15 787 16 787 18 787 19 787 20 786 22 786 23 785 24 784 25 783 26 782 27 781 28 780 28 779 29 777 30 776 30 774 31 24 31 22 30 20 29 18 27 16 26 14 25 13 23 11 22 10 20 9 19 8 17 7 15 6 13 6 11 5 9 5 6 4 6 4 6 4 6 3 5 3 5 3 4 3 4 3 4 2 3 2 3 2 2 2 2 2 1 2 1 2 0 2 N"/>
          </draw:custom-shape>
          <draw:custom-shape draw:style-name="gr52" draw:text-style-name="P13" draw:layer="layout" svg:width="0.013cm" svg:height="0.465cm" svg:x="12.42cm" svg:y="14.461cm">
            <text:p/>
            <draw:enhanced-geometry svg:viewBox="0 0 32 771" draw:mirror-horizontal="false" draw:mirror-vertical="false" draw:type="non-primitive" draw:enhanced-path="M 6 0 L 8 1 10 1 12 1 14 2 16 3 18 4 19 5 21 6 23 7 24 9 25 10 27 12 28 14 29 16 30 18 31 20 29 770 29 770 29 770 28 770 28 770 28 769 27 769 27 769 27 769 26 768 26 768 26 768 26 768 25 767 25 766 24 20 23 18 22 16 21 15 20 13 19 12 18 11 16 10 15 9 14 8 12 7 10 6 9 6 7 5 5 5 3 5 1 5 1 4 0 3 0 3 0 2 0 2 0 2 0 2 0 1 0 1 0 1 0 1 0 1 1 1 1 0 1 0 1 0 2 0 2 0 3 0 4 0 5 0 6 0 N"/>
          </draw:custom-shape>
          <draw:custom-shape draw:style-name="gr53" draw:text-style-name="P13" draw:layer="layout" svg:width="0.538cm" svg:height="0.064cm" svg:x="11.823cm" svg:y="14.445cm">
            <text:p/>
            <draw:enhanced-geometry svg:viewBox="0 0 897 116" draw:mirror-horizontal="false" draw:mirror-vertical="false" draw:type="non-primitive" draw:enhanced-path="M 0 2 L 1 2 2 1 3 1 3 1 4 0 5 0 7 0 8 0 896 111 893 111 892 111 892 111 891 111 890 111 890 111 890 111 890 111 890 111 890 111 890 112 890 112 890 112 890 112 890 112 890 112 890 112 890 113 891 113 892 114 894 115 4 6 5 6 5 5 5 5 5 4 5 4 6 4 6 3 5 3 5 3 5 3 5 3 5 3 5 2 5 2 5 2 4 2 4 2 3 2 3 2 2 2 0 2 N"/>
          </draw:custom-shape>
          <draw:custom-shape draw:style-name="gr38" draw:text-style-name="P13" draw:layer="layout" svg:width="0.001cm" svg:height="0.054cm" svg:x="12.476cm" svg:y="14.495cm">
            <text:p/>
            <draw:enhanced-geometry svg:viewBox="0 0 9 96" draw:mirror-horizontal="false" draw:mirror-vertical="false" draw:type="non-primitive" draw:enhanced-path="M 0 0 L 1 0 1 1 2 1 2 2 3 2 3 2 3 3 4 4 4 4 4 5 5 5 5 6 5 7 5 7 5 8 6 9 7 20 8 31 8 41 8 52 7 63 6 74 4 85 1 95 0 0 N"/>
          </draw:custom-shape>
          <draw:custom-shape draw:style-name="gr54" draw:text-style-name="P13" draw:layer="layout" svg:width="0.033cm" svg:height="0.33cm" svg:x="12.363cm" svg:y="14.512cm">
            <text:p/>
            <draw:enhanced-geometry svg:viewBox="0 0 61 552" draw:mirror-horizontal="false" draw:mirror-vertical="false" draw:type="non-primitive" draw:enhanced-path="M 6 0 L 20 1 34 2 47 4 60 6 59 549 59 549 59 550 58 550 58 550 58 550 58 550 58 550 57 551 57 551 57 551 57 551 56 551 56 551 56 9 45 9 35 8 25 7 14 6 4 4 2 3 1 3 1 2 0 2 0 2 0 1 0 1 0 1 0 1 0 1 0 1 0 1 0 1 0 1 0 1 1 0 1 0 2 0 3 0 4 0 6 0 N"/>
          </draw:custom-shape>
          <draw:custom-shape draw:style-name="gr55" draw:text-style-name="P13" draw:layer="layout" svg:width="0.003cm" svg:height="0.333cm" svg:x="12.39cm" svg:y="14.517cm">
            <text:p/>
            <draw:enhanced-geometry svg:viewBox="0 0 12 554" draw:mirror-horizontal="false" draw:mirror-vertical="false" draw:type="non-primitive" draw:enhanced-path="M 0 0 L 11 0 11 542 11 544 11 545 11 547 11 548 10 549 10 551 9 552 9 553 9 2 7 2 6 2 5 2 4 2 4 2 3 2 3 2 2 1 2 1 1 1 1 1 0 0 N"/>
          </draw:custom-shape>
          <draw:custom-shape draw:style-name="gr38" draw:text-style-name="P13" draw:layer="layout" svg:width="0.001cm" svg:height="0.018cm" svg:x="12.479cm" svg:y="14.59cm">
            <text:p/>
            <draw:enhanced-geometry svg:viewBox="0 0 9 38" draw:mirror-horizontal="false" draw:mirror-vertical="false" draw:type="non-primitive" draw:enhanced-path="M 6 0 L 7 5 8 9 8 14 8 19 7 23 6 28 5 32 3 37 2 35 1 32 1 30 0 28 0 25 0 23 0 21 0 18 0 16 1 14 1 11 2 9 3 7 4 5 6 0 N"/>
          </draw:custom-shape>
          <draw:custom-shape draw:style-name="gr38" draw:text-style-name="P13" draw:layer="layout" svg:width="0.001cm" svg:height="0.008cm" svg:x="12.476cm" svg:y="14.716cm">
            <text:p/>
            <draw:enhanced-geometry svg:viewBox="0 0 9 23" draw:mirror-horizontal="false" draw:mirror-vertical="false" draw:type="non-primitive" draw:enhanced-path="M 6 0 L 7 2 8 3 8 5 8 6 8 7 8 9 8 10 8 12 8 13 7 14 6 16 6 17 5 18 3 19 2 20 1 22 1 20 0 18 0 17 0 15 0 14 0 13 0 11 1 10 1 8 1 7 2 6 3 5 3 3 4 2 5 1 6 0 N"/>
          </draw:custom-shape>
          <draw:custom-shape draw:style-name="gr38" draw:text-style-name="P13" draw:layer="layout" svg:width="0.001cm" svg:height="0.008cm" svg:x="12.476cm" svg:y="14.743cm">
            <text:p/>
            <draw:enhanced-geometry svg:viewBox="0 0 9 23" draw:mirror-horizontal="false" draw:mirror-vertical="false" draw:type="non-primitive" draw:enhanced-path="M 6 0 L 7 2 7 3 8 5 8 6 8 7 8 9 8 10 8 12 7 13 7 14 6 16 5 17 5 18 3 19 2 21 1 22 1 20 0 19 0 17 0 16 0 14 0 13 0 11 1 10 1 9 1 7 2 6 3 5 3 4 4 2 5 1 6 0 N"/>
          </draw:custom-shape>
          <draw:custom-shape draw:style-name="gr38" draw:text-style-name="P13" draw:layer="layout" svg:width="0.001cm" svg:height="0.008cm" svg:x="12.476cm" svg:y="14.77cm">
            <text:p/>
            <draw:enhanced-geometry svg:viewBox="0 0 9 23" draw:mirror-horizontal="false" draw:mirror-vertical="false" draw:type="non-primitive" draw:enhanced-path="M 6 0 L 7 2 7 3 8 5 8 6 8 7 8 9 8 10 8 12 7 13 7 14 6 15 5 17 4 18 3 19 2 20 1 22 1 20 0 19 0 17 0 16 0 14 0 13 0 11 1 10 1 9 1 7 2 6 3 5 3 4 4 2 5 1 6 0 N"/>
          </draw:custom-shape>
          <draw:custom-shape draw:style-name="gr38" draw:text-style-name="P13" draw:layer="layout" svg:width="0.001cm" svg:height="0.008cm" svg:x="12.476cm" svg:y="14.797cm">
            <text:p/>
            <draw:enhanced-geometry svg:viewBox="0 0 9 23" draw:mirror-horizontal="false" draw:mirror-vertical="false" draw:type="non-primitive" draw:enhanced-path="M 6 0 L 7 2 8 3 8 5 8 6 8 7 8 9 8 10 8 12 8 13 7 14 6 16 6 17 5 18 4 19 2 20 1 22 1 20 0 18 0 17 0 15 0 14 0 13 0 11 1 10 1 8 1 7 2 6 3 5 3 3 4 2 5 1 6 0 N"/>
          </draw:custom-shape>
          <draw:custom-shape draw:style-name="gr38" draw:text-style-name="P13" draw:layer="layout" svg:width="0.001cm" svg:height="0.008cm" svg:x="12.476cm" svg:y="14.821cm">
            <text:p/>
            <draw:enhanced-geometry svg:viewBox="0 0 9 23" draw:mirror-horizontal="false" draw:mirror-vertical="false" draw:type="non-primitive" draw:enhanced-path="M 6 0 L 7 2 8 3 8 5 8 6 8 8 8 9 8 10 8 12 8 13 7 14 6 16 6 17 5 18 4 19 2 21 1 22 1 20 0 19 0 17 0 16 0 14 0 13 0 11 1 10 1 9 1 7 2 6 3 5 3 4 4 2 5 1 6 0 N"/>
          </draw:custom-shape>
          <draw:custom-shape draw:style-name="gr56" draw:text-style-name="P13" draw:layer="layout" svg:width="0.573cm" svg:height="0.336cm" svg:x="11.823cm" svg:y="14.514cm">
            <text:p/>
            <draw:enhanced-geometry svg:viewBox="0 0 951 562" draw:mirror-horizontal="false" draw:mirror-vertical="false" draw:type="non-primitive" draw:enhanced-path="M 950 0 L 950 561 0 445 1 445 3 445 4 445 6 445 7 445 8 444 10 444 11 444 10 443 10 443 9 443 8 442 8 442 7 442 7 441 7 441 7 441 7 441 6 440 944 555 944 554 945 553 945 552 946 550 946 549 946 548 946 546 946 544 946 544 946 544 947 544 947 544 947 544 947 544 947 544 948 544 948 544 948 543 948 543 949 543 949 542 950 0 N"/>
          </draw:custom-shape>
          <draw:custom-shape draw:style-name="gr38" draw:text-style-name="P13" draw:layer="layout" svg:width="0.001cm" svg:height="0.008cm" svg:x="12.476cm" svg:y="14.848cm">
            <text:p/>
            <draw:enhanced-geometry svg:viewBox="0 0 9 23" draw:mirror-horizontal="false" draw:mirror-vertical="false" draw:type="non-primitive" draw:enhanced-path="M 6 0 L 7 2 7 3 8 5 8 6 8 7 8 9 8 10 8 12 7 13 7 14 6 15 5 17 4 18 3 19 2 20 1 22 1 19 0 17 0 15 0 13 0 11 0 9 1 6 1 4 2 4 3 3 3 3 4 2 5 2 5 1 6 1 6 0 N"/>
          </draw:custom-shape>
          <draw:custom-shape draw:style-name="gr57" draw:text-style-name="P13" draw:layer="layout" svg:width="0.675cm" svg:height="0.554cm" svg:x="11.758cm" svg:y="14.38cm">
            <text:p/>
            <draw:enhanced-geometry svg:viewBox="0 0 1121 918" draw:mirror-horizontal="false" draw:mirror-vertical="false" draw:type="non-primitive" draw:enhanced-path="M 34 1 L 34 4 33 4 33 4 32 5 32 5 31 5 31 5 30 5 30 6 29 6 29 6 27 6 26 6 25 6 23 6 22 6 21 6 19 7 18 7 17 7 16 8 14 9 13 9 12 10 11 11 10 12 9 13 8 14 7 15 6 17 6 765 8 767 9 769 10 771 12 773 13 774 15 776 17 778 18 779 1099 912 1100 912 1102 912 1103 911 1105 911 1106 910 1107 910 1108 909 1109 908 1110 907 1111 907 1112 906 1113 904 1114 903 1115 902 1115 901 1116 900 1116 900 1117 901 1117 901 1117 902 1117 902 1118 902 1118 902 1118 903 1119 903 1119 903 1119 903 1120 903 1120 904 1120 904 1120 905 1119 907 1119 908 1118 909 1117 910 1116 912 1115 913 1114 913 1113 914 1112 915 1110 915 1109 916 1108 916 1106 917 1105 917 1103 917 1042 912 1033 912 1025 911 1020 911 1016 910 1012 909 1008 908 986 904 963 901 941 899 919 897 897 893 875 890 852 888 830 887 827 887 825 887 823 887 821 886 819 886 816 886 814 885 812 884 790 880 768 877 746 875 723 873 27 787 25 786 22 786 20 785 18 785 16 784 14 783 12 782 10 780 8 779 7 777 5 776 4 774 3 772 2 770 1 767 0 765 0 21 1 18 2 15 3 12 5 10 6 8 8 6 10 4 12 3 14 2 16 1 19 0 21 0 24 0 27 0 30 1 34 1 N"/>
          </draw:custom-shape>
          <draw:custom-shape draw:style-name="gr38" draw:text-style-name="P13" draw:layer="layout" svg:width="0.42cm" svg:height="0.048cm" svg:x="11.774cm" svg:y="14.859cm">
            <text:p/>
            <draw:enhanced-geometry svg:viewBox="0 0 699 88" draw:mirror-horizontal="false" draw:mirror-vertical="false" draw:type="non-primitive" draw:enhanced-path="M 2 0 L 698 87 0 2 0 2 0 2 1 2 1 2 1 2 1 2 1 2 2 2 2 1 2 1 2 1 2 1 2 1 2 0 N"/>
          </draw:custom-shape>
          <draw:custom-shape draw:style-name="gr38" draw:text-style-name="P13" draw:layer="layout" svg:width="0.048cm" svg:height="0.002cm" svg:x="12.197cm" svg:y="14.913cm">
            <text:p/>
            <draw:enhanced-geometry svg:viewBox="0 0 90 12" draw:mirror-horizontal="false" draw:mirror-vertical="false" draw:type="non-primitive" draw:enhanced-path="M 0 0 L 22 1 45 4 67 7 89 11 66 9 44 7 22 4 0 0 N"/>
          </draw:custom-shape>
          <draw:custom-shape draw:style-name="gr38" draw:text-style-name="P13" draw:layer="layout" svg:width="0.049cm" svg:height="0.003cm" svg:x="12.261cm" svg:y="14.92cm">
            <text:p/>
            <draw:enhanced-geometry svg:viewBox="0 0 90 12" draw:mirror-horizontal="false" draw:mirror-vertical="false" draw:type="non-primitive" draw:enhanced-path="M 0 0 L 22 1 45 4 67 7 89 11 66 9 44 7 22 4 0 0 N"/>
          </draw:custom-shape>
          <draw:custom-shape draw:style-name="gr38" draw:text-style-name="P13" draw:layer="layout" svg:width="0.048cm" svg:height="0.002cm" svg:x="12.315cm" svg:y="14.926cm">
            <text:p/>
            <draw:enhanced-geometry svg:viewBox="0 0 90 12" draw:mirror-horizontal="false" draw:mirror-vertical="false" draw:type="non-primitive" draw:enhanced-path="M 0 0 L 22 1 45 4 67 7 89 11 66 9 44 7 22 4 0 0 N"/>
          </draw:custom-shape>
          <draw:custom-shape draw:style-name="gr38" draw:text-style-name="P13" draw:layer="layout" svg:width="0.032cm" svg:height="0.001cm" svg:x="12.39cm" svg:y="14.936cm">
            <text:p/>
            <draw:enhanced-geometry svg:viewBox="0 0 62 10" draw:mirror-horizontal="false" draw:mirror-vertical="false" draw:type="non-primitive" draw:enhanced-path="M 0 0 L 61 4 59 5 57 7 56 8 54 9 40 7 27 5 13 3 0 0 N"/>
          </draw:custom-shape>
        </draw:g>
        <draw:custom-shape draw:style-name="gr58" draw:text-style-name="P7" draw:layer="layout" svg:width="7cm" svg:height="2.75cm" svg:x="11.5cm" svg:y="14cm">
          <text:p/>
          <draw:enhanced-geometry svg:viewBox="0 0 21600 21600" draw:type="rectangle" draw:enhanced-path="M 0 0 L 21600 0 21600 21600 0 21600 0 0 Z N"/>
        </draw:custom-shape>
        <draw:frame draw:style-name="gr59" draw:text-style-name="P14" draw:layer="layout" svg:width="5.976cm" svg:height="0.725cm" svg:x="11.5cm" svg:y="15.85cm">
          <draw:text-box>
            <text:p><text:span text:style-name="T1">Внешние источники данных</text:span></text:p>
          </draw:text-box>
        </draw:frame>
        <draw:line draw:style-name="gr60" draw:text-style-name="P15" draw:layer="layout" svg:x1="5cm" svg:y1="4cm" svg:x2="8.25cm" svg:y2="5cm">
          <text:p/>
        </draw:line>
        <draw:line draw:style-name="gr60" draw:text-style-name="P15" draw:layer="layout" svg:x1="5cm" svg:y1="5.5cm" svg:x2="8.25cm" svg:y2="5.25cm">
          <text:p/>
        </draw:line>
        <draw:line draw:style-name="gr60" draw:text-style-name="P15" draw:layer="layout" svg:x1="5cm" svg:y1="7.25cm" svg:x2="8.25cm" svg:y2="5.75cm">
          <text:p/>
        </draw:line>
        <draw:line draw:style-name="gr60" draw:text-style-name="P15" draw:layer="layout" svg:x1="5cm" svg:y1="9cm" svg:x2="8.25cm" svg:y2="6.5cm">
          <text:p/>
        </draw:line>
        <draw:line draw:style-name="gr60" draw:text-style-name="P15" draw:layer="layout" svg:x1="4.75cm" svg:y1="11cm" svg:x2="4.5cm" svg:y2="10cm">
          <text:p/>
        </draw:line>
        <draw:line draw:style-name="gr60" draw:text-style-name="P15" draw:layer="layout" svg:x1="6.5cm" svg:y1="11cm" svg:x2="8.75cm" svg:y2="7.5cm">
          <text:p/>
        </draw:line>
        <draw:line draw:style-name="gr60" draw:text-style-name="P15" draw:layer="layout" svg:x1="10cm" svg:y1="11cm" svg:x2="10.25cm" svg:y2="7.5cm">
          <text:p/>
        </draw:line>
        <draw:line draw:style-name="gr60" draw:text-style-name="P15" draw:layer="layout" svg:x1="13.5cm" svg:y1="11.5cm" svg:x2="11cm" svg:y2="11.5cm">
          <text:p/>
        </draw:line>
        <draw:line draw:style-name="gr60" draw:text-style-name="P15" draw:layer="layout" svg:x1="6.5cm" svg:y1="14cm" svg:x2="6.5cm" svg:y2="12.5cm">
          <text:p/>
        </draw:line>
        <draw:line draw:style-name="gr60" draw:text-style-name="P15" draw:layer="layout" svg:x1="9.5cm" svg:y1="14cm" svg:x2="9.5cm" svg:y2="12.5cm">
          <text:p/>
        </draw:line>
        <draw:line draw:style-name="gr60" draw:text-style-name="P15" draw:layer="layout" svg:x1="15cm" svg:y1="14cm" svg:x2="15cm" svg:y2="12.5cm">
          <text:p/>
        </draw:line>
        <draw:line draw:style-name="gr60" draw:text-style-name="P15" draw:layer="layout" svg:x1="3.75cm" svg:y1="14cm" svg:x2="5.25cm" svg:y2="12.5cm">
          <text:p/>
        </draw:line>
        <draw:custom-shape draw:style-name="gr61" draw:text-style-name="P1" draw:layer="layout" svg:width="2.25cm" svg:height="1cm" svg:x="1.5cm" svg:y="18.3cm">
          <text:p/>
          <draw:enhanced-geometry svg:viewBox="0 0 21600 21600" draw:type="rectangle" draw:enhanced-path="M 0 0 L 21600 0 21600 21600 0 21600 0 0 Z N"/>
        </draw:custom-shape>
        <draw:custom-shape draw:style-name="gr62" draw:text-style-name="P5" draw:layer="layout" svg:width="2.25cm" svg:height="1cm" svg:x="1.5cm" svg:y="19.55cm">
          <text:p/>
          <draw:enhanced-geometry svg:viewBox="0 0 21600 21600" draw:type="rectangle" draw:enhanced-path="M 0 0 L 21600 0 21600 21600 0 21600 0 0 Z N"/>
        </draw:custom-shape>
        <draw:custom-shape draw:style-name="gr63" draw:text-style-name="P6" draw:layer="layout" svg:width="2.25cm" svg:height="1cm" svg:x="1.5cm" svg:y="20.8cm">
          <text:p/>
          <draw:enhanced-geometry svg:viewBox="0 0 21600 21600" draw:type="rectangle" draw:enhanced-path="M 0 0 L 21600 0 21600 21600 0 21600 0 0 Z N"/>
        </draw:custom-shape>
        <draw:frame draw:style-name="gr64" draw:text-style-name="P14" draw:layer="layout" svg:width="10.311cm" svg:height="0.725cm" svg:x="4.274cm" svg:y="18.275cm">
          <draw:text-box>
            <text:p><text:span text:style-name="T1">Компоненты, входящие в поставку МПК Пересвет</text:span></text:p>
          </draw:text-box>
        </draw:frame>
        <draw:frame draw:style-name="gr65" draw:text-style-name="P14" draw:layer="layout" svg:width="5.413cm" svg:height="0.725cm" svg:x="4.25cm" svg:y="19.525cm">
          <draw:text-box>
            <text:p><text:span text:style-name="T1">Собственная разработка</text:span></text:p>
          </draw:text-box>
        </draw:frame>
        <draw:frame draw:style-name="gr66" draw:text-style-name="P14" draw:layer="layout" svg:width="8.85cm" svg:height="0.725cm" svg:x="4.251cm" svg:y="20.826cm">
          <draw:text-box>
            <text:p><text:span text:style-name="T1">Свободно распространяемые компоненты</text:span></text:p>
          </draw:text-box>
        </draw:frame>
        <draw:frame draw:style-name="gr67" draw:text-style-name="P15" draw:layer="layout" svg:width="0.774cm" svg:height="0.774cm" svg:x="11.976cm" svg:y="4.25cm">
          <draw:image xlink:href="Pictures/10002C2E00003942000039423A687464.svg" xlink:type="simple" xlink:show="embed" xlink:actuate="onLoad" draw:mime-type="image/svg+xml">
            <text:p/>
          </draw:image>
          <draw:image xlink:href="Pictures/100000010000022A0000022A2A21BA2D.png" xlink:type="simple" xlink:show="embed" xlink:actuate="onLoad" draw:mime-type="image/png"/>
        </draw:frame>
        <draw:frame draw:style-name="gr67" draw:text-style-name="P15" draw:layer="layout" svg:width="0.774cm" svg:height="0.774cm" svg:x="16.25cm" svg:y="10.726cm">
          <draw:image xlink:href="Pictures/10002C2E00003942000039423A687464.svg" xlink:type="simple" xlink:show="embed" xlink:actuate="onLoad" draw:mime-type="image/svg+xml">
            <text:p/>
          </draw:image>
          <draw:image xlink:href="Pictures/100000010000022A0000022A2A21BA2D.png" xlink:type="simple" xlink:show="embed" xlink:actuate="onLoad" draw:mime-type="image/png"/>
        </draw:frame>
        <draw:frame draw:style-name="gr67" draw:text-style-name="P15" draw:layer="layout" svg:width="0.5cm" svg:height="0.5cm" svg:x="3cm" svg:y="19.75cm">
          <draw:image xlink:href="Pictures/10002C2E00003942000039423A687464.svg" xlink:type="simple" xlink:show="embed" xlink:actuate="onLoad" draw:mime-type="image/svg+xml">
            <text:p/>
          </draw:image>
          <draw:image xlink:href="Pictures/100000010000022A0000022A2A21BA2D.png" xlink:type="simple" xlink:show="embed" xlink:actuate="onLoad" draw:mime-type="image/png"/>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Заливка"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Заливка_20_жёлтым" draw:display-name="Заливка жёлтым"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Заливка_20_зелёным" draw:display-name="Заливка зелёным"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Заливка_20_красным" draw:display-name="Заливка красным"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Заливка_20_синим" draw:display-name="Заливка синим"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Фигуры"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20" svg:d="M0 20l10-20 10 20z"/>
    <draw:stroke-dash draw:name="Dashed_20__28_var_29__20_2" draw:display-name="Dashed (var) 2"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ru" fo:country="RU"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3T11:51:26.540927449</meta:creation-date>
    <dc:date>2025-11-23T17:29:08.077743452</dc:date>
    <meta:editing-duration>PT4H50M56S</meta:editing-duration>
    <meta:editing-cycles>6</meta:editing-cycles>
    <meta:generator>LibreOffice/24.2.7.2$Linux_X86_64 LibreOffice_project/420$Build-2</meta:generator>
    <meta:document-statistic meta:object-count="184"/>
  </office:meta>
</office:document-meta>
</file>