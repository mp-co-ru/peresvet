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B0000032AA012B6F9.png" manifest:media-type="image/png"/>
  <manifest:file-entry manifest:full-path="Pictures/10000000000004EB0000032A774B967B.png" manifest:media-type="image/png"/>
  <manifest:file-entry manifest:full-path="Pictures/10000000000004EB0000032AE9C359C5.png" manifest:media-type="image/png"/>
  <manifest:file-entry manifest:full-path="Pictures/10000000000004EB0000032A256AE779.png" manifest:media-type="image/png"/>
  <manifest:file-entry manifest:full-path="Pictures/10000000000004EB0000032A7C86FF37.png" manifest:media-type="image/png"/>
  <manifest:file-entry manifest:full-path="Pictures/10000000000004EB0000032A08D804A9.png" manifest:media-type="image/png"/>
  <manifest:file-entry manifest:full-path="Pictures/10000000000004EB0000032ACDB67129.png" manifest:media-type="image/png"/>
  <manifest:file-entry manifest:full-path="Pictures/10000000000004EB0000032AFDB7B031.png" manifest:media-type="image/png"/>
  <manifest:file-entry manifest:full-path="Pictures/10000000000004EB0000032AF1E84203.png" manifest:media-type="image/png"/>
  <manifest:file-entry manifest:full-path="Pictures/1000000000000424000002FF4FDDC8D4.png" manifest:media-type="image/png"/>
  <manifest:file-entry manifest:full-path="Pictures/1000000000000424000002FF6AD6AFFB.png" manifest:media-type="image/png"/>
  <manifest:file-entry manifest:full-path="Pictures/1000000000000424000002FF2DA70302.png" manifest:media-type="image/png"/>
  <manifest:file-entry manifest:full-path="Pictures/10000000000004EB0000032A85E4825F.png" manifest:media-type="image/png"/>
  <manifest:file-entry manifest:full-path="Pictures/20000A1F0000438100004A8958BE8B99.svm" manifest:media-type="image/x-svm"/>
  <manifest:file-entry manifest:full-path="Pictures/1000000100000064000000646E675ECB.png" manifest:media-type="image/png"/>
  <manifest:file-entry manifest:full-path="Pictures/100000010000032D000002AE6256BCE3.png" manifest:media-type="image/png"/>
  <manifest:file-entry manifest:full-path="Pictures/10000001000003D0000002BC46FD0A63.png" manifest:media-type="image/png"/>
  <manifest:file-entry manifest:full-path="Pictures/10000000000004EB0000032AC9C58F19.png" manifest:media-type="image/png"/>
  <manifest:file-entry manifest:full-path="Pictures/100000000000003E000000246E272897.png" manifest:media-type="image/png"/>
  <manifest:file-entry manifest:full-path="Pictures/10000000000004EB0000032A32D27525.png" manifest:media-type="image/png"/>
  <manifest:file-entry manifest:full-path="Pictures/100000010000028E000002D25AE60A1D.png" manifest:media-type="image/png"/>
  <manifest:file-entry manifest:full-path="Pictures/1000000000000424000002FF23181575.png" manifest:media-type="image/png"/>
  <manifest:file-entry manifest:full-path="Pictures/10000001000008DE000004050CB0E5ED.png" manifest:media-type="image/png"/>
  <manifest:file-entry manifest:full-path="Pictures/100000010000074000000490441CDD9A.png" manifest:media-type="image/png"/>
  <manifest:file-entry manifest:full-path="Pictures/1000000000000424000002FF9007728D.png" manifest:media-type="image/png"/>
  <manifest:file-entry manifest:full-path="Pictures/1000000000000424000002FF05ECCE5F.png" manifest:media-type="image/png"/>
  <manifest:file-entry manifest:full-path="Pictures/100000000000004400000024807C1A6E.png" manifest:media-type="image/png"/>
  <manifest:file-entry manifest:full-path="Pictures/100000000000003D0000002439DEC3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Обычный" style:font-family-generic="swiss" style:font-pitch="variable"/>
    <style:font-face style:name="Courier New" svg:font-family="'Courier New'" style:font-family-generic="modern" style:font-pitch="fixed"/>
    <style:font-face style:name="Courier New1" svg:font-family="'Courier New'" style:font-adornments="Обычный" style:font-family-generic="modern" style:font-pitch="fixed"/>
    <style:font-face style:name="CyrillicOld" svg:font-family="CyrillicOld" style:font-adornments="Жирный"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807cm" style:rel-column-width="22384*"/>
    </style:style>
    <style:style style:name="Таблица1.B" style:family="table-column">
      <style:table-column-properties style:column-width="11.194cm" style:rel-column-width="43151*"/>
    </style:style>
    <style:style style:name="Таблица1.A1" style:family="table-cell">
      <style:table-cell-properties fo:background-color="#dddddd" fo:padding="0.097cm" fo:border-left="1.5pt solid #000000" fo:border-right="none" fo:border-top="1.5pt solid #000000" fo:border-bottom="1.5pt solid #000000">
        <style:background-image/>
      </style:table-cell-properties>
    </style:style>
    <style:style style:name="Таблица1.B1" style:family="table-cell">
      <style:table-cell-properties fo:background-color="#dddddd" fo:padding="0.097cm" fo:border-left="0.5pt solid #000000" fo:border-right="1.5pt solid #000000" fo:border-top="1.5pt solid #000000" fo:border-bottom="1.5pt solid #000000">
        <style:background-image/>
      </style:table-cell-properties>
    </style:style>
    <style:style style:name="Таблица1.A2" style:family="table-cell">
      <style:table-cell-properties fo:padding="0.097cm" fo:border-left="1.5pt solid #000000" fo:border-right="none" fo:border-top="none" fo:border-bottom="none"/>
    </style:style>
    <style:style style:name="Таблица1.B2" style:family="table-cell">
      <style:table-cell-properties fo:padding="0.097cm" fo:border-left="0.5pt solid #000000" fo:border-right="1.5pt solid #000000" fo:border-top="none" fo:border-bottom="none"/>
    </style:style>
    <style:style style:name="Таблица1.A3" style:family="table-cell">
      <style:table-cell-properties fo:background-color="#eeeeee" fo:padding="0.097cm" fo:border-left="1.5pt solid #000000" fo:border-right="none" fo:border-top="none" fo:border-bottom="none">
        <style:background-image/>
      </style:table-cell-properties>
    </style:style>
    <style:style style:name="Таблица1.B3" style:family="table-cell">
      <style:table-cell-properties fo:background-color="#eeeeee" fo:padding="0.097cm" fo:border-left="0.5pt solid #000000" fo:border-right="1.5pt solid #000000" fo:border-top="none" fo:border-bottom="none">
        <style:background-image/>
      </style:table-cell-properties>
    </style:style>
    <style:style style:name="Таблица1.A4" style:family="table-cell">
      <style:table-cell-properties fo:padding="0.097cm" fo:border-left="1.5pt solid #000000" fo:border-right="none" fo:border-top="none" fo:border-bottom="none"/>
    </style:style>
    <style:style style:name="Таблица1.B4" style:family="table-cell">
      <style:table-cell-properties fo:padding="0.097cm" fo:border-left="0.5pt solid #000000" fo:border-right="1.5pt solid #000000" fo:border-top="none" fo:border-bottom="none"/>
    </style:style>
    <style:style style:name="Таблица1.A6" style:family="table-cell">
      <style:table-cell-properties fo:padding="0.097cm" fo:border-left="1.5pt solid #000000" fo:border-right="none" fo:border-top="none" fo:border-bottom="none"/>
    </style:style>
    <style:style style:name="Таблица1.B6" style:family="table-cell">
      <style:table-cell-properties fo:padding="0.097cm" fo:border-left="0.5pt solid #000000" fo:border-right="1.5pt solid #000000" fo:border-top="none" fo:border-bottom="none"/>
    </style:style>
    <style:style style:name="Таблица1.A8" style:family="table-cell">
      <style:table-cell-properties fo:background-color="transparent" fo:padding="0.097cm" fo:border-left="1.5pt solid #000000" fo:border-right="none" fo:border-top="none" fo:border-bottom="none">
        <style:background-image/>
      </style:table-cell-properties>
    </style:style>
    <style:style style:name="Таблица1.B8" style:family="table-cell">
      <style:table-cell-properties fo:background-color="transparent" fo:padding="0.097cm" fo:border-left="0.5pt solid #000000" fo:border-right="1.5pt solid #000000" fo:border-top="none" fo:border-bottom="none">
        <style:background-image/>
      </style:table-cell-properties>
    </style:style>
    <style:style style:name="Таблица1.A13" style:family="table-cell">
      <style:table-cell-properties fo:background-color="#eeeeee" fo:padding="0.097cm" fo:border-left="1.5pt solid #000000" fo:border-right="none" fo:border-top="none" fo:border-bottom="1.5pt solid #000000">
        <style:background-image/>
      </style:table-cell-properties>
    </style:style>
    <style:style style:name="Таблица1.B13" style:family="table-cell">
      <style:table-cell-properties fo:background-color="#eeeeee" fo:padding="0.097cm" fo:border-left="0.5pt solid #000000" fo:border-right="1.5pt solid #000000" fo:border-top="none" fo:border-bottom="1.5pt solid #000000">
        <style:background-image/>
      </style:table-cell-properties>
    </style:style>
    <style:style style:name="Таблица2" style:family="table">
      <style:table-properties style:width="17cm" table:align="margins"/>
    </style:style>
    <style:style style:name="Таблица2.A" style:family="table-column">
      <style:table-column-properties style:column-width="1cm" style:rel-column-width="3855*"/>
    </style:style>
    <style:style style:name="Таблица2.B" style:family="table-column">
      <style:table-column-properties style:column-width="2.91cm" style:rel-column-width="11219*"/>
    </style:style>
    <style:style style:name="Таблица2.C" style:family="table-column">
      <style:table-column-properties style:column-width="13.09cm" style:rel-column-width="50461*"/>
    </style:style>
    <style:style style:name="Таблица2.A1" style:family="table-cell">
      <style:table-cell-properties fo:background-color="#cccccc" fo:padding="0.097cm" fo:border-left="1.5pt solid #000000" fo:border-right="none" fo:border-top="1.5pt solid #000000" fo:border-bottom="1.5pt solid #000000">
        <style:background-image/>
      </style:table-cell-properties>
    </style:style>
    <style:style style:name="Таблица2.B1" style:family="table-cell">
      <style:table-cell-properties fo:background-color="#cccccc" fo:padding="0.097cm" fo:border-left="0.05pt solid #000000" fo:border-right="0.05pt solid #000000" fo:border-top="1.5pt solid #000000" fo:border-bottom="1.5pt solid #000000">
        <style:background-image/>
      </style:table-cell-properties>
    </style:style>
    <style:style style:name="Таблица2.C1" style:family="table-cell">
      <style:table-cell-properties fo:background-color="#cccccc" fo:padding="0.097cm" fo:border-left="none" fo:border-right="1.5pt solid #000000" fo:border-top="1.5pt solid #000000" fo:border-bottom="1.5pt solid #000000">
        <style:background-image/>
      </style:table-cell-properties>
    </style:style>
    <style:style style:name="Таблица2.A2" style:family="table-cell">
      <style:table-cell-properties fo:background-color="transparent" fo:padding="0.097cm" fo:border-left="1.5pt solid #000000" fo:border-right="none" fo:border-top="none" fo:border-bottom="none">
        <style:background-image/>
      </style:table-cell-properties>
    </style:style>
    <style:style style:name="Таблица2.B2" style:family="table-cell">
      <style:table-cell-properties fo:background-color="transparent" fo:padding="0.097cm" fo:border-left="0.05pt solid #000000" fo:border-right="0.05pt solid #000000" fo:border-top="none" fo:border-bottom="none">
        <style:background-image/>
      </style:table-cell-properties>
    </style:style>
    <style:style style:name="Таблица2.C2" style:family="table-cell">
      <style:table-cell-properties fo:background-color="transparent" fo:padding="0.097cm" fo:border-left="none" fo:border-right="1.5pt solid #000000" fo:border-top="none" fo:border-bottom="none">
        <style:background-image/>
      </style:table-cell-properties>
    </style:style>
    <style:style style:name="Таблица2.A3" style:family="table-cell">
      <style:table-cell-properties fo:background-color="#eeeeee" fo:padding="0.097cm" fo:border-left="1.5pt solid #000000" fo:border-right="none" fo:border-top="none" fo:border-bottom="none">
        <style:background-image/>
      </style:table-cell-properties>
    </style:style>
    <style:style style:name="Таблица2.B3" style:family="table-cell">
      <style:table-cell-properties fo:background-color="#eeeeee" fo:padding="0.097cm" fo:border-left="0.05pt solid #000000" fo:border-right="0.05pt solid #000000" fo:border-top="none" fo:border-bottom="none">
        <style:background-image/>
      </style:table-cell-properties>
    </style:style>
    <style:style style:name="Таблица2.C3" style:family="table-cell">
      <style:table-cell-properties fo:background-color="#eeeeee" fo:padding="0.097cm" fo:border-left="none" fo:border-right="1.5pt solid #000000" fo:border-top="none" fo:border-bottom="none">
        <style:background-image/>
      </style:table-cell-properties>
    </style:style>
    <style:style style:name="Таблица2.A9" style:family="table-cell">
      <style:table-cell-properties fo:background-color="#eeeeee" fo:padding="0.097cm" fo:border-left="1.5pt solid #000000" fo:border-right="none" fo:border-top="none" fo:border-bottom="1.5pt solid #000000">
        <style:background-image/>
      </style:table-cell-properties>
    </style:style>
    <style:style style:name="Таблица2.B9" style:family="table-cell">
      <style:table-cell-properties fo:background-color="#eeeeee" fo:padding="0.097cm" fo:border-left="0.05pt solid #000000" fo:border-right="0.05pt solid #000000" fo:border-top="none" fo:border-bottom="1.5pt solid #000000">
        <style:background-image/>
      </style:table-cell-properties>
    </style:style>
    <style:style style:name="Таблица2.C9" style:family="table-cell">
      <style:table-cell-properties fo:background-color="#eeeeee" fo:padding="0.097cm" fo:border-left="none" fo:border-right="1.5pt solid #000000" fo:border-top="none" fo:border-bottom="1.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officeooo:rsid="00214725" officeooo:paragraph-rsid="00214725"/>
    </style:style>
    <style:style style:name="P4" style:family="paragraph" style:parent-style-name="Table_20_Contents">
      <style:text-properties officeooo:rsid="00214725" officeooo:paragraph-rsid="003ecb49"/>
    </style:style>
    <style:style style:name="P5" style:family="paragraph" style:parent-style-name="Table_20_Contents">
      <style:text-properties officeooo:rsid="00214725" officeooo:paragraph-rsid="0040a0b9"/>
    </style:style>
    <style:style style:name="P6" style:family="paragraph" style:parent-style-name="Text_20_body">
      <style:text-properties officeooo:paragraph-rsid="0017002a"/>
    </style:style>
    <style:style style:name="P7" style:family="paragraph" style:parent-style-name="Title">
      <style:text-properties officeooo:paragraph-rsid="0017002a"/>
    </style:style>
    <style:style style:name="P8" style:family="paragraph" style:parent-style-name="Text_20_body">
      <style:paragraph-properties fo:text-align="center" style:justify-single-word="false"/>
      <style:text-properties officeooo:paragraph-rsid="0018c9af"/>
    </style:style>
    <style:style style:name="P9" style:family="paragraph" style:parent-style-name="Drawing">
      <style:paragraph-properties fo:text-align="center" style:justify-single-word="false"/>
    </style:style>
    <style:style style:name="P10" style:family="paragraph" style:parent-style-name="Table_20_Contents">
      <style:text-properties officeooo:paragraph-rsid="003ecb49"/>
    </style:style>
    <style:style style:name="P11" style:family="paragraph" style:parent-style-name="Table_20_Contents">
      <style:text-properties officeooo:paragraph-rsid="0040a0b9"/>
    </style:style>
    <style:style style:name="P12" style:family="paragraph" style:parent-style-name="Text_20_body">
      <style:text-properties officeooo:paragraph-rsid="004c5697"/>
    </style:style>
    <style:style style:name="P13" style:family="paragraph" style:parent-style-name="Table">
      <style:paragraph-properties fo:keep-with-next="always"/>
    </style:style>
    <style:style style:name="P14" style:family="paragraph" style:parent-style-name="Table_20_Contents">
      <style:text-properties officeooo:rsid="00541819" officeooo:paragraph-rsid="00541819"/>
    </style:style>
    <style:style style:name="P15" style:family="paragraph" style:parent-style-name="Text_20_body">
      <style:text-properties officeooo:rsid="004f9f1f" officeooo:paragraph-rsid="004f9f1f"/>
    </style:style>
    <style:style style:name="P16" style:family="paragraph" style:parent-style-name="Text_20_body">
      <style:text-properties officeooo:rsid="00537c3a" officeooo:paragraph-rsid="00537c3a"/>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5.998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ext_20_body">
      <style:text-properties officeooo:paragraph-rsid="00653e9f"/>
    </style:style>
    <style:style style:name="P22" style:family="paragraph" style:parent-style-name="List">
      <style:text-properties officeooo:rsid="007f38f4" officeooo:paragraph-rsid="007f38f4"/>
    </style:style>
    <style:style style:name="P23" style:family="paragraph" style:parent-style-name="Text_20_body">
      <style:text-properties officeooo:rsid="005c325b" officeooo:paragraph-rsid="005c325b"/>
    </style:style>
    <style:style style:name="P24" style:family="paragraph" style:parent-style-name="Text_20_body">
      <style:text-properties officeooo:rsid="005c325b" officeooo:paragraph-rsid="005e6a12"/>
    </style:style>
    <style:style style:name="P25" style:family="paragraph" style:parent-style-name="Text_20_body">
      <style:text-properties officeooo:rsid="005fd043" officeooo:paragraph-rsid="005fd043"/>
    </style:style>
    <style:style style:name="P26" style:family="paragraph" style:parent-style-name="Text_20_body">
      <style:text-properties officeooo:rsid="0062294f" officeooo:paragraph-rsid="0062294f"/>
    </style:style>
    <style:style style:name="P27" style:family="paragraph" style:parent-style-name="Text_20_body">
      <style:text-properties officeooo:rsid="0062294f" officeooo:paragraph-rsid="00640267"/>
    </style:style>
    <style:style style:name="P28" style:family="paragraph" style:parent-style-name="Text_20_body">
      <style:text-properties officeooo:rsid="006d7076" officeooo:paragraph-rsid="006d7076"/>
    </style:style>
    <style:style style:name="P29" style:family="paragraph" style:parent-style-name="Text_20_body">
      <style:text-properties officeooo:rsid="00702f85" officeooo:paragraph-rsid="00702f85"/>
    </style:style>
    <style:style style:name="P30" style:family="paragraph" style:parent-style-name="Text_20_body">
      <style:text-properties officeooo:rsid="00756ef8" officeooo:paragraph-rsid="00756ef8"/>
    </style:style>
    <style:style style:name="P31" style:family="paragraph" style:parent-style-name="Text_20_body">
      <style:text-properties officeooo:rsid="00762920" officeooo:paragraph-rsid="00762920"/>
    </style:style>
    <style:style style:name="P32" style:family="paragraph" style:parent-style-name="Text_20_body">
      <style:text-properties officeooo:rsid="007644ac" officeooo:paragraph-rsid="007644ac"/>
    </style:style>
    <style:style style:name="P33" style:family="paragraph" style:parent-style-name="Text_20_body">
      <style:text-properties officeooo:rsid="00775d98" officeooo:paragraph-rsid="00775d98"/>
    </style:style>
    <style:style style:name="P34" style:family="paragraph" style:parent-style-name="Text_20_body">
      <style:text-properties officeooo:rsid="00798105" officeooo:paragraph-rsid="00798105"/>
    </style:style>
    <style:style style:name="P35" style:family="paragraph" style:parent-style-name="Text_20_body">
      <style:text-properties officeooo:paragraph-rsid="007bb884"/>
    </style:style>
    <style:style style:name="P36" style:family="paragraph" style:parent-style-name="Text_20_body">
      <style:text-properties officeooo:rsid="007bb884" officeooo:paragraph-rsid="007bb884"/>
    </style:style>
    <style:style style:name="P37" style:family="paragraph" style:parent-style-name="Text_20_body">
      <style:text-properties officeooo:rsid="007cfb38" officeooo:paragraph-rsid="007cfb38"/>
    </style:style>
    <style:style style:name="P38" style:family="paragraph" style:parent-style-name="Text_20_body">
      <style:text-properties officeooo:rsid="008096b4" officeooo:paragraph-rsid="008096b4"/>
    </style:style>
    <style:style style:name="P39" style:family="paragraph" style:parent-style-name="Text_20_body">
      <style:text-properties officeooo:paragraph-rsid="00a1d450"/>
    </style:style>
    <style:style style:name="P40" style:family="paragraph" style:parent-style-name="Код">
      <style:text-properties style:font-name="Courier New"/>
    </style:style>
    <style:style style:name="P41" style:family="paragraph" style:parent-style-name="Text_20_body">
      <style:text-properties officeooo:paragraph-rsid="00b04fd2"/>
    </style:style>
    <style:style style:name="P42" style:family="paragraph" style:parent-style-name="Text_20_body">
      <style:text-properties officeooo:rsid="00b1261f" officeooo:paragraph-rsid="00b1261f"/>
    </style:style>
    <style:style style:name="P43" style:family="paragraph" style:parent-style-name="Title" style:master-page-name="First_20_Page">
      <style:paragraph-properties style:page-number="auto"/>
      <style:text-properties style:font-name="CyrillicOld" fo:font-weight="bold" officeooo:paragraph-rsid="0017002a"/>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Heading_20_1">
      <style:paragraph-properties fo:break-before="page"/>
      <style:text-properties officeooo:paragraph-rsid="004c5697"/>
    </style:style>
    <style:style style:name="P49" style:family="paragraph" style:parent-style-name="Heading_20_1">
      <style:text-properties officeooo:paragraph-rsid="00653e9f"/>
    </style:style>
    <style:style style:name="P50" style:family="paragraph" style:parent-style-name="Heading_20_1">
      <style:text-properties officeooo:paragraph-rsid="0079d61b"/>
    </style:style>
    <style:style style:name="P51" style:family="paragraph" style:parent-style-name="Heading_20_2">
      <style:text-properties officeooo:paragraph-rsid="004c5697"/>
    </style:style>
    <style:style style:name="P52" style:family="paragraph" style:parent-style-name="Heading_20_2">
      <style:text-properties officeooo:paragraph-rsid="0079d61b"/>
    </style:style>
    <style:style style:name="P53" style:family="paragraph" style:parent-style-name="Heading_20_3">
      <style:text-properties officeooo:paragraph-rsid="00983673"/>
    </style:style>
    <style:style style:name="P54" style:family="paragraph" style:parent-style-name="List" style:list-style-name="Numbering_20_123">
      <style:text-properties officeooo:paragraph-rsid="004c5697"/>
    </style:style>
    <style:style style:name="P55" style:family="paragraph" style:parent-style-name="List" style:list-style-name="L1">
      <style:text-properties officeooo:paragraph-rsid="004c5697"/>
    </style:style>
    <style:style style:name="P56" style:family="paragraph" style:parent-style-name="List" style:list-style-name="L2"/>
    <style:style style:name="P57" style:family="paragraph" style:parent-style-name="List" style:list-style-name="L3"/>
    <style:style style:name="P58" style:family="paragraph" style:parent-style-name="List" style:list-style-name="L4"/>
    <style:style style:name="P59" style:family="paragraph" style:parent-style-name="List" style:list-style-name="L5"/>
    <style:style style:name="P60" style:family="paragraph" style:parent-style-name="List" style:list-style-name="L6"/>
    <style:style style:name="P61" style:family="paragraph" style:parent-style-name="List" style:list-style-name="L7"/>
    <style:style style:name="P62" style:family="paragraph" style:parent-style-name="List" style:list-style-name="L8"/>
    <style:style style:name="P63" style:family="paragraph" style:parent-style-name="Text_20_body">
      <style:text-properties officeooo:rsid="00b04fd2" officeooo:paragraph-rsid="00b04fd2"/>
    </style:style>
    <style:style style:name="T1" style:family="text">
      <style:text-properties style:font-name="CyrillicOld" fo:font-weight="bold"/>
    </style:style>
    <style:style style:name="T2" style:family="text">
      <style:text-properties officeooo:rsid="0018c9af"/>
    </style:style>
    <style:style style:name="T3" style:family="text">
      <style:text-properties officeooo:rsid="00200fdc"/>
    </style:style>
    <style:style style:name="T4" style:family="text">
      <style:text-properties officeooo:rsid="001d2c31"/>
    </style:style>
    <style:style style:name="T5" style:family="text">
      <style:text-properties officeooo:rsid="004c608f"/>
    </style:style>
    <style:style style:name="T6" style:family="text">
      <style:text-properties officeooo:rsid="004dfbe6"/>
    </style:style>
    <style:style style:name="T7" style:family="text">
      <style:text-properties officeooo:rsid="004f9f1f"/>
    </style:style>
    <style:style style:name="T8" style:family="text">
      <style:text-properties officeooo:rsid="0050364e"/>
    </style:style>
    <style:style style:name="T9" style:family="text">
      <style:text-properties officeooo:rsid="00541819"/>
    </style:style>
    <style:style style:name="T10" style:family="text">
      <style:text-properties officeooo:rsid="005955e2"/>
    </style:style>
    <style:style style:name="T11" style:family="text">
      <style:text-properties officeooo:rsid="005b23a0"/>
    </style:style>
    <style:style style:name="T12" style:family="text">
      <style:text-properties fo:font-weight="bold" style:font-weight-asian="bold" style:font-weight-complex="bold"/>
    </style:style>
    <style:style style:name="T13" style:family="text">
      <style:text-properties fo:font-weight="bold" officeooo:rsid="005955e2" style:font-weight-asian="bold" style:font-weight-complex="bold"/>
    </style:style>
    <style:style style:name="T14" style:family="text">
      <style:text-properties fo:font-weight="bold" officeooo:rsid="005b23a0" style:font-weight-asian="bold" style:font-weight-complex="bold"/>
    </style:style>
    <style:style style:name="T15" style:family="text">
      <style:text-properties officeooo:rsid="005e2624"/>
    </style:style>
    <style:style style:name="T16" style:family="text">
      <style:text-properties officeooo:rsid="005e6a12"/>
    </style:style>
    <style:style style:name="T17" style:family="text">
      <style:text-properties officeooo:rsid="005eff24"/>
    </style:style>
    <style:style style:name="T18" style:family="text">
      <style:text-properties officeooo:rsid="0048d44d"/>
    </style:style>
    <style:style style:name="T19" style:family="text">
      <style:text-properties officeooo:rsid="006c0a57"/>
    </style:style>
    <style:style style:name="T20" style:family="text">
      <style:text-properties officeooo:rsid="006cf20f"/>
    </style:style>
    <style:style style:name="T21" style:family="text">
      <style:text-properties officeooo:rsid="006d7076"/>
    </style:style>
    <style:style style:name="T22" style:family="text">
      <style:text-properties officeooo:rsid="006de611"/>
    </style:style>
    <style:style style:name="T23" style:family="text">
      <style:text-properties officeooo:rsid="00702f85"/>
    </style:style>
    <style:style style:name="T24" style:family="text">
      <style:text-properties officeooo:rsid="007373a4"/>
    </style:style>
    <style:style style:name="T25" style:family="text">
      <style:text-properties officeooo:rsid="00762920"/>
    </style:style>
    <style:style style:name="T26" style:family="text">
      <style:text-properties style:font-name="Times New Roman" style:font-name-asian="Times New Roman" style:font-name-complex="Times New Roman"/>
    </style:style>
    <style:style style:name="T27" style:family="text">
      <style:text-properties style:font-name="Courier New" style:font-name-asian="Times New Roman" style:font-name-complex="Times New Roman"/>
    </style:style>
    <style:style style:name="T28" style:family="text">
      <style:text-properties style:font-name="Courier New" style:font-name-asian="Noto Serif CJK SC" style:font-name-complex="Noto Sans Devanagari1"/>
    </style:style>
    <style:style style:name="T29" style:family="text">
      <style:text-properties style:font-name-asian="Times New Roman" style:font-name-complex="Times New Roman"/>
    </style:style>
    <style:style style:name="T30" style:family="text">
      <style:text-properties officeooo:rsid="007644ac" style:font-name-asian="Times New Roman" style:font-name-complex="Times New Roman"/>
    </style:style>
    <style:style style:name="T31" style:family="text">
      <style:text-properties style:font-name-asian="Noto Serif CJK SC" style:font-name-complex="Noto Sans Devanagari1"/>
    </style:style>
    <style:style style:name="T32" style:family="text">
      <style:text-properties officeooo:rsid="00775d98"/>
    </style:style>
    <style:style style:name="T33" style:family="text">
      <style:text-properties officeooo:rsid="00798105"/>
    </style:style>
    <style:style style:name="T34" style:family="text">
      <style:text-properties officeooo:rsid="007bb884"/>
    </style:style>
    <style:style style:name="T35" style:family="text">
      <style:text-properties officeooo:rsid="007e677c"/>
    </style:style>
    <style:style style:name="T36" style:family="text">
      <style:text-properties officeooo:rsid="007ef540"/>
    </style:style>
    <style:style style:name="T37" style:family="text">
      <style:text-properties officeooo:rsid="008096b4"/>
    </style:style>
    <style:style style:name="T38" style:family="text">
      <style:text-properties officeooo:rsid="00823e19"/>
    </style:style>
    <style:style style:name="T39" style:family="text">
      <style:text-properties officeooo:rsid="0099b4d9"/>
    </style:style>
    <style:style style:name="T40" style:family="text">
      <style:text-properties officeooo:rsid="00a7ba96"/>
    </style:style>
    <style:style style:name="T41" style:family="text">
      <style:text-properties officeooo:rsid="00b04fd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4" draw:name="Изображение1" text:anchor-type="char" svg:width="8.264cm" svg:height="5.927cm" draw:z-index="78"><draw:image xlink:href="Pictures/10000001000003D0000002BC46FD0A63.png" xlink:type="simple" xlink:show="embed" xlink:actuate="onLoad" draw:mime-type="image/png"/></draw:frame></text:p>
      <text:p text:style-name="P6"><text:span text:style-name="T1"/></text:p>
      <text:p text:style-name="P6"><text:span text:style-name="T1"/></text:p>
      <text:p text:style-name="P6"><text:span text:style-name="T1"/></text:p>
      <text:p text:style-name="P7">Программа для ЭВМ «МПК-Пересвет»</text:p>
      <text:p text:style-name="P6"/>
      <text:p text:style-name="Title">Руководство администратора</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
      <text:p text:style-name="P8"/>
      <text:p text:style-name="P8"/>
      <text:p text:style-name="P8"/>
      <text:p text:style-name="P8"/>
      <text:p text:style-name="P8"/>
      <text:p text:style-name="P8">Москва <text:span text:style-name="T2">2025</text:span></text:p>
      <text:p text:style-name="Глоссарий._20_Заголовок"><text:soft-page-break/>ГЛОССАРИЙ</text:p>
      <table:table table:name="Таблица1" table:style-name="Таблица1">
        <table:table-column table:style-name="Таблица1.A"/>
        <table:table-column table:style-name="Таблица1.B"/>
        <table:table-row>
          <table:table-cell table:style-name="Таблица1.A1" office:value-type="string">
            <text:p text:style-name="P2">Термин</text:p>
          </table:table-cell>
          <table:table-cell table:style-name="Таблица1.B1" office:value-type="string">
            <text:p text:style-name="P2">Определение</text:p>
          </table:table-cell>
        </table:table-row>
        <table:table-row>
          <table:table-cell table:style-name="Таблица1.A2" office:value-type="string">
            <text:p text:style-name="P3">Модель технического объекта</text:p>
          </table:table-cell>
          <table:table-cell table:style-name="Таблица1.B2" office:value-type="string">
            <text:p text:style-name="P3">Совокупность статической и динамической моделей объекта.</text:p>
          </table:table-cell>
        </table:table-row>
        <table:table-row>
          <table:table-cell table:style-name="Таблица1.A3" office:value-type="string">
            <text:p text:style-name="P3">Статическая модель объекта</text:p>
          </table:table-cell>
          <table:table-cell table:style-name="Таблица1.B3" office:value-type="string">
            <text:p text:style-name="P3">Иерархия сущностей. Также в иерархию включаются сущности, описывающие информационную систему. В простейшем случае статическая модель может представлять собой просто линейный список тегов (параметров объектов).</text:p>
          </table:table-cell>
        </table:table-row>
        <table:table-row>
          <table:table-cell table:style-name="Таблица1.A2" office:value-type="string">
            <text:p text:style-name="P3">Динамическая модель</text:p>
          </table:table-cell>
          <table:table-cell table:style-name="Таблица1.B4" office:value-type="string">
            <text:p text:style-name="P3">Совокупность методов, реализуемых на каких-либо языках программирования. В виде методов реализуются бизнес-процессы, протекающие на моделируемом объекте, а также выполняются расчёты значений рассчитываемых тегов. Выполнение методов инициируется при возникновении событий в модели.</text:p>
          </table:table-cell>
        </table:table-row>
        <table:table-row>
          <table:table-cell table:style-name="Таблица1.A3" office:value-type="string">
            <text:p text:style-name="Table_20_Contents">Сущность </text:p>
          </table:table-cell>
          <table:table-cell table:style-name="Таблица1.B3" office:value-type="string">
            <text:p text:style-name="P10">Основные сущности статической модели технического объекта: теги, объекты, тревоги, методы, расписания, константы. Дополнительные сущности, описывающие информационную систему: хранилище данных, источник данных. Также есть возможность создавать дополнительные сущности, самостоятельно реализуя логику работы с ними.</text:p>
          </table:table-cell>
        </table:table-row>
        <table:table-row>
          <table:table-cell table:style-name="Таблица1.A2" office:value-type="string">
            <text:p text:style-name="Table_20_Contents">Тег </text:p>
            <text:p text:style-name="Table_20_Contents"/>
          </table:table-cell>
          <table:table-cell table:style-name="Таблица1.B6" office:value-type="string">
            <text:p text:style-name="P10">Параметр объекта. Например: температура, давление, сила тока и т.д. Значения тегов хранятся в том или ином хранилище данных. Каждое значение тега обязательно имеет метку времени. Кроме того, может иметь показатель качества значения.</text:p>
            <text:p text:style-name="P10">Тег в иерархии представляется узлом, дочерним по отношению к какому-либо объекту.</text:p>
            <text:p text:style-name="P10">Поддерживаемые типы значений тегов: целый, вещественный, строковый, json.</text:p>
          </table:table-cell>
        </table:table-row>
        <table:table-row>
          <table:table-cell table:style-name="Таблица1.A3" office:value-type="string">
            <text:p text:style-name="P4">Объект</text:p>
          </table:table-cell>
          <table:table-cell table:style-name="Таблица1.B3" office:value-type="string">
            <text:p text:style-name="P4">Основная сущность при моделировании технических объектов. Объектом может быть: предприятие, цех, участок, технологическая линия, агрегат, датчик и т.д. Каждый объект может содержать любое количество объектов-потомков. Также объект может содержать любое количество тегов.</text:p>
          </table:table-cell>
        </table:table-row>
        <table:table-row>
          <table:table-cell table:style-name="Таблица1.A8" office:value-type="string">
            <text:p text:style-name="P5">Расписание</text:p>
          </table:table-cell>
          <table:table-cell table:style-name="Таблица1.B8" office:value-type="string">
            <text:p text:style-name="P5">Заданная последовательность, определяющая моменты времени, в которые будут выполняться те или иные задачи. Задачами могут быть: запуск расчёта вычисляемых тегов, запуск на исполнение каких-либо методов (к примеру, генерация отчётов и рассылка их по почте).</text:p>
          </table:table-cell>
        </table:table-row>
        <table:table-row>
          <table:table-cell table:style-name="Таблица1.A3" office:value-type="string">
            <text:p text:style-name="P5">Событие</text:p>
          </table:table-cell>
          <table:table-cell table:style-name="Таблица1.B3" office:value-type="string">
            <text:p text:style-name="P5">В платформе поддерживаются три основных типа событий: изменение тега, возникновение тревоги, событие расписания. К этим событиям можно привязывать выполнение различных методов, тем самым «оживляя» модель технического объекта. События являются инициаторами действий.</text:p>
          </table:table-cell>
        </table:table-row>
        <text:soft-page-break/>
        <table:table-row>
          <table:table-cell table:style-name="Таблица1.A8" office:value-type="string">
            <text:p text:style-name="P5">Тревога</text:p>
          </table:table-cell>
          <table:table-cell table:style-name="Таблица1.B8" office:value-type="string">
            <text:p text:style-name="P5">Это состояние тега, которое может возникнуть при изменении тега и при выполнении некоторых заданных условий. Есть четыре вида стандартных тревог: LoLo, Lo, Hi, HiHi.</text:p>
            <text:p text:style-name="P11">В «МПК-Пересвет», в отличие от типовых тревог LoLo-Lo-Hi-HiHi, есть возможность создать любое их количество. Более того, возможно создавать сложные тревоги, возникновение которых учитывает значение других тегов. Это достигается тем, что условием возникновения тревоги может быть указано не только какое-то значение тега, а результат расчёта метода, который может реализовывать любую сложную логику.</text:p>
          </table:table-cell>
        </table:table-row>
        <table:table-row>
          <table:table-cell table:style-name="Таблица1.A3" office:value-type="string">
            <text:p text:style-name="P5">Метод</text:p>
          </table:table-cell>
          <table:table-cell table:style-name="Таблица1.B3" office:value-type="string">
            <text:p text:style-name="P5">Программный код, реализующий логику поведения моделируемого объекта. Методы вызываются на исполнение возникающими событиями и используются для: расчёта значений вычисляемых тегов, определения факта возникновения/пропадания тревоги, вызова внешних процессов и т.д.</text:p>
          </table:table-cell>
        </table:table-row>
        <table:table-row>
          <table:table-cell table:style-name="Таблица1.A8" office:value-type="string">
            <text:p text:style-name="P5">Хранилище данных</text:p>
          </table:table-cell>
          <table:table-cell table:style-name="Таблица1.B8" office:value-type="string">
            <text:p text:style-name="P5">База данных, в которой хранятся исторические данные (значения тегов). Платформа может поддерживать одновременно несколько хранилищ данных разных типов. Рекомендуемое хранилище данных для систем промышленной автоматизации - PostgreSQL. Также есть драйвер для Victoriametrics. Возможно написание драйверов для любых других типов хранилищ данных.</text:p>
          </table:table-cell>
        </table:table-row>
        <table:table-row>
          <table:table-cell table:style-name="Таблица1.A13" office:value-type="string">
            <text:p text:style-name="P5">Коннектор</text:p>
          </table:table-cell>
          <table:table-cell table:style-name="Таблица1.B13" office:value-type="string">
            <text:p text:style-name="P5">Программа, обеспечивающая сбор данных с устройства по определённому протоколу. Обычно для каждого протокола создаётся отдельный коннектор.</text:p>
          </table:table-cell>
        </table:table-row>
      </table:table>
      <text:p text:style-name="Standard"/>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20">Содержание</text:p>
          </text:index-title>
          <text:p text:style-name="P17"><text:a xlink:type="simple" xlink:href="#__RefHeading___Toc231_183289677" text:style-name="Index_20_Link" text:visited-style-name="Index_20_Link">Описание<text:tab/>5</text:a></text:p>
          <text:p text:style-name="P18"><text:a xlink:type="simple" xlink:href="#__RefHeading___Toc233_183289677" text:style-name="Index_20_Link" text:visited-style-name="Index_20_Link">Область применения<text:tab/>5</text:a></text:p>
          <text:p text:style-name="P18"><text:a xlink:type="simple" xlink:href="#__RefHeading___Toc235_183289677" text:style-name="Index_20_Link" text:visited-style-name="Index_20_Link">Возможности<text:tab/>5</text:a></text:p>
          <text:p text:style-name="P18"><text:a xlink:type="simple" xlink:href="#__RefHeading___Toc2879_27341558" text:style-name="Index_20_Link" text:visited-style-name="Index_20_Link">Уровень подготовки администратора<text:tab/>5</text:a></text:p>
          <text:p text:style-name="P17"><text:a xlink:type="simple" xlink:href="#__RefHeading___Toc2881_27341558" text:style-name="Index_20_Link" text:visited-style-name="Index_20_Link">Архитектура МПК-Пересвет<text:tab/>6</text:a></text:p>
          <text:p text:style-name="P18"><text:a xlink:type="simple" xlink:href="#__RefHeading___Toc2883_27341558" text:style-name="Index_20_Link" text:visited-style-name="Index_20_Link">Микросервис<text:tab/>8</text:a></text:p>
          <text:p text:style-name="P18"><text:a xlink:type="simple" xlink:href="#__RefHeading___Toc2885_27341558" text:style-name="Index_20_Link" text:visited-style-name="Index_20_Link">OpenLDAP<text:tab/>8</text:a></text:p>
          <text:p text:style-name="P18"><text:a xlink:type="simple" xlink:href="#__RefHeading___Toc2887_27341558" text:style-name="Index_20_Link" text:visited-style-name="Index_20_Link">PostgreSQL<text:tab/>8</text:a></text:p>
          <text:p text:style-name="P18"><text:a xlink:type="simple" xlink:href="#__RefHeading___Toc2889_27341558" text:style-name="Index_20_Link" text:visited-style-name="Index_20_Link">Redis<text:tab/>9</text:a></text:p>
          <text:p text:style-name="P18"><text:a xlink:type="simple" xlink:href="#__RefHeading___Toc2891_27341558" text:style-name="Index_20_Link" text:visited-style-name="Index_20_Link">Grafana<text:tab/>9</text:a></text:p>
          <text:p text:style-name="P18"><text:a xlink:type="simple" xlink:href="#__RefHeading___Toc2893_27341558" text:style-name="Index_20_Link" text:visited-style-name="Index_20_Link">Nginx<text:tab/>9</text:a></text:p>
          <text:p text:style-name="P18"><text:a xlink:type="simple" xlink:href="#__RefHeading___Toc2895_27341558" text:style-name="Index_20_Link" text:visited-style-name="Index_20_Link">RabbitMQ<text:tab/>9</text:a></text:p>
          <text:p text:style-name="P18"><text:a xlink:type="simple" xlink:href="#__RefHeading___Toc2897_27341558" text:style-name="Index_20_Link" text:visited-style-name="Index_20_Link">Коннектор<text:tab/>10</text:a></text:p>
          <text:p text:style-name="P17"><text:a xlink:type="simple" xlink:href="#__RefHeading___Toc788_27341558" text:style-name="Index_20_Link" text:visited-style-name="Index_20_Link">Требования к аппаратному обеспечению<text:tab/>10</text:a></text:p>
          <text:p text:style-name="P17"><text:a xlink:type="simple" xlink:href="#__RefHeading___Toc3433_27341558" text:style-name="Index_20_Link" text:visited-style-name="Index_20_Link">Администрирование<text:tab/>10</text:a></text:p>
          <text:p text:style-name="P18"><text:a xlink:type="simple" xlink:href="#__RefHeading___Toc3435_27341558" text:style-name="Index_20_Link" text:visited-style-name="Index_20_Link">Файл с переменными<text:tab/>10</text:a></text:p>
          <text:p text:style-name="P18"><text:a xlink:type="simple" xlink:href="#__RefHeading___Toc2037_1607204571" text:style-name="Index_20_Link" text:visited-style-name="Index_20_Link">Docker-сеть<text:tab/>11</text:a></text:p>
          <text:p text:style-name="P18"><text:a xlink:type="simple" xlink:href="#__RefHeading___Toc3437_27341558" text:style-name="Index_20_Link" text:visited-style-name="Index_20_Link">Запуск МПК-Пересвет<text:tab/>11</text:a></text:p>
          <text:p text:style-name="P19"><text:a xlink:type="simple" xlink:href="#__RefHeading___Toc3439_27341558" text:style-name="Index_20_Link" text:visited-style-name="Index_20_Link">HTTP<text:tab/>11</text:a></text:p>
          <text:p text:style-name="P19"><text:a xlink:type="simple" xlink:href="#__RefHeading___Toc3441_27341558" text:style-name="Index_20_Link" text:visited-style-name="Index_20_Link">HTTPS. Самоподписанные сертификаты<text:tab/>12</text:a></text:p>
          <text:p text:style-name="P19"><text:a xlink:type="simple" xlink:href="#__RefHeading___Toc3443_27341558" text:style-name="Index_20_Link" text:visited-style-name="Index_20_Link">HTTPS. Сертификаты Let’s Encrypt<text:tab/>13</text:a></text:p>
          <text:p text:style-name="P18"><text:a xlink:type="simple" xlink:href="#__RefHeading___Toc3445_27341558" text:style-name="Index_20_Link" text:visited-style-name="Index_20_Link">Мониторинг состояния<text:tab/>13</text:a></text:p>
          <text:p text:style-name="P17"><text:a xlink:type="simple" xlink:href="#__RefHeading___Toc4259_27341558" text:style-name="Index_20_Link" text:visited-style-name="Index_20_Link">Конфигуратор модели<text:tab/>15</text:a></text:p>
          <text:p text:style-name="P18"><text:a xlink:type="simple" xlink:href="#__RefHeading___Toc4261_27341558" text:style-name="Index_20_Link" text:visited-style-name="Index_20_Link">Папки модели<text:tab/>16</text:a></text:p>
          <text:p text:style-name="P19"><text:a xlink:type="simple" xlink:href="#__RefHeading___Toc4263_27341558" text:style-name="Index_20_Link" text:visited-style-name="Index_20_Link">Объекты<text:tab/>17</text:a></text:p>
          <text:p text:style-name="P19"><text:a xlink:type="simple" xlink:href="#__RefHeading___Toc4265_27341558" text:style-name="Index_20_Link" text:visited-style-name="Index_20_Link">Теги<text:tab/>17</text:a></text:p>
          <text:p text:style-name="P19"><text:a xlink:type="simple" xlink:href="#__RefHeading___Toc4267_27341558" text:style-name="Index_20_Link" text:visited-style-name="Index_20_Link">Коннекторы<text:tab/>17</text:a></text:p>
          <text:p text:style-name="P19"><text:a xlink:type="simple" xlink:href="#__RefHeading___Toc4269_27341558" text:style-name="Index_20_Link" text:visited-style-name="Index_20_Link">Расписания<text:tab/>17</text:a></text:p>
          <text:p text:style-name="P19"><text:a xlink:type="simple" xlink:href="#__RefHeading___Toc4271_27341558" text:style-name="Index_20_Link" text:visited-style-name="Index_20_Link">Хранилища данных<text:tab/>17</text:a></text:p>
          <text:p text:style-name="P18"><text:a xlink:type="simple" xlink:href="#__RefHeading___Toc4273_27341558" text:style-name="Index_20_Link" text:visited-style-name="Index_20_Link">Создание новых узлов<text:tab/>17</text:a></text:p>
          <text:p text:style-name="P18"><text:a xlink:type="simple" xlink:href="#__RefHeading___Toc4275_27341558" text:style-name="Index_20_Link" text:visited-style-name="Index_20_Link">Редактирование свойств узла<text:tab/>19</text:a></text:p>
          <text:p text:style-name="P19"><text:a xlink:type="simple" xlink:href="#__RefHeading___Toc4277_27341558" text:style-name="Index_20_Link" text:visited-style-name="Index_20_Link">Удаление узла<text:tab/>20</text:a></text:p>
          <text:p text:style-name="P17"><text:a xlink:type="simple" xlink:href="#__RefHeading___Toc5629_27341558" text:style-name="Index_20_Link" text:visited-style-name="Index_20_Link">Создание экранов в Grafana<text:tab/>21</text:a></text:p>
          <text:p text:style-name="P18"><text:a xlink:type="simple" xlink:href="#__RefHeading___Toc5631_27341558" text:style-name="Index_20_Link" text:visited-style-name="Index_20_Link">Создание нового экрана и панели<text:tab/>21</text:a></text:p>
        </text:index-body>
      </text:table-of-content>
      <text:p text:style-name="Standard"/>
      <text:p text:style-name="Standard"/>
      <text:h text:style-name="P48" text:outline-level="1"><text:bookmark-start text:name="__RefHeading___Toc231_183289677"/>Описание<text:bookmark-end text:name="__RefHeading___Toc231_183289677"/></text:h>
      <text:p text:style-name="P12">МПК-Пересвет <text:span text:style-name="T4">(далее по тексту — платформа, система)</text:span>— платформа-конструктор для создания моделей технических объектов и информационных систем.</text:p>
      <text:h text:style-name="P51" text:outline-level="2"><text:bookmark-start text:name="__RefHeading___Toc233_183289677"/>Область применения<text:bookmark-end text:name="__RefHeading___Toc233_183289677"/></text:h>
      <text:p text:style-name="P12">Платформа может использоваться для сбора, хранения, обработки данных, а также автоматизации процессов, протекающих в рамках моделируемого технического объекта.</text:p>
      <text:list text:style-name="Numbering_20_123">
        <text:list-item>
          <text:p text:style-name="P54">Промышленная автоматизация уровней SCADA, диспетчеризация/мониторинг, MES.</text:p>
        </text:list-item>
        <text:list-item>
          <text:p text:style-name="P54">Умный дом, умное здание.</text:p>
        </text:list-item>
        <text:list-item>
          <text:p text:style-name="P54">Создание произвольных программно-аппаратных комплексов, предполагающих работу по следующей схеме: автоматический сбор данных с большого количества источников → хранение исторических данных → обработка данных, запуск процессов → отображение данных на динамических экранах/мнемосхемах.</text:p>
        </text:list-item>
      </text:list>
      <text:h text:style-name="P51" text:outline-level="2"><text:bookmark-start text:name="__RefHeading___Toc235_183289677"/>Возможности<text:bookmark-end text:name="__RefHeading___Toc235_183289677"/></text:h>
      <text:list text:style-name="L1">
        <text:list-item>
          <text:p text:style-name="P55">Создание моделей объектов и информационных систем.</text:p>
        </text:list-item>
        <text:list-item>
          <text:p text:style-name="P55">Автоматический сбор данных с большого количества источников с дальнейшим сколь угодно долгим хранением всех собранных данных.</text:p>
        </text:list-item>
        <text:list-item>
          <text:p text:style-name="P55">Создание и управление систем распределённых вычислений, моделирующих поведение объектов.</text:p>
        </text:list-item>
        <text:list-item>
          <text:p text:style-name="P55">Наличие <text:span text:style-name="T3">API, позволяющего полностью управлять системой.</text:span></text:p>
        </text:list-item>
      </text:list>
      <text:h text:style-name="Heading_20_2" text:outline-level="2"><text:bookmark-start text:name="__RefHeading___Toc2879_27341558"/>Уровень подготовки администратора<text:bookmark-end text:name="__RefHeading___Toc2879_27341558"/></text:h>
      <text:p text:style-name="Text_20_body">Базовые навыки администратора МПК-Пересвет:</text:p>
      <text:list text:style-name="L2">
        <text:list-item>
          <text:p text:style-name="P56">Операционные системы семейства <text:span text:style-name="T5">Linux: пользователь, минимальные навыки администрирования </text:span><text:span text:style-name="T6">(управление правами, запуск sh-скриптов).</text:span></text:p>
        </text:list-item>
        <text:list-item>
          <text:p text:style-name="P56">Установка Docker, Docker compose.</text:p>
        </text:list-item>
        <text:list-item>
          <text:p text:style-name="P56">Настоящее руководство администратора.</text:p>
        </text:list-item>
      </text:list>
      <text:p text:style-name="Text_20_body">Дополнительные навыки для случая масштабирования системы и повышенного уровня безопасности:</text:p>
      <text:list text:style-name="L3">
        <text:list-item>
          <text:p text:style-name="P57">Более глубокие навыки администрирования ОС семейства <text:span text:style-name="T6">Linux.</text:span></text:p>
        </text:list-item>
        <text:list-item>
          <text:p text:style-name="P57">Понимание принципов функционирования <text:span text:style-name="T6">TLS, умение работать с сертификатами безопасности.</text:span></text:p>
        </text:list-item>
        <text:list-item>
          <text:p text:style-name="P57">Администрирование <text:span text:style-name="T6">Docker, Docker compose: управление экземплярами контейнеров, настройка сетей между контейнерами, работа с томами данных.</text:span></text:p>
        </text:list-item>
        <text:list-item>
          <text:p text:style-name="P57"><text:soft-page-break/>Конфигурирование <text:span text:style-name="T7">Nginx.</text:span></text:p>
        </text:list-item>
      </text:list>
      <text:p text:style-name="P15">Мониторинг работы и тонкая настройка компонентов, входящих в состав МПК-Пересвет предполагает знание:</text:p>
      <text:list text:style-name="L4">
        <text:list-item>
          <text:p text:style-name="P58">OpenLDAP.</text:p>
        </text:list-item>
        <text:list-item>
          <text:p text:style-name="P58">RabbitMQ.</text:p>
        </text:list-item>
        <text:list-item>
          <text:p text:style-name="P58">Nginx.</text:p>
        </text:list-item>
        <text:list-item>
          <text:p text:style-name="P58">Uvicorn или Nginx.Unit.</text:p>
        </text:list-item>
        <text:list-item>
          <text:p text:style-name="P58">Redis.</text:p>
        </text:list-item>
        <text:list-item>
          <text:p text:style-name="P58">PostgreSQL или другая база, используемая для хранения исторических данных.</text:p>
        </text:list-item>
      </text:list>
      <text:p text:style-name="P15">Создание экранов пользователя предполагает наличие навыков администрирования <text:span text:style-name="T8">Grafana.</text:span></text:p>
      <text:p text:style-name="P15">При необходимости создания сложных экранов администратор должен обладать навыками <text:span text:style-name="T8">web-</text:span>программирования.</text:p>
      <text:h text:style-name="Heading_20_1" text:outline-level="1"><text:bookmark-start text:name="__RefHeading___Toc2881_27341558"/>Архитектура МПК-Пересвет<text:bookmark-end text:name="__RefHeading___Toc2881_27341558"/></text:h>
      <text:p text:style-name="P16">На рисунке ниже представлена архитектура компонентов МПК-Пересвет:</text:p>
      <text:p text:style-name="P9"><draw:frame draw:style-name="fr1" draw:name="Врезка1" text:anchor-type="char" svg:width="10.095cm" draw:z-index="30"><draw:text-box fo:min-height="13.046cm"><text:p text:style-name="Drawing"><draw:frame draw:style-name="fr5" draw:name="Изображение3" text:anchor-type="paragraph" svg:width="12.416cm" style:rel-width="123%" svg:height="14.931cm" style:rel-height="scale" draw:z-index="31"><draw:image xlink:href="Pictures/20000A1F0000438100004A8958BE8B99.svm" xlink:type="simple" xlink:show="embed" xlink:actuate="onLoad" draw:mime-type="image/x-svm"/><draw:image xlink:href="Pictures/100000010000028E000002D25AE60A1D.png" xlink:type="simple" xlink:show="embed" xlink:actuate="onLoad" draw:mime-type="image/png"/></draw:frame>Рисунок <text:sequence text:ref-name="refDrawing0" text:name="Drawing" text:formula="ooow:Drawing+1" style:num-format="1">1</text:sequence>: Архитектура компонентов МПК-Пересвет</text:p></draw:text-box></draw:frame><text:soft-page-break/></text:p>
      <text:p text:style-name="P16">Назначение компонентов, указанных на рисунке <text:span text:style-name="T9">1, приведено в таблице 1.</text:span></text:p>
      <text:p text:style-name="P13">Таблица <text:sequence text:ref-name="refTable0" text:name="Table" text:formula="ooow:Table+1" style:num-format="1">1</text:sequence>: Список компонентов МПК-Пересвет</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2">№</text:p>
          </table:table-cell>
          <table:table-cell table:style-name="Таблица2.B1" office:value-type="string">
            <text:p text:style-name="P2">Компонент</text:p>
          </table:table-cell>
          <table:table-cell table:style-name="Таблица2.C1" office:value-type="string">
            <text:p text:style-name="P2">Описание</text:p>
          </table:table-cell>
        </table:table-row>
        <table:table-row>
          <table:table-cell table:style-name="Таблица2.A2" office:value-type="string">
            <text:p text:style-name="P14">1</text:p>
          </table:table-cell>
          <table:table-cell table:style-name="Таблица2.B2" office:value-type="string">
            <text:p text:style-name="Table_20_Contents">Микросервис</text:p>
          </table:table-cell>
          <table:table-cell table:style-name="Таблица2.C2" office:value-type="string">
            <text:p text:style-name="Table_20_Contents">Набор микросервисов, реализующих собой основную функциональность МПК-Пересвет.</text:p>
          </table:table-cell>
        </table:table-row>
        <table:table-row>
          <table:table-cell table:style-name="Таблица2.A3" office:value-type="string">
            <text:p text:style-name="P14">2</text:p>
          </table:table-cell>
          <table:table-cell table:style-name="Таблица2.B3" office:value-type="string">
            <text:p text:style-name="P14">OpenLDAP</text:p>
          </table:table-cell>
          <table:table-cell table:style-name="Таблица2.C3" office:value-type="string">
            <text:p text:style-name="Table_20_Contents">Иерархическая база данных. Хранение статической модели объекта, аутентификация и авторизация пользователей.</text:p>
          </table:table-cell>
        </table:table-row>
        <table:table-row>
          <table:table-cell table:style-name="Таблица2.A2" office:value-type="string">
            <text:p text:style-name="P14">3</text:p>
          </table:table-cell>
          <table:table-cell table:style-name="Таблица2.B2" office:value-type="string">
            <text:p text:style-name="P14">PostgreSQL</text:p>
          </table:table-cell>
          <table:table-cell table:style-name="Таблица2.C2" office:value-type="string">
            <text:p text:style-name="Table_20_Contents">Исторические данные.</text:p>
          </table:table-cell>
        </table:table-row>
        <table:table-row>
          <table:table-cell table:style-name="Таблица2.A3" office:value-type="string">
            <text:p text:style-name="P14">4</text:p>
          </table:table-cell>
          <table:table-cell table:style-name="Таблица2.B3" office:value-type="string">
            <text:p text:style-name="P14">Redis</text:p>
          </table:table-cell>
          <table:table-cell table:style-name="Таблица2.C3" office:value-type="string">
            <text:p text:style-name="Table_20_Contents">Кэш-сервер.</text:p>
          </table:table-cell>
        </table:table-row>
        <text:soft-page-break/>
        <table:table-row>
          <table:table-cell table:style-name="Таблица2.A2" office:value-type="string">
            <text:p text:style-name="P14">5</text:p>
          </table:table-cell>
          <table:table-cell table:style-name="Таблица2.B2" office:value-type="string">
            <text:p text:style-name="P14">Grafana</text:p>
          </table:table-cell>
          <table:table-cell table:style-name="Таблица2.C2" office:value-type="string">
            <text:p text:style-name="Table_20_Contents">Конструктор для построения интерфейсов пользователя.</text:p>
          </table:table-cell>
        </table:table-row>
        <table:table-row>
          <table:table-cell table:style-name="Таблица2.A3" office:value-type="string">
            <text:p text:style-name="P14">6</text:p>
          </table:table-cell>
          <table:table-cell table:style-name="Таблица2.B3" office:value-type="string">
            <text:p text:style-name="P14">Nginx</text:p>
          </table:table-cell>
          <table:table-cell table:style-name="Таблица2.C3" office:value-type="string">
            <text:p text:style-name="Table_20_Contents">Обратный прокси. Единая точка входа в систему для всех клиентов.</text:p>
          </table:table-cell>
        </table:table-row>
        <table:table-row>
          <table:table-cell table:style-name="Таблица2.A2" office:value-type="string">
            <text:p text:style-name="P14">7</text:p>
          </table:table-cell>
          <table:table-cell table:style-name="Таблица2.B2" office:value-type="string">
            <text:p text:style-name="P14">RabbitMQ</text:p>
          </table:table-cell>
          <table:table-cell table:style-name="Таблица2.C2" office:value-type="string">
            <text:p text:style-name="Table_20_Contents">Брокер сообщение. Общение между микросервисами, между платформой и коннекторами. Также его могут использовать внешние системы.</text:p>
          </table:table-cell>
        </table:table-row>
        <table:table-row>
          <table:table-cell table:style-name="Таблица2.A9" office:value-type="string">
            <text:p text:style-name="P14">8</text:p>
          </table:table-cell>
          <table:table-cell table:style-name="Таблица2.B9" office:value-type="string">
            <text:p text:style-name="P14">Коннектор</text:p>
          </table:table-cell>
          <table:table-cell table:style-name="Таблица2.C9" office:value-type="string">
            <text:p text:style-name="Table_20_Contents">Специализированная программа для автоматического сбора данных с разных источников. Для каждого протокола обмена данными — свой коннектор.</text:p>
          </table:table-cell>
        </table:table-row>
      </table:table>
      <text:h text:style-name="Heading_20_2" text:outline-level="2"><text:bookmark-start text:name="__RefHeading___Toc2883_27341558"/>Микросервис<text:bookmark-end text:name="__RefHeading___Toc2883_27341558"/></text:h>
      <text:p text:style-name="P16">Функциональное ядро МПК-Пересвет выполнено в виде набора микросервисов, общающихся между собой с помощью брокера сообщений <text:span text:style-name="T10">RabbitMQ.</text:span></text:p>
      <text:p text:style-name="P16">Общее правило: для каждой сущности, присутствующей в модели объекта, создаётся свой набор микросервисов, который «умеет» работать с данной сущностью. В общем случае для каждой сущности может создаваться набор из четырёх микросервисов:</text:p>
      <text:p text:style-name="P16"><text:span text:style-name="T12">&lt;сущность&gt;</text:span><text:span text:style-name="T13">_api_crud</text:span><text:span text:style-name="T10"> — микросервис реализует собой REST API для задач создания-чтения-обновления-удаления экземпляров данной сущности в модели, проверяет корректность входных данных.</text:span></text:p>
      <text:p text:style-name="P16"><text:span text:style-name="T12">&lt;сущность&gt;</text:span><text:span text:style-name="T13">_model_crud</text:span><text:span text:style-name="T10"> — микросервис, работающий со статической моделью (LDAP); только этот микросервис может создавать-обновлять-удалять данные из иерархии.</text:span></text:p>
      <text:p text:style-name="P16"><text:span text:style-name="T12">&lt;сущность&gt;</text:span><text:span text:style-name="T13">_app</text:span><text:span text:style-name="T10"> — микросервис, реализующий основную функциональность сущности; например, для методов это: логика вызова методов на исполнение, возврат результатов работы методов и т. д.</text:span></text:p>
      <text:p text:style-name="P16"><text:span text:style-name="T12">&lt;сущность&gt;</text:span><text:span text:style-name="T14">_app_api</text:span><text:span text:style-name="T11"> — микросервис, обеспечивающий REST API для клиентов сущности; например, для тегов это — API для чтения/записи данных.</text:span></text:p>
      <text:h text:style-name="Heading_20_2" text:outline-level="2"><text:bookmark-start text:name="__RefHeading___Toc2885_27341558"/>OpenLDAP<text:bookmark-end text:name="__RefHeading___Toc2885_27341558"/></text:h>
      <text:p text:style-name="P23">Иерархическая модель технического объекта и всей созданной информационной системы, так как в модели регистрируются, кроме объектов, хранилища данных и привязка к ним тегов; коннекторы, поставляющие данные в платформу; расписания, генерирующие события и т. д.</text:p>
      <text:p text:style-name="P23">Иерархия может иметь любой уровень вложенности. В самом простейшем случае объект может моделироваться простым линейным списком тегов.</text:p>
      <text:p text:style-name="P23">Кроме того, OpenLDAP выполняет функции аутентификации и авторизации пользователей.</text:p>
      <text:h text:style-name="Heading_20_2" text:outline-level="2"><text:bookmark-start text:name="__RefHeading___Toc2887_27341558"/>PostgreSQL<text:bookmark-end text:name="__RefHeading___Toc2887_27341558"/></text:h>
      <text:p text:style-name="P23">Наиболее часто используемая СУБД для хранения исторических данных. </text:p>
      <text:p text:style-name="P23"><text:soft-page-break/>Архитектура МПК-Пересвет позволяет использовать для хранения истории любые базы данных, при создании для работы с ними соответствующего микросервиса. Более того, возможна одновременная поддержка нескольких баз данных в рамках одной модели, причём базы данных могут быть разного типа.</text:p>
      <text:p text:style-name="P23">Но в большинстве случаев достаточно <text:span text:style-name="T15">PostgreSQL. </text:span></text:p>
      <text:p text:style-name="P24">Для каждого тега, зарегистрированного в модели, в базе данных создаётся отдельная таблица с названием «<text:span text:style-name="T15">t_&lt;id тега&gt;». В этой таблице — </text:span><text:span text:style-name="T16">4 поля: </text:span></text:p>
      <text:p text:style-name="List">id — автоинкрементный идентификатор записи.</text:p>
      <text:p text:style-name="List">x — целочисленная метка времени.</text:p>
      <text:p text:style-name="List">y — значение тега.</text:p>
      <text:p text:style-name="List">q — метка качества.</text:p>
      <text:p text:style-name="Text_20_body">Также создаётся отдельная таблица и для каждой тревоги, только префикс в названии - «<text:span text:style-name="T17">a_».</text:span></text:p>
      <text:h text:style-name="Heading_20_2" text:outline-level="2"><text:bookmark-start text:name="__RefHeading___Toc2889_27341558"/>Redis<text:bookmark-end text:name="__RefHeading___Toc2889_27341558"/></text:h>
      <text:p text:style-name="P25">Redis используется как кэш-сервер. Выполняет важную роль во взаимодействии нескольких экземпляров одного и того же микросервиса.</text:p>
      <text:h text:style-name="Heading_20_2" text:outline-level="2"><text:bookmark-start text:name="__RefHeading___Toc2891_27341558"/>Grafana<text:bookmark-end text:name="__RefHeading___Toc2891_27341558"/></text:h>
      <text:p text:style-name="P25">Конструктор для создания пользовательского интерфейса. Преимущества:</text:p>
      <text:list text:style-name="L5">
        <text:list-item>
          <text:p text:style-name="P59">Стандартный инструмент, а не специализированная разработка.</text:p>
        </text:list-item>
        <text:list-item>
          <text:p text:style-name="P59">Обилие существующих виджетов.</text:p>
        </text:list-item>
        <text:list-item>
          <text:p text:style-name="P59">Возможность строить BI на базе Apache e-Charts.</text:p>
        </text:list-item>
        <text:list-item>
          <text:p text:style-name="P59">Работа с картами.</text:p>
        </text:list-item>
        <text:list-item>
          <text:p text:style-name="P59">Отображение видеопотоков с камер.</text:p>
        </text:list-item>
        <text:list-item>
          <text:p text:style-name="P59">Объединение в рамках одного пользовательского интерфейса множества информационных систем предприятия.</text:p>
        </text:list-item>
      </text:list>
      <text:h text:style-name="Heading_20_2" text:outline-level="2"><text:bookmark-start text:name="__RefHeading___Toc2893_27341558"/>Nginx<text:bookmark-end text:name="__RefHeading___Toc2893_27341558"/></text:h>
      <text:p text:style-name="P26">Обратный прокси, обеспечивающий единую точку входа в систему.</text:p>
      <text:p text:style-name="P26">Позволяет балансировать нагрузку между экземплярами микросервисов.</text:p>
      <text:p text:style-name="P26">Также выполняет роль TLS-прокси.</text:p>
      <text:h text:style-name="Heading_20_2" text:outline-level="2"><text:bookmark-start text:name="__RefHeading___Toc2895_27341558"/>RabbitMQ<text:bookmark-end text:name="__RefHeading___Toc2895_27341558"/></text:h>
      <text:p text:style-name="P26">Брокер сообщений. Все микросервисы общаются между собой исключительно через этот брокер.</text:p>
      <text:p text:style-name="P26"><text:soft-page-break/>Очереди сообщений по умолчанию конфигурируются таким образом, что возможно запускать одновременно несколько экземпляров одного и того же сервиса для обработки большого потока сообщений.</text:p>
      <text:p text:style-name="P26">Допустимо создание новых микросервисов, новые микросервисы могут добавлять в модель работу со своими сущностями. </text:p>
      <text:h text:style-name="Heading_20_2" text:outline-level="2"><text:bookmark-start text:name="__RefHeading___Toc2897_27341558"/>Коннектор<text:bookmark-end text:name="__RefHeading___Toc2897_27341558"/></text:h>
      <text:p text:style-name="P27">Коннектор — это специализированная программа, которая работает с внешним источником данных по определённому протоколу передачи данных. Можно создать коннектор, который будет работать по нескольким протоколам, но лучше придерживаться двух правил: </text:p>
      <text:list text:style-name="L6">
        <text:list-item>
          <text:p text:style-name="P60">Один коннектор — один протокол.</text:p>
        </text:list-item>
        <text:list-item>
          <text:p text:style-name="P60">Один коннектор — один источник данных.</text:p>
        </text:list-item>
      </text:list>
      <text:h text:style-name="P49" text:outline-level="1"><text:bookmark-start text:name="__RefHeading___Toc788_27341558"/>Требования к аппаратному обеспечению<text:bookmark-end text:name="__RefHeading___Toc788_27341558"/></text:h>
      <text:p text:style-name="P21">Требования к аппаратному обеспечению полностью зависят от масштабов создаваемой модели технического объекта и от потоков данных как внутрь платформы, так и из неё.</text:p>
      <text:p text:style-name="P21">Платформа МПК-Пересвет может работать как на одноплатных компьютерах типа <text:span text:style-name="T18">Raspberry Pi, так и на кластерах серверов в случае больших потоков данных.</text:span></text:p>
      <text:p text:style-name="P21">Минимальные требования: <text:span text:style-name="T18">Raspberry Pi 4 Model B с 4 Гб оперативной памяти и флэшкой на 32 Гб.</text:span></text:p>
      <text:h text:style-name="P50" text:outline-level="1"><text:bookmark-start text:name="__RefHeading___Toc3433_27341558"/>Администрирование<text:bookmark-end text:name="__RefHeading___Toc3433_27341558"/></text:h>
      <text:h text:style-name="P52" text:outline-level="2"><text:bookmark-start text:name="__RefHeading___Toc3435_27341558"/>Файл с переменными<text:bookmark-end text:name="__RefHeading___Toc3435_27341558"/></text:h>
      <text:p text:style-name="P35">Файл «docker → compose → .cont_one_app.env» содержит значения всех переменных, которые используются при сборке <text:span text:style-name="T34">docker-</text:span>контейнеров.</text:p>
      <text:p text:style-name="P35">Значение ключевых переменных <text:span text:style-name="T34">(число перед двоеточием — номер строки в файле</text:span><text:span text:style-name="T36">)</text:span>:</text:p>
      <text:p text:style-name="Код"><text:span text:style-name="T34">5: </text:span>TIME_ZONE=Europe/Moscow </text:p>
      <text:p text:style-name="P36">Переменная влияет на работу с метками времени в платформе МПК-Пересвет. Так как правильная работа с метками времени — ключевой вопрос работы всей системы, выставляйте эту переменную на ту временную зону, в которой работает контейнер с основными микросервисами МПК-Пересвет.</text:p>
      <text:p text:style-name="P36"><text:soft-page-break/>Следующие переменные хранят номера публикуемых портов. Если на хосте, на котором запускается МПК-Пересвет, какие-то из указанных в этих переменных порты уже заняты, то необходимо заменить значения указанных переменных перед сборкой контейнеров.</text:p>
      <text:p text:style-name="Код">89: LDAP_PORT=389</text:p>
      <text:p text:style-name="P37">Стандартный порт LDAP-сервера.</text:p>
      <text:p text:style-name="Код">96: NGINX_HTTP_PORT=80</text:p>
      <text:p text:style-name="Код">97: NGINX_HTTPS_PORT=443</text:p>
      <text:p text:style-name="P37">Порты по умолчанию для всех веб-серверов.</text:p>
      <text:p text:style-name="Код">105: POSTGRES_PORT=5432</text:p>
      <text:p text:style-name="P37">Порт доступа к базе PostgreSQL.</text:p>
      <text:p text:style-name="Код">118: RABBIT_PORT=5672</text:p>
      <text:p text:style-name="Код">119: RABBIT_UI_PORT=15672</text:p>
      <text:p text:style-name="Код">120: RABBIT_MQTT_PORT=1883</text:p>
      <text:p text:style-name="P37">Порты, используемые брокером сообщений RabbitMQ. Порт 1883 используется плагином MQTT для связи с коннекторами.</text:p>
      <text:p text:style-name="Код"><text:span text:style-name="T35">132: </text:span>PORT_REDIS=6379</text:p>
      <text:p text:style-name="Код"><text:span text:style-name="T35">133: </text:span>PORT_REDIS_INSIGHT=8001</text:p>
      <text:p text:style-name="Text_20_body">Порты, используемые кэш-сервером <text:span text:style-name="T36">Redis.</text:span></text:p>
      <text:h text:style-name="Heading_20_2" text:outline-level="2"><text:bookmark-start text:name="__RefHeading___Toc2037_1607204571"/>Docker-сеть<text:bookmark-end text:name="__RefHeading___Toc2037_1607204571"/></text:h>
      <text:p text:style-name="P42">По умолчанию между docker-контейнерами создаётся сеть:</text:p>
      <text:p text:style-name="Код">networks:</text:p>
      <text:p text:style-name="Код"><text:s text:c="2"/>peresvet:</text:p>
      <text:p text:style-name="Код"><text:s text:c="4"/>driver: bridge</text:p>
      <text:p text:style-name="Код"><text:s text:c="4"/>ipam:</text:p>
      <text:p text:style-name="Код"><text:s text:c="6"/>config:</text:p>
      <text:p text:style-name="Код"><text:s text:c="10"/>- subnet: 10.66.0.0/16</text:p>
      <text:p text:style-name="Код"><text:s text:c="12"/>gateway: 10.66.0.1</text:p>
      <text:p text:style-name="Text_20_body">В случае конфликта сети необходимо установить другие параметры.</text:p>
      <text:h text:style-name="Heading_20_2" text:outline-level="2"><text:bookmark-start text:name="__RefHeading___Toc3437_27341558"/>Запуск МПК-Пересвет<text:bookmark-end text:name="__RefHeading___Toc3437_27341558"/></text:h>
      <text:h text:style-name="Heading_20_3" text:outline-level="3"><text:bookmark-start text:name="__RefHeading___Toc3439_27341558"/>HTTP<text:bookmark-end text:name="__RefHeading___Toc3439_27341558"/></text:h>
      <text:p text:style-name="Text_20_body">Для простых случаев использования платформы, допустим, для работы внутри надёжно защищённых сетей можно использовать работу по протоколу <text:span text:style-name="T23">http. Для этого необходимо запустить МПК-Пересвет скриптом</text:span></text:p>
      <text:p text:style-name="Код">$ ./run_one_app.sh</text:p>
      <text:p text:style-name="Text_20_body">После старта МПК-Пересвет доступ к пользовательскому интерфейсу возможен по адресу <text:a xlink:type="simple" xlink:href="http://localhost/grafana" text:style-name="Internet_20_link" text:visited-style-name="Visited_20_Internet_20_Link"><text:span text:style-name="T33">http://localhost/grafana</text:span></text:a><text:span text:style-name="T33">:</text:span></text:p>
      <text:p text:style-name="P34"><draw:frame draw:style-name="fr1" draw:name="Врезка4" text:anchor-type="char" svg:width="10.56cm" draw:z-index="36"><draw:text-box fo:min-height="8.911cm"><text:p text:style-name="Drawing"><draw:frame draw:style-name="fr5" draw:name="Изображение6" text:anchor-type="paragraph" svg:width="10.56cm" style:rel-width="100%" svg:height="8.911cm" style:rel-height="scale" draw:z-index="37"><draw:image xlink:href="Pictures/100000010000032D000002AE6256BCE3.png" xlink:type="simple" xlink:show="embed" xlink:actuate="onLoad" draw:mime-type="image/png"/></draw:frame>Рисунок <text:sequence text:ref-name="refDrawing1" text:name="Drawing" text:formula="ooow:Drawing+1" style:num-format="1">2</text:sequence>: Экран платформы. Протокол HTTP.</text:p></draw:text-box></draw:frame><text:soft-page-break/>Внимание! При первом запуске страницы платформы пароль пользователя «<text:span text:style-name="T37">admin» также «admin». Сразу будет предложено сменить пароль. </text:span></text:p>
      <text:h text:style-name="Heading_20_3" text:outline-level="3"><text:bookmark-start text:name="__RefHeading___Toc3441_27341558"/>HTTPS. Самоподписанные сертификаты<text:bookmark-end text:name="__RefHeading___Toc3441_27341558"/></text:h>
      <text:p text:style-name="P29">Первым шагом генерируем самоподписанные сертификаты:</text:p>
      <text:p text:style-name="P29">Заходим в каталог «<text:span text:style-name="T24">certificates» и запускаем на исполнение скрипт:</text:span></text:p>
      <text:p text:style-name="Код">$ ./gen_crt.sh</text:p>
      <text:p text:style-name="P30">Этот скрипт запускает поочерёдно три других скрипта, расположенных в этом же каталоге, с параметрами по умолчанию:</text:p>
      <text:p text:style-name="Код">01. gen_root.sh</text:p>
      <text:p text:style-name="Код">02. <text:span text:style-name="T25">gen_server.sh</text:span></text:p>
      <text:p text:style-name="Код">03. gen_client.sh</text:p>
      <text:p text:style-name="P31">01. gen_root.sh — генерация сертификата удостоверяющего центра.</text:p>
      <text:p text:style-name="P31">02. gen_server.sh — генерация сертификата для сервера.</text:p>
      <text:p text:style-name="P31">03. gen_client.sh — генерация сертификата для клиента.</text:p>
      <text:p text:style-name="P30">В результате работы скрипт «<text:span text:style-name="T25">gen_crt.sh»</text:span> создаст структуру каталогов с сертификатами:</text:p>
      <text:p text:style-name="P40">tls</text:p>
      <text:p text:style-name="P40"><text:span text:style-name="T30">├</text:span><text:span text:style-name="T31"> clients</text:span></text:p>
      <text:p text:style-name="P40"><text:span text:style-name="T29">│</text:span><text:span text:style-name="T31"> <text:s text:c="2"/></text:span><text:span text:style-name="T29">└</text:span><text:span text:style-name="T31"> <text:s/>CN=&lt;guid&gt;</text:span></text:p>
      <text:p text:style-name="P40">├ rootCA</text:p>
      <text:p text:style-name="P40">└ servers</text:p>
      <text:p text:style-name="Код"><text:span text:style-name="T27"><text:s/></text:span><text:span text:style-name="T28"><text:s text:c="4"/></text:span><text:span text:style-name="T27">└</text:span><text:span text:style-name="T28"> <text:s/>CN=&lt;guid&gt;</text:span><text:span text:style-name="T27"> <text:s text:c="3"/></text:span><text:span text:style-name="T26"><text:s/></text:span></text:p>
      <text:p text:style-name="P32"><text:soft-page-break/>В качестве имени сервера по умолчанию будет использовано имя хоста, на котором запускался скрипт.</text:p>
      <text:p text:style-name="P32">Если необходимо сгенерировать сертификаты для другого сервера, необходимо запустить отдельно скрипт:</text:p>
      <text:p text:style-name="Код"><text:span text:style-name="T32">$</text:span> ./02.\ gen_server.sh -h &lt;server_name&gt; -d &lt;days&gt; -k &lt;key_length&gt; -s &lt;subj&gt;</text:p>
      <text:p text:style-name="P33">где:</text:p>
      <text:p text:style-name="List">h — имя сервера, для которого генерируется сертификат; по умолчанию — имя локального хоста;</text:p>
      <text:p text:style-name="List">d — срок действия сертификата в днях; по умолчанию — 3654 дней (10 лет);</text:p>
      <text:p text:style-name="List">k — длина ключа в битах; по умолчанию — 4096</text:p>
      <text:p text:style-name="List">s — информация, вносимая в сертификат; по умолчанию — /CN=&lt;server_name&gt;.</text:p>
      <text:p text:style-name="Text_20_body">После генерации сертификатов запускаем МПК-Пересвет на исполнение скриптом</text:p>
      <text:p text:style-name="Код">$ ./run_one_app_ssl.sh</text:p>
      <text:h text:style-name="Heading_20_3" text:outline-level="3"><text:bookmark-start text:name="__RefHeading___Toc3443_27341558"/>HTTPS. Сертификаты Let’s Encrypt<text:bookmark-end text:name="__RefHeading___Toc3443_27341558"/></text:h>
      <text:p text:style-name="P22">Сертификаты от Let’s Encrypt можно получить только для серверов, доступных из интернета.</text:p>
      <text:p text:style-name="P22">В этом случае: предполагаем, что выполняем указанные ниже действия на сервере, доступном в интернете под именем «server.ru».</text:p>
      <text:p text:style-name="P22">Запускаем скрипт:</text:p>
      <text:p text:style-name="Код">$ ./run_one_app_ssl_letsencrypt_generate_certificates.sh server.ru</text:p>
      <text:p text:style-name="Attention">В качестве параметра передаём скрипту имя сервера, как он виден в сети интернет!</text:p>
      <text:p text:style-name="Text_20_body">В процессе работы скрипта следуем его указаниям.</text:p>
      <text:p text:style-name="Text_20_body">После работы скрипта запускаем другой скрипт:</text:p>
      <text:p text:style-name="Код">$ ./run_one_app_ssl_letsencrypt.sh</text:p>
      <text:p text:style-name="P38">В результате: </text:p>
      <text:list text:style-name="L7">
        <text:list-item>
          <text:p text:style-name="P61">Запускается МПК-Пересвет.</text:p>
        </text:list-item>
        <text:list-item>
          <text:p text:style-name="P61">При перезапуске сервера МПК-Пересвет перезапускается.</text:p>
        </text:list-item>
        <text:list-item>
          <text:p text:style-name="P61">Каждые 11 недель происходит автоматическое обновление сертификатов.</text:p>
        </text:list-item>
      </text:list>
      <text:h text:style-name="Heading_20_2" text:outline-level="2"><text:bookmark-start text:name="__RefHeading___Toc3445_27341558"/>Мониторинг состояния<text:bookmark-end text:name="__RefHeading___Toc3445_27341558"/></text:h>
      <text:p text:style-name="P21">Мониторинг состояния компонентов МПК-Пересвет обуславливается способом его установки.</text:p>
      <text:p text:style-name="P21">Основной способ установки, доступный по умолчанию — в виде <text:span text:style-name="T19">docker-контейнеров, поэтому отслеживать состояние платформы возможно с помощью средств и инструментов docker, docker compose, а также сторонних инструментов типа Portainer.</text:span></text:p>
      <text:p text:style-name="P21"><text:soft-page-break/>Успешный запуск платформы можно определить по выводу логов её сервисов в консоль. При этом экран имеет приблизительно такой вид:</text:p>
      <text:p text:style-name="P21"><draw:frame draw:style-name="fr1" draw:name="Врезка2" text:anchor-type="char" svg:width="17cm" draw:z-index="32"><draw:text-box fo:min-height="10.698cm"><text:p text:style-name="P9"><draw:frame draw:style-name="fr5" draw:name="Изображение4" text:anchor-type="paragraph" svg:width="17cm" style:rel-width="100%" svg:height="10.698cm" style:rel-height="scale" draw:z-index="33"><draw:image xlink:href="Pictures/100000010000074000000490441CDD9A.png" xlink:type="simple" xlink:show="embed" xlink:actuate="onLoad" draw:mime-type="image/png"/></draw:frame>Рисунок <text:sequence text:ref-name="refDrawing2" text:name="Drawing" text:formula="ooow:Drawing+1" style:num-format="1">3</text:sequence>: Лог успешного запуска МПК-Пересвет</text:p></draw:text-box></draw:frame>Признаком успешного запуска МПК-Пересвет является наличие двух записей от каждого микросервиса об успешном соединении с сервером <text:span text:style-name="T20">AMQP (брокер RabbitMQ) и OpenLDAP, а также </text:span>записей «<text:span text:style-name="T20">Application startup complete» и «Uvicorn running on </text:span><text:a xlink:type="simple" xlink:href="http://0.0.0.0:8000/" text:style-name="Internet_20_link" text:visited-style-name="Visited_20_Internet_20_Link"><text:span text:style-name="T20">http://0.0.0.0:8000</text:span></text:a><text:span text:style-name="T20">».</text:span></text:p>
      <text:p text:style-name="P28">В случае возникновения ошибок сообщения о них будут появляться в консоли, отмеченные красным цветом.</text:p>
      <text:p text:style-name="P28">Лог контейнера с микросервисами платформы можно просмотреть с помощью команды </text:p>
      <text:p text:style-name="Код">$ docker logs <text:span text:style-name="T21">one_app</text:span></text:p>
      <text:p text:style-name="P28">Первые записи лога будут, скорее всего, содержать ошибки соединения с брокером RabbitMQ:</text:p>
      <text:p text:style-name="P28"><draw:frame draw:style-name="fr1" draw:name="Врезка3" text:anchor-type="char" svg:width="17cm" draw:z-index="34"><draw:text-box fo:min-height="7.706cm"><text:p text:style-name="P9"><draw:frame draw:style-name="fr5" draw:name="Изображение5" text:anchor-type="paragraph" svg:width="17cm" style:rel-width="100%" svg:height="7.706cm" style:rel-height="scale" draw:z-index="35"><draw:image xlink:href="Pictures/10000001000008DE000004050CB0E5ED.png" xlink:type="simple" xlink:show="embed" xlink:actuate="onLoad" draw:mime-type="image/png"/></draw:frame>Рисунок <text:sequence text:ref-name="refDrawing3" text:name="Drawing" text:formula="ooow:Drawing+1" style:num-format="1">4</text:sequence>: Лог контейнера МПК-Пересвет</text:p></draw:text-box></draw:frame><text:soft-page-break/>Это не является ошибкой, так как брокер стартует медленнее основных сервисов, но сервисы продолжают в цикле попытки соединения с брокером до тех пор, пока соединение не будет успешным.</text:p>
      <text:p text:style-name="P28">Хорошей практикой для мониторинга состояния контейнеров является использование какого-либо инструмента с <text:span text:style-name="T22">UI, например — Portainer.</text:span></text:p>
      <text:h text:style-name="Heading_20_1" text:outline-level="1"><text:bookmark-start text:name="__RefHeading___Toc4259_27341558"/>Конфигуратор модели<text:bookmark-end text:name="__RefHeading___Toc4259_27341558"/></text:h>
      <text:p text:style-name="P27">После запуска МПК-Пересвет необходимо создать модель объекта. Для этого служит «Конфигуратор», реализованный в виде панели в <text:span text:style-name="T38">Grafana. Панель «Конфигуратор» является панелью по умолчанию для пользователя «admin».</text:span></text:p>
      <text:p text:style-name="Attention">Здесь и далее: на рисунках в строке адреса указан <text:span text:style-name="T38">bdhome:3000. <text:line-break/>Вместо этого пишем http://localhost/grafana</text:span></text:p>
      <text:p text:style-name="P16"><draw:frame draw:style-name="fr1" draw:name="Врезка5" text:anchor-type="char" svg:width="12.351cm" draw:z-index="38"><draw:text-box fo:min-height="8.936cm"><text:p text:style-name="P9"><draw:frame draw:style-name="fr5" draw:name="Изображение7" text:anchor-type="paragraph" svg:width="12.351cm" style:rel-width="100%" svg:height="8.936cm" style:rel-height="scale" draw:z-index="39"><draw:image xlink:href="Pictures/1000000000000424000002FF23181575.png" xlink:type="simple" xlink:show="embed" xlink:actuate="onLoad" draw:mime-type="image/png"/></draw:frame>Рисунок <text:sequence text:ref-name="refDrawing4" text:name="Drawing" text:formula="ooow:Drawing+1" style:num-format="1">5</text:sequence>: Экран "Конфигуратор"</text:p></draw:text-box></draw:frame><text:soft-page-break/>При первом запуске в низу экрана автоматически добавляется панель, которую можно удалить:</text:p>
      <text:h text:style-name="Heading_20_2" text:outline-level="2"><text:bookmark-start text:name="__RefHeading___Toc4261_27341558"/><draw:frame draw:style-name="fr1" draw:name="Врезка6" text:anchor-type="char" svg:width="12.998cm" draw:z-index="40"><draw:text-box fo:min-height="9.119cm"><text:p text:style-name="P9"><draw:frame draw:style-name="fr5" draw:name="Изображение8" text:anchor-type="paragraph" svg:width="12.998cm" style:rel-width="100%" svg:height="9.119cm" style:rel-height="scale" draw:z-index="41"><draw:image xlink:href="Pictures/1000000000000424000002FF9007728D.png" xlink:type="simple" xlink:show="embed" xlink:actuate="onLoad" draw:mime-type="image/png"/></draw:frame>Рисунок <text:sequence text:ref-name="refDrawing5" text:name="Drawing" text:formula="ooow:Drawing+1" style:num-format="1">6</text:sequence>: Экран при первом запуске</text:p></draw:text-box></draw:frame>Папки модели<text:bookmark-end text:name="__RefHeading___Toc4261_27341558"/></text:h>
      <text:p text:style-name="P16">Создаваемая модель объекта и информационной системы имеет иерархическую структуру.</text:p>
      <text:p text:style-name="P16"/>
      <text:p text:style-name="P16"><text:soft-page-break/>На верхнем уровне иерархии находятся узлы, в которых создаются экземпляры соответствующих сущностей.</text:p>
      <text:h text:style-name="Heading_20_3" text:outline-level="3"><text:bookmark-start text:name="__RefHeading___Toc4263_27341558"/>Объекты<text:bookmark-end text:name="__RefHeading___Toc4263_27341558"/></text:h>
      <text:p text:style-name="P16">Внутри этой папки создаётся основная иерархия - модель объекта. Иерархия имеет любой уровень вложенности и может включать в себя объекты, теги, тревоги, методы.</text:p>
      <text:h text:style-name="Heading_20_3" text:outline-level="3"><text:bookmark-start text:name="__RefHeading___Toc4265_27341558"/>Теги<text:bookmark-end text:name="__RefHeading___Toc4265_27341558"/></text:h>
      <text:p text:style-name="P16">Наиболее простой случай модели объекта - это линейный список его параметров (тегов). В таком случае теги можно создавать, не привязывая их к какому-либо объекту. Для этого случая служит отдельная папка Теги.</text:p>
      <text:h text:style-name="Heading_20_3" text:outline-level="3"><text:bookmark-start text:name="__RefHeading___Toc4267_27341558"/>Коннекторы<text:bookmark-end text:name="__RefHeading___Toc4267_27341558"/></text:h>
      <text:p text:style-name="P16">В этой папке создаются описания коннекторов. Параметры, задаваемые в узле-описании коннектора, зависят от конкретного коннектора и указаны в документации на данный коннектор.</text:p>
      <text:h text:style-name="Heading_20_3" text:outline-level="3"><text:bookmark-start text:name="__RefHeading___Toc4269_27341558"/>Расписания<text:bookmark-end text:name="__RefHeading___Toc4269_27341558"/></text:h>
      <text:p text:style-name="P16">Папка для создания расписаний - генераторов событий.</text:p>
      <text:h text:style-name="Heading_20_3" text:outline-level="3"><text:bookmark-start text:name="__RefHeading___Toc4271_27341558"/>Хранилища данных<text:bookmark-end text:name="__RefHeading___Toc4271_27341558"/></text:h>
      <text:p text:style-name="P16">Папка, в которой хранятся описания хранилищ данных. Исторические данные, факты возникновения, пропадания и квитирования тревог хранятся в этих хранилищах.</text:p>
      <text:p text:style-name="Attention">Открытая версия платформы «Пересвет» поддерживает работу только с одним хранилищем, поэтому в конфигураторе для открытой платформы отсутствует узел «Хранилища данных».</text:p>
      <text:h text:style-name="Heading_20_2" text:outline-level="2"><text:bookmark-start text:name="__RefHeading___Toc4273_27341558"/>Создание новых узлов<text:bookmark-end text:name="__RefHeading___Toc4273_27341558"/></text:h>
      <text:list text:style-name="L8">
        <text:list-item>
          <text:p text:style-name="P62">Выбираем нужный узел, внутри которого хотим создать дочерний.</text:p>
        </text:list-item>
        <text:list-item>
          <text:p text:style-name="P62">Выбираем нужную синюю кнопку и, нажав её, создаём новый экземпляр необходимой нам сущности.</text:p>
        </text:list-item>
      </text:list>
      <text:p text:style-name="Text_20_body"><draw:frame draw:style-name="fr1" draw:name="Врезка7" text:anchor-type="char" svg:width="13.099cm" draw:z-index="42"><draw:text-box fo:min-height="9.477cm"><text:p text:style-name="Drawing"><draw:frame draw:style-name="fr5" draw:name="Изображение9" text:anchor-type="paragraph" svg:width="13.099cm" style:rel-width="100%" svg:height="9.477cm" style:rel-height="scale" draw:z-index="43"><draw:image xlink:href="Pictures/1000000000000424000002FF05ECCE5F.png" xlink:type="simple" xlink:show="embed" xlink:actuate="onLoad" draw:mime-type="image/png"/></draw:frame>Рисунок <text:sequence text:ref-name="refDrawing6" text:name="Drawing" text:formula="ooow:Drawing+1" style:num-format="1">7</text:sequence>: Конфигуратор. Создание нового объекта.</text:p></draw:text-box></draw:frame><text:soft-page-break/>После нажатия кнопки в иерархию добавится новый экземпляр выбранной сущности. Узел в иерархии, соответствующий данному экземпляру, станет текущим и справа появится панель со свойствами нового узла.</text:p>
      <text:p text:style-name="Text_20_body">Кроме того, изменится набор кнопок в верхней части конфигуратора.</text:p>
      <text:p text:style-name="Text_20_body">Синие кнопки показывают, экземпляры каких сущностей могут быть созданы внутри выбранного узла.</text:p>
      <text:p text:style-name="Text_20_body">Например: внутри объекта могут быть созданы другие объекты или теги; внутри тега могут быть созданы методы и тревоги.</text:p>
      <text:p text:style-name="Text_20_body"/>
      <text:p text:style-name="Text_20_body"><draw:frame draw:style-name="fr3" draw:name="Врезка9" text:anchor-type="paragraph" svg:x="3.074cm" svg:y="2.309cm" svg:width="11.141cm" draw:z-index="44"><draw:text-box fo:min-height="2.027cm"><text:p text:style-name="Drawing"><draw:frame draw:style-name="fr7" draw:name="Изображение11" text:anchor-type="paragraph" svg:x="4.611cm" svg:y="0.127cm" svg:width="1.783cm" style:rel-width="16%" svg:height="0.935cm" style:rel-height="scale" draw:z-index="45"><draw:image xlink:href="Pictures/100000000000003E000000246E272897.png" xlink:type="simple" xlink:show="embed" xlink:actuate="onLoad" draw:mime-type="image/png"/></draw:frame>Рисунок <text:sequence text:ref-name="refDrawing7" text:name="Drawing" text:formula="ooow:Drawing+1" style:num-format="1">9</text:sequence>: Конфигуратор. Кнопка "Новый тег"</text:p></draw:text-box></draw:frame><draw:frame draw:style-name="fr3" draw:name="Врезка8" text:anchor-type="paragraph" svg:x="3.074cm" svg:y="0cm" svg:width="11.044cm" draw:z-index="46"><draw:text-box fo:min-height="2.311cm"><text:p text:style-name="Drawing"><draw:frame draw:style-name="fr5" draw:name="Изображение10" text:anchor-type="paragraph" svg:width="1.656cm" style:rel-width="15%" svg:height="0.91cm" style:rel-height="scale" draw:z-index="47"><draw:image xlink:href="Pictures/100000000000004400000024807C1A6E.png" xlink:type="simple" xlink:show="embed" xlink:actuate="onLoad" draw:mime-type="image/png"/></draw:frame>Рисунок <text:sequence text:ref-name="refDrawing8" text:name="Drawing" text:formula="ooow:Drawing+1" style:num-format="1">8</text:sequence>: Конфигуратор. Кнопка "Новый объект"</text:p></draw:text-box></draw:frame><draw:frame draw:style-name="fr3" draw:name="Врезка10" text:anchor-type="paragraph" svg:x="1.39cm" svg:y="4.334cm" svg:width="14.256cm" draw:z-index="48"><draw:text-box fo:min-height="1.993cm"><text:p text:style-name="Drawing"><draw:frame draw:style-name="fr5" draw:name="Изображение12" text:anchor-type="paragraph" svg:width="1.711cm" style:rel-width="12%" svg:height="0.797cm" style:rel-height="scale" draw:z-index="49"><draw:image xlink:href="Pictures/100000000000003D0000002439DEC3F0.png" xlink:type="simple" xlink:show="embed" xlink:actuate="onLoad" draw:mime-type="image/png"/></draw:frame>Рисунок <text:sequence text:ref-name="refDrawing9" text:name="Drawing" text:formula="ooow:Drawing+1" style:num-format="1">10</text:sequence>: Конфигуратор. Кнопка удаления выбранного узла из иерархии</text:p></draw:text-box></draw:frame><text:soft-page-break/>При создании нового узла в иерархии с помощью конфигуратора он создаётся с параметрами по умолчанию. Поэтому имя нового узла совпадает с его идентификатором:</text:p>
      <text:p text:style-name="Text_20_body"><draw:frame draw:style-name="fr1" draw:name="Врезка11" text:anchor-type="char" svg:width="12.637cm" draw:z-index="50"><draw:text-box fo:min-height="9.142cm"><text:p text:style-name="Drawing"><draw:frame draw:style-name="fr5" draw:name="Изображение13" text:anchor-type="paragraph" svg:width="12.637cm" style:rel-width="100%" svg:height="9.142cm" style:rel-height="scale" draw:z-index="51"><draw:image xlink:href="Pictures/1000000000000424000002FF2DA70302.png" xlink:type="simple" xlink:show="embed" xlink:actuate="onLoad" draw:mime-type="image/png"/></draw:frame>Рисунок <text:sequence text:ref-name="refDrawing10" text:name="Drawing" text:formula="ooow:Drawing+1" style:num-format="1">11</text:sequence>: Конфигуратор. Новый объект</text:p></draw:text-box></draw:frame></text:p>
      <text:h text:style-name="Heading_20_2" text:outline-level="2"><text:bookmark-start text:name="__RefHeading___Toc4275_27341558"/>Редактирование свойств узла<text:bookmark-end text:name="__RefHeading___Toc4275_27341558"/></text:h>
      <text:p text:style-name="Text_20_body">На панели справа редактируем свойства узла. При этом изменённые свойства обводятся синей рамкой.</text:p>
      <text:p text:style-name="Text_20_body">Если у узла изменено хотя бы одно свойство, то активизируются две кнопки:</text:p>
      <text:p text:style-name="Text_20_body"><text:span text:style-name="T12">Записать</text:span> - сохранение в модели изменённых свойств и</text:p>
      <text:p text:style-name="Text_20_body"><text:span text:style-name="T12">Сбросить</text:span> - отмена внесённых изменений, возврат к начальным параметрам.</text:p>
      <text:p text:style-name="Text_20_body"><draw:frame draw:style-name="fr1" draw:name="Врезка12" text:anchor-type="char" svg:width="12.222cm" draw:z-index="52"><draw:text-box fo:min-height="8.842cm"><text:p text:style-name="Drawing"><draw:frame draw:style-name="fr5" draw:name="Изображение14" text:anchor-type="paragraph" svg:width="12.222cm" style:rel-width="100%" svg:height="8.842cm" style:rel-height="scale" draw:z-index="53"><draw:image xlink:href="Pictures/1000000000000424000002FF6AD6AFFB.png" xlink:type="simple" xlink:show="embed" xlink:actuate="onLoad" draw:mime-type="image/png"/></draw:frame>Рисунок <text:sequence text:ref-name="refDrawing11" text:name="Drawing" text:formula="ooow:Drawing+1" style:num-format="1">12</text:sequence>: Конфигуратор. Редактирование параметров узла</text:p></draw:text-box></draw:frame><text:soft-page-break/>Нажимаем кнопку <text:span text:style-name="T12">Записать</text:span>:</text:p>
      <text:h text:style-name="P53" text:outline-level="3"><text:bookmark-start text:name="__RefHeading___Toc4277_27341558"/><draw:frame draw:style-name="fr1" draw:name="Врезка13" text:anchor-type="char" svg:width="11.428cm" draw:z-index="19"><draw:text-box fo:min-height="8.269cm"><text:p text:style-name="Drawing"><draw:frame draw:style-name="fr6" draw:name="Изображение15" text:anchor-type="as-char" svg:width="11.428cm" style:rel-width="100%" svg:height="8.269cm" style:rel-height="scale" draw:z-index="20"><draw:image xlink:href="Pictures/1000000000000424000002FF4FDDC8D4.png" xlink:type="simple" xlink:show="embed" xlink:actuate="onLoad" draw:mime-type="image/png"/></draw:frame>Рисунок <text:sequence text:ref-name="refDrawing12" text:name="Drawing" text:formula="ooow:Drawing+1" style:num-format="1">13</text:sequence>: Конфигуратор. Запись изменённых параметров</text:p></draw:text-box></draw:frame>Удаление узла<text:bookmark-end text:name="__RefHeading___Toc4277_27341558"/></text:h>
      <text:p text:style-name="Text_20_body">Выбираем нужный узел в иерархии и нажимаем красную кнопку:</text:p>
      <text:p text:style-name="Text_20_body"/>
      <text:p text:style-name="Text_20_body"/>
      <text:p text:style-name="Text_20_body"/>
      <text:p text:style-name="Text_20_body"><text:soft-page-break/><draw:frame draw:style-name="fr2" draw:name="Врезка14" text:anchor-type="as-char" svg:width="14.256cm" draw:z-index="15"><draw:text-box fo:min-height="1.993cm"><text:p text:style-name="Drawing"><draw:frame draw:style-name="fr5" draw:name="Изображение12 Копия 1" text:anchor-type="paragraph" svg:width="1.711cm" style:rel-width="12%" svg:height="0.797cm" style:rel-height="scale" draw:z-index="16"><draw:image xlink:href="Pictures/100000000000003D0000002439DEC3F0.png" xlink:type="simple" xlink:show="embed" xlink:actuate="onLoad" draw:mime-type="image/png"/></draw:frame>Рисунок <text:sequence text:ref-name="refDrawing13" text:name="Drawing" text:formula="ooow:Drawing+1" style:num-format="1">14</text:sequence>: Конфигуратор. Кнопка удаления выбранного узла из иерархии</text:p></draw:text-box></draw:frame></text:p>
      <text:p text:style-name="Text_20_body">Из иерархии удаляется узел и все его потомки.</text:p>
      <text:h text:style-name="Heading_20_1" text:outline-level="1"><text:bookmark-start text:name="__RefHeading___Toc5629_27341558"/>Создание экранов в <text:span text:style-name="T39">Grafana</text:span><text:bookmark-end text:name="__RefHeading___Toc5629_27341558"/></text:h>
      <text:p text:style-name="Attention">По умолчанию при запуске контейнеров МПК-Пересвет регистрируется как источник данных в Grafana. Поэтому остановимся на создании экранов, предполагая, что МПК-Пересвет уже зарегистрирован как источник данных по умолчанию.</text:p>
      <text:p text:style-name="Text_20_body">Допустим, в нашей модели есть тег с идентификатором «58993cd8-f3e9-103e-97a9-c54148266c5f», для которого в исторической базе данных накоплены данные. Тогда для создания тренда для этого тега выполним следующие шаги:</text:p>
      <text:h text:style-name="Heading_20_2" text:outline-level="2"><text:bookmark-start text:name="__RefHeading___Toc5631_27341558"/>Создание нового экрана и панели<text:bookmark-end text:name="__RefHeading___Toc5631_27341558"/></text:h>
      <text:p text:style-name="Text_20_body"><draw:frame draw:style-name="fr1" draw:name="Врезка15" text:anchor-type="char" svg:width="13.22cm" draw:z-index="54"><draw:text-box fo:min-height="8.505cm"><text:p text:style-name="Drawing"><draw:frame draw:style-name="fr5" draw:name="Изображение16" text:anchor-type="paragraph" svg:width="13.22cm" style:rel-width="100%" svg:height="8.505cm" style:rel-height="scale" draw:z-index="55"><draw:image xlink:href="Pictures/10000000000004EB0000032AF1E84203.png" xlink:type="simple" xlink:show="embed" xlink:actuate="onLoad" draw:mime-type="image/png"/></draw:frame>Рисунок <text:sequence text:ref-name="refDrawing14" text:name="Drawing" text:formula="ooow:Drawing+1" style:num-format="1">15</text:sequence>: Создание нового экрана</text:p></draw:text-box></draw:frame>…и новую панель:</text:p>
      <text:p text:style-name="Text_20_body"><draw:frame draw:style-name="fr1" draw:name="Врезка16" text:anchor-type="char" svg:width="12.614cm" draw:z-index="56"><draw:text-box fo:min-height="8.114cm"><text:p text:style-name="Drawing"><draw:frame draw:style-name="fr5" draw:name="Изображение17" text:anchor-type="paragraph" svg:width="12.614cm" style:rel-width="100%" svg:height="8.114cm" style:rel-height="scale" draw:z-index="57"><draw:image xlink:href="Pictures/10000000000004EB0000032A7C86FF37.png" xlink:type="simple" xlink:show="embed" xlink:actuate="onLoad" draw:mime-type="image/png"/></draw:frame>Рисунок <text:sequence text:ref-name="refDrawing15" text:name="Drawing" text:formula="ooow:Drawing+1" style:num-format="1">16</text:sequence>: Создание новой панели</text:p></draw:text-box></draw:frame><text:soft-page-break/>В появившемся окне выберем созданный нами источник данных:</text:p>
      <text:p text:style-name="Text_20_body"><draw:frame draw:style-name="fr1" draw:name="Врезка17" text:anchor-type="char" svg:width="13.312cm" draw:z-index="58"><draw:text-box fo:min-height="8.564cm"><text:p text:style-name="Drawing"><draw:frame draw:style-name="fr5" draw:name="Изображение18" text:anchor-type="paragraph" svg:width="13.312cm" style:rel-width="100%" svg:height="8.564cm" style:rel-height="scale" draw:z-index="59"><draw:image xlink:href="Pictures/10000000000004EB0000032AE9C359C5.png" xlink:type="simple" xlink:show="embed" xlink:actuate="onLoad" draw:mime-type="image/png"/></draw:frame>Рисунок <text:sequence text:ref-name="refDrawing16" text:name="Drawing" text:formula="ooow:Drawing+1" style:num-format="1">17</text:sequence>: Выбор источника данных</text:p></draw:text-box></draw:frame>Откроется окно настройки панели с выбранным источником данных и нужным нам типом панели - «Time Series»:</text:p>
      <text:p text:style-name="Text_20_body"><draw:frame draw:style-name="fr1" draw:name="Врезка18" text:anchor-type="char" svg:width="12.928cm" draw:z-index="60"><draw:text-box fo:min-height="8.317cm"><text:p text:style-name="Drawing"><draw:frame draw:style-name="fr5" draw:name="Изображение19" text:anchor-type="paragraph" svg:width="12.928cm" style:rel-width="100%" svg:height="8.317cm" style:rel-height="scale" draw:z-index="61"><draw:image xlink:href="Pictures/10000000000004EB0000032A32D27525.png" xlink:type="simple" xlink:show="embed" xlink:actuate="onLoad" draw:mime-type="image/png"/></draw:frame>Рисунок <text:sequence text:ref-name="refDrawing17" text:name="Drawing" text:formula="ooow:Drawing+1" style:num-format="1">18</text:sequence>: Выбор типа виджета</text:p></draw:text-box></draw:frame><text:soft-page-break/>Настроим параметр «Path»:</text:p>
      <text:p text:style-name="P39"><draw:frame draw:style-name="fr1" draw:name="Врезка19" text:anchor-type="char" svg:width="14.093cm" draw:z-index="62"><draw:text-box fo:min-height="9.066cm"><text:p text:style-name="Drawing"><draw:frame draw:style-name="fr5" draw:name="Изображение20" text:anchor-type="paragraph" svg:width="14.093cm" style:rel-width="100%" svg:height="9.066cm" style:rel-height="scale" draw:z-index="63"><draw:image xlink:href="Pictures/10000000000004EB0000032AFDB7B031.png" xlink:type="simple" xlink:show="embed" xlink:actuate="onLoad" draw:mime-type="image/png"/></draw:frame>Рисунок <text:sequence text:ref-name="refDrawing18" text:name="Drawing" text:formula="ooow:Drawing+1" style:num-format="1">19</text:sequence>: Настройка "Path"</text:p></draw:text-box></draw:frame>Создадим новый параметр во вкладке «Params» (параметр, включаемый в URL запроса). </text:p>
      <text:p text:style-name="P39">Назовём параметр q, а в качестве его значения укажем строку:</text:p>
      <text:p text:style-name="Код">{"tagId":"58993cd8-f3e9-103e-97a9-c54148266c5f","format":true,"start":"$__isoFrom()","finish":"$__isoTo()"}</text:p>
      <text:p text:style-name="Text_20_body"><text:soft-page-break/>Заметим, что в запросе указаны функции Grafana - «__isoFrom()» и «__isoTo()». Эти функции возвращают, соответственно, начало и конец выбранного пользователем на dashboard’е периода.</text:p>
      <text:p text:style-name="Text_20_body"><draw:frame draw:style-name="fr1" draw:name="Врезка20" text:anchor-type="char" svg:width="15.367cm" draw:z-index="64"><draw:text-box fo:min-height="9.885cm"><text:p text:style-name="Drawing"><draw:frame draw:style-name="fr5" draw:name="Изображение21" text:anchor-type="paragraph" svg:width="15.367cm" style:rel-width="100%" svg:height="9.885cm" style:rel-height="scale" draw:z-index="65"><draw:image xlink:href="Pictures/10000000000004EB0000032A256AE779.png" xlink:type="simple" xlink:show="embed" xlink:actuate="onLoad" draw:mime-type="image/png"/></draw:frame>Рисунок <text:sequence text:ref-name="refDrawing19" text:name="Drawing" text:formula="ooow:Drawing+1" style:num-format="1">20</text:sequence>: Формирование запроса</text:p></draw:text-box></draw:frame>Для проверки того, что платформа возвращает данные, нажмём кнопку «Query inspector»:</text:p>
      <text:p text:style-name="Text_20_body"><draw:frame draw:style-name="fr1" draw:name="Врезка21" text:anchor-type="char" svg:width="13.661cm" draw:z-index="66"><draw:text-box fo:min-height="8.788cm"><text:p text:style-name="Drawing"><draw:frame draw:style-name="fr5" draw:name="Изображение22" text:anchor-type="paragraph" svg:width="13.661cm" style:rel-width="100%" svg:height="8.788cm" style:rel-height="scale" draw:z-index="67"><draw:image xlink:href="Pictures/10000000000004EB0000032ACDB67129.png" xlink:type="simple" xlink:show="embed" xlink:actuate="onLoad" draw:mime-type="image/png"/></draw:frame>Рисунок <text:sequence text:ref-name="refDrawing20" text:name="Drawing" text:formula="ooow:Drawing+1" style:num-format="1">21</text:sequence>: Проверка запроса</text:p></draw:text-box></draw:frame>…затем Refresh:</text:p>
      <text:p text:style-name="Text_20_body"><draw:frame draw:style-name="fr1" draw:name="Врезка22" text:anchor-type="char" svg:width="13.185cm" draw:z-index="68"><draw:text-box fo:min-height="8.483cm"><text:p text:style-name="Drawing"><draw:frame draw:style-name="fr5" draw:name="Изображение23" text:anchor-type="paragraph" svg:width="13.185cm" style:rel-width="100%" svg:height="8.483cm" style:rel-height="scale" draw:z-index="69"><draw:image xlink:href="Pictures/10000000000004EB0000032A774B967B.png" xlink:type="simple" xlink:show="embed" xlink:actuate="onLoad" draw:mime-type="image/png"/></draw:frame>Рисунок <text:sequence text:ref-name="refDrawing21" text:name="Drawing" text:formula="ooow:Drawing+1" style:num-format="1">22</text:sequence>: Обновление данных</text:p></draw:text-box></draw:frame><text:soft-page-break/>…и убедимся, что платформа возвращает данные:</text:p>
      <text:p text:style-name="Text_20_body"><draw:frame draw:style-name="fr1" draw:name="Врезка23" text:anchor-type="char" svg:width="12.735cm" draw:z-index="70"><draw:text-box fo:min-height="8.193cm"><text:p text:style-name="Drawing"><draw:frame draw:style-name="fr5" draw:name="Изображение24" text:anchor-type="paragraph" svg:width="12.735cm" style:rel-width="100%" svg:height="8.193cm" style:rel-height="scale" draw:z-index="71"><draw:image xlink:href="Pictures/10000000000004EB0000032AC9C58F19.png" xlink:type="simple" xlink:show="embed" xlink:actuate="onLoad" draw:mime-type="image/png"/></draw:frame>Рисунок <text:sequence text:ref-name="refDrawing22" text:name="Drawing" text:formula="ooow:Drawing+1" style:num-format="1">23</text:sequence>: Данные из платформы</text:p></draw:text-box></draw:frame>Теперь нам необходимо объяснить <text:span text:style-name="T40">Grafan’е</text:span>, как из полученного массива данных выбрать необходимые.</text:p>
      <text:p text:style-name="Text_20_body">Для этого переходим в закладку «Fields» и настраиваем её так, как показано на рисунке:</text:p>
      <text:p text:style-name="Text_20_body"><draw:frame draw:style-name="fr1" draw:name="Врезка24" text:anchor-type="char" svg:width="12.245cm" draw:z-index="72"><draw:text-box fo:min-height="7.878cm"><text:p text:style-name="Drawing"><draw:frame draw:style-name="fr5" draw:name="Изображение25" text:anchor-type="paragraph" svg:width="12.245cm" style:rel-width="100%" svg:height="7.878cm" style:rel-height="scale" draw:z-index="73"><draw:image xlink:href="Pictures/10000000000004EB0000032AA012B6F9.png" xlink:type="simple" xlink:show="embed" xlink:actuate="onLoad" draw:mime-type="image/png"/></draw:frame>Рисунок <text:sequence text:ref-name="refDrawing23" text:name="Drawing" text:formula="ooow:Drawing+1" style:num-format="1">24</text:sequence>: Настройка полей</text:p></draw:text-box></draw:frame><text:soft-page-break/>Здесь верхнее поле — это значения тега, которые необходимо отобразить (синтаксис JSONPath), нижнее — метка времени.</text:p>
      <text:p text:style-name="Text_20_body">Нажимаем кнопку «Apply» и видим тренд с данными тега:</text:p>
      <text:p text:style-name="Text_20_body"><draw:frame draw:style-name="fr1" draw:name="Врезка25" text:anchor-type="char" svg:width="11.015cm" draw:z-index="74"><draw:text-box fo:min-height="7.086cm"><text:p text:style-name="Drawing"><draw:frame draw:style-name="fr5" draw:name="Изображение26" text:anchor-type="paragraph" svg:width="11.015cm" style:rel-width="100%" svg:height="7.086cm" style:rel-height="scale" draw:z-index="75"><draw:image xlink:href="Pictures/10000000000004EB0000032A08D804A9.png" xlink:type="simple" xlink:show="embed" xlink:actuate="onLoad" draw:mime-type="image/png"/></draw:frame>Рисунок <text:sequence text:ref-name="refDrawing24" text:name="Drawing" text:formula="ooow:Drawing+1" style:num-format="1">25</text:sequence>: Тренд тега</text:p></draw:text-box></draw:frame>Можно менять периоды, выбирать частоту обновления экрана, данные будут отображаться корректно:</text:p>
      <text:p text:style-name="P41"><draw:frame draw:style-name="fr1" draw:name="Врезка26" text:anchor-type="char" svg:width="13.145cm" draw:z-index="76"><draw:text-box fo:min-height="8.456cm"><text:p text:style-name="Drawing"><draw:frame draw:style-name="fr5" draw:name="Изображение27" text:anchor-type="paragraph" svg:width="13.145cm" style:rel-width="100%" svg:height="8.456cm" style:rel-height="scale" draw:z-index="77"><draw:image xlink:href="Pictures/10000000000004EB0000032A85E4825F.png" xlink:type="simple" xlink:show="embed" xlink:actuate="onLoad" draw:mime-type="image/png"/></draw:frame>Рисунок <text:sequence text:ref-name="refDrawing25" text:name="Drawing" text:formula="ooow:Drawing+1" style:num-format="1">26</text:sequence>: Изменение параметров</text:p></draw:text-box></draw:frame><text:soft-page-break/>Аналогичным образом настраиваются другие виджеты в <text:span text:style-name="T41">Grafana. </text:span></text:p>
      <text:p text:style-name="P63">Ключевое знание — умение работать с историческими данными, которые предоставляет МПК-Пересвет. Работа с историческими данными подробно описана в руководстве пользователя.</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Обычный" style:font-family-generic="swiss" style:font-pitch="variable"/>
    <style:font-face style:name="Courier New" svg:font-family="'Courier New'" style:font-family-generic="modern" style:font-pitch="fixed"/>
    <style:font-face style:name="Courier New1" svg:font-family="'Courier New'" style:font-adornments="Обычный" style:font-family-generic="modern" style:font-pitch="fixed"/>
    <style:font-face style:name="CyrillicOld" svg:font-family="CyrillicOld" style:font-adornments="Жирный"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fo:font-family="'Times New Roman'" style:font-style-name="Обычный" style:font-family-generic="roman" style:font-pitch="variable" style:text-scale="9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fo:hyphenate="true" fo:hyphenation-remain-char-count="2" fo:hyphenation-push-char-count="2" loext:hyphenation-no-caps="true" loext:hyphenation-no-last-word="true" loext:hyphenation-word-char-count="5" loext:hyphenation-zone="no-limit"/>
    </style:style>
    <style:style style:name="List" style:family="paragraph" style:parent-style-name="Text_20_body" style:class="list">
      <style:paragraph-properties fo:margin-top="0cm" fo:margin-bottom="0.25cm" style:contextual-spacing="true">
        <style:tab-stops/>
      </style:paragraph-properties>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22pt" fo:font-weight="bold" style:font-size-asian="28pt" style:font-weight-asian="bold" style:font-size-complex="28pt" style:font-weight-complex="bold" style:text-scale="90%"/>
    </style:style>
    <style:style style:name="Heading_20_1" style:display-name="Heading 1" style:family="paragraph" style:parent-style-name="Heading" style:next-style-name="Text_20_body" style:default-outline-level="1" style:class="text">
      <style:paragraph-properties fo:margin-top="0.63cm" fo:margin-bottom="0.21cm" style:contextual-spacing="true"/>
      <style:text-properties fo:font-size="20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06pt solid #000000" text:number-lines="false" text:line-number="0">
        <style:tab-stops>
          <style:tab-stop style:position="17cm" style:type="right"/>
        </style:tab-stops>
      </style:paragraph-properties>
      <style:text-properties style:font-name="Arial" fo:font-family="Arial" style:font-style-name="Обычный" style:font-family-generic="swiss" style:font-pitch="variable" fo:font-size="9pt"/>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Arial" fo:font-family="Arial" style:font-style-name="Обычный" style:font-family-generic="swiss" style:font-pitch="variable" fo:font-size="9pt"/>
    </style:style>
    <style:style style:name="Глоссарий._20_Заголовок" style:display-name="Глоссарий. Заголовок" style:family="paragraph" style:parent-style-name="Text_20_body" style:master-page-name="">
      <style:paragraph-properties fo:text-align="center" style:justify-single-word="false" style:page-number="auto">
        <style:tab-stops/>
      </style:paragraph-properties>
      <style:text-properties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_20_1" style:next-style-name="Text_20_body" style:default-outline-level="2" style:class="text">
      <style:paragraph-properties fo:margin-top="0.4cm" fo:margin-bottom="0.21cm" style:contextual-spacing="false"/>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Код" style:family="paragraph" style:parent-style-name="Text_20_body">
      <loext:graphic-properties draw:fill="solid" draw:fill-color="#eeeeee"/>
      <style:paragraph-properties fo:margin-top="0cm" fo:margin-bottom="0.25cm" style:contextual-spacing="true" fo:line-height="100%" fo:background-color="#eeeeee"/>
      <style:text-properties style:font-name="Courier New1" fo:font-family="'Courier New'" style:font-style-name="Обычный" style:font-family-generic="modern" style:font-pitch="fixed" fo:font-size="10pt" officeooo:rsid="002c7d4f"/>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master-page-name="">
      <style:paragraph-properties fo:margin-top="0.21cm" fo:margin-bottom="0.6cm" style:contextual-spacing="false" fo:text-align="center" style:justify-single-word="false" style:page-number="auto"/>
    </style:style>
    <style:style style:name="Signature" style:family="paragraph" style:parent-style-name="Standard" style:class="text" style:master-page-name="">
      <style:paragraph-properties fo:text-align="center" style:justify-single-word="false" style:page-number="auto" text:number-lines="false" text:line-number="0"/>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Attention" style:family="paragraph" style:parent-style-name="List">
      <style:paragraph-properties fo:padding="0.049cm" fo:border-left="none" fo:border-right="none" fo:border-top="0.06pt solid #000000" fo:border-bottom="0.06pt solid #000000"/>
      <style:text-properties fo:font-style="italic" officeooo:rsid="007f38f4"/>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Изображение2 Копия 1" text:anchor-type="as-char" svg:y="-0.418cm" svg:width="0.542cm" svg:height="0.542cm" draw:z-index="29"><draw:image xlink:href="Pictures/1000000100000064000000646E675ECB.png" xlink:type="simple" xlink:show="embed" xlink:actuate="onLoad" draw:mime-type="image/png"/></draw:frame><text:s/>МПК-Пересвет<text:tab/>Руководство администратора</text:p>
      </style:header>
      <style:footer>
        <text:p text:style-name="MP1">Стр. <text:bookmark-start text:name="PageNumWizard_FOOTER_Базовый2"/><text:page-number text:select-page="current">27</text:page-number><text:s/>из <text:page-count>27</text:page-count><text:bookmark-end text:name="PageNumWizard_FOOTER_Базовый2"/></text:p>
        <text:p text:style-name="Footer"><text:tab/></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16:19:15.504979986</meta:creation-date>
    <meta:generator>LibreOffice/24.2.7.2$Linux_X86_64 LibreOffice_project/420$Build-2</meta:generator>
    <dc:date>2025-12-01T15:39:23.848597264</dc:date>
    <meta:editing-duration>P1DT2H27M51S</meta:editing-duration>
    <meta:editing-cycles>109</meta:editing-cycles>
    <meta:print-date>2025-11-21T21:36:42.904763757</meta:print-date>
    <meta:printed-by>Файлы PDF</meta:printed-by>
    <meta:document-statistic meta:table-count="2" meta:image-count="28" meta:object-count="0" meta:page-count="27" meta:paragraph-count="353" meta:word-count="2839" meta:character-count="22526" meta:non-whitespace-character-count="19970"/>
  </office:meta>
</office:document-meta>
</file>